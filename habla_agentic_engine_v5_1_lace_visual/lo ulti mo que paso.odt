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HABLA.md. Ahí quedó claro qué voy a construir encima del harness base, qué</text:p>
      <text:p text:style-name="Standard"><text:s text:c="2"/>entra en cada módulo nuevo y por qué PROMPT_SPRINT_1.txt debe terminar siendo</text:p>
      <text:p text:style-name="Standard"><text:s text:c="2"/>solo bootstrap humano, no mecanismo final del sistema.</text:p>
      <text:p text:style-name="Standard"/>
      <text:p text:style-name="Standard"><text:s text:c="2"/>No corrí tests porque en este paso solo formalicé arquitectura y roadmap. Si</text:p>
      <text:p text:style-name="Standard"><text:s text:c="2"/>quieres, el siguiente movimiento lógico es que te prepare el prompt blindado</text:p>
      <text:p text:style-name="Standard"><text:s text:c="2"/>para Sprint 6.</text:p>
      <text:p text:style-name="Standard"/>
      <text:p text:style-name="Standard"/>
      <text:p text:style-name="Standard">› ok</text:p>
      <text:p text:style-name="Standard"/>
      <text:p text:style-name="Standard"/>
      <text:p text:style-name="Standard">• Cuando quieras, te doy el prompt de Sprint 6 y sigo auditando igual que en los</text:p>
      <text:p text:style-name="Standard"><text:s text:c="2"/>sprints anteriores.</text:p>
      <text:p text:style-name="Standard"/>
      <text:p text:style-name="Standard"/>
      <text:p text:style-name="Standard">› si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6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policy_loader.py</text:p>
      <text:p text:style-name="Standard"><text:s text:c="2"/>- orchestrator/plan_loader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7 o posteriores.</text:p>
      <text:p text:style-name="Standard"/>
      <text:p text:style-name="Standard"><text:s text:c="2"/>OBJETIVO FUNCIONAL DE SPRINT 6</text:p>
      <text:p text:style-name="Standard"><text:s text:c="2"/>Integrar politica y plan como entradas permanentes del control plane.</text:p>
      <text:p text:style-name="Standard"><text:soft-page-break/></text:p>
      <text:p text:style-name="Standard"><text:s text:c="2"/>REQUISITOS FUNCIONALES</text:p>
      <text:p text:style-name="Standard"/>
      <text:p text:style-name="Standard"><text:s text:c="2"/>1. `orchestrator/policy_loader.py` debe poder:</text:p>
      <text:p text:style-name="Standard"><text:s text:c="2"/>- cargar `AGENTS.md`</text:p>
      <text:p text:style-name="Standard"><text:s text:c="2"/>- leer el archivo desde la raiz real del repo</text:p>
      <text:p text:style-name="Standard"><text:s text:c="2"/>- devolver una estructura normalizada y util para maquina</text:p>
      <text:p text:style-name="Standard"><text:s text:c="2"/>- extraer al menos:</text:p>
      <text:p text:style-name="Standard"><text:s text:c="4"/>- propósito del repositorio</text:p>
      <text:p text:style-name="Standard"><text:s text:c="4"/>- tesis central</text:p>
      <text:p text:style-name="Standard"><text:s text:c="4"/>- reglas maestras</text:p>
      <text:p text:style-name="Standard"><text:s text:c="4"/>- reglas duras del runtime</text:p>
      <text:p text:style-name="Standard"><text:s text:c="4"/>- política de directivas operativas</text:p>
      <text:p text:style-name="Standard"><text:s text:c="4"/>- estructura esperada del proyecto</text:p>
      <text:p text:style-name="Standard"><text:s text:c="4"/>- benchmarks obligatorios</text:p>
      <text:p text:style-name="Standard"><text:s text:c="2"/>- dejar la salida suficientemente estructurada para uso posterior por</text:p>
      <text:p text:style-name="Standard"><text:s text:c="2"/>`directive_context.py` y `directive_generator.py`</text:p>
      <text:p text:style-name="Standard"/>
      <text:p text:style-name="Standard"><text:s text:c="2"/>2. `orchestrator/plan_loader.py` debe poder:</text:p>
      <text:p text:style-name="Standard"><text:s text:c="2"/>- cargar `PLANS.md`</text:p>
      <text:p text:style-name="Standard"><text:s text:c="2"/>- leer el archivo desde la raiz real del repo</text:p>
      <text:p text:style-name="Standard"><text:s text:c="2"/>- devolver una estructura normalizada y util para maquina</text:p>
      <text:p text:style-name="Standard"><text:s text:c="2"/>- extraer al menos:</text:p>
      <text:p text:style-name="Standard"><text:s text:c="4"/>- visión del proyecto</text:p>
      <text:p text:style-name="Standard"><text:s text:c="4"/>- fases</text:p>
      <text:p text:style-name="Standard"><text:s text:c="4"/>- módulos y responsabilidades</text:p>
      <text:p text:style-name="Standard"><text:s text:c="4"/>- sprints</text:p>
      <text:p text:style-name="Standard"><text:s text:c="4"/>- entregables</text:p>
      <text:p text:style-name="Standard"><text:s text:c="4"/>- criterios de aceptación</text:p>
      <text:p text:style-name="Standard"><text:s text:c="4"/>- benchmarks oficiales</text:p>
      <text:p text:style-name="Standard"><text:s text:c="2"/>- dejar la salida suficientemente estructurada para que el runtime pueda</text:p>
      <text:p text:style-name="Standard"><text:s text:c="2"/>consultar:</text:p>
      <text:p text:style-name="Standard"><text:s text:c="4"/>- qué sprint sigue</text:p>
      <text:p text:style-name="Standard"><text:s text:c="4"/>- qué archivos pertenecen a ese sprint</text:p>
      <text:p text:style-name="Standard"><text:s text:c="4"/>- qué está fuera de alcance</text:p>
      <text:p text:style-name="Standard"/>
      <text:p text:style-name="Standard"><text:s text:c="2"/>3. Ambas cargas deben ser:</text:p>
      <text:p text:style-name="Standard"><text:s text:c="2"/>- deterministas</text:p>
      <text:p text:style-name="Standard"><text:s text:c="2"/>- claras</text:p>
      <text:p text:style-name="Standard"><text:s text:c="2"/>- auditables</text:p>
      <text:p text:style-name="Standard"><text:s text:c="2"/>- sin depender de memoria implícita</text:p>
      <text:p text:style-name="Standard"><text:s text:c="2"/>- sin necesidad de prompts manuales</text:p>
      <text:p text:style-name="Standard"/>
      <text:p text:style-name="Standard"><text:s text:c="2"/>4. Debe existir una forma simple de consultar:</text:p>
      <text:p text:style-name="Standard"><text:s text:c="2"/>- política actual</text:p>
      <text:p text:style-name="Standard"><text:s text:c="2"/>- plan actual</text:p>
      <text:p text:style-name="Standard"><text:s text:c="2"/>- sprint actual o siguiente</text:p>
      <text:p text:style-name="Standard"><text:s text:c="2"/>- entregables del sprint</text:p>
      <text:p text:style-name="Standard"><text:s text:c="2"/>- criterios de aceptación del sprint</text:p>
      <text:p text:style-name="Standard"/>
      <text:p text:style-name="Standard"><text:s text:c="2"/>5. Compatibilidad</text:p>
      <text:p text:style-name="Standard"><text:s text:c="2"/>- no romper los sprints 1 al 5 ya aprobados</text:p>
      <text:p text:style-name="Standard"><text:soft-page-break/><text:s text:c="2"/>- mantener compatibilidad con el resto del orquestador actual</text:p>
      <text:p text:style-name="Standard"><text:s text:c="2"/>- preparar el camino para `directive_context.py`</text:p>
      <text:p text:style-name="Standard"/>
      <text:p text:style-name="Standard"><text:s text:c="2"/>DISENO PRAGMATICO</text:p>
      <text:p text:style-name="Standard"><text:s text:c="2"/>- no intentes parser perfecto de markdown universal</text:p>
      <text:p text:style-name="Standard"><text:s text:c="2"/>- usa una estrategia explícita y mantenible</text:p>
      <text:p text:style-name="Standard"><text:s text:c="2"/>- si necesitas heurísticas, que sean pequeñas, trazables y orientadas a estos</text:p>
      <text:p text:style-name="Standard"><text:s text:c="2"/>documentos reales</text:p>
      <text:p text:style-name="Standard"><text:s text:c="2"/>- no conviertas esto en framework gigante</text:p>
      <text:p text:style-name="Standard"><text:s text:c="2"/>- privilegia claridad y utilidad real sobre “generalidad bonita”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6 coherente, pero no implementes todavia:</text:p>
      <text:p text:style-name="Standard"><text:s text:c="2"/>- orchestrator/directive_context.py</text:p>
      <text:p text:style-name="Standard"><text:s text:c="2"/>- orchestrator/habla_adapter.py</text:p>
      <text:p text:style-name="Standard"><text:s text:c="2"/>- orchestrator/directive_generator.py</text:p>
      <text:p text:style-name="Standard"><text:s text:c="2"/>- orchestrator/benchmark.py</text:p>
      <text:p text:style-name="Standard"><text:s text:c="2"/>- migracion de agent_runtime.py</text:p>
      <text:p text:style-name="Standard"/>
      <text:p text:style-name="Standard"><text:s text:c="2"/>RESTRICCIONES DURAS</text:p>
      <text:p text:style-name="Standard"><text:s text:c="2"/>- no implementar Sprint 7 ni posteriores</text:p>
      <text:p text:style-name="Standard"><text:s text:c="2"/>- no crear directive_context.py</text:p>
      <text:p text:style-name="Standard"><text:s text:c="2"/>- no crear habla_adapter.py</text:p>
      <text:p text:style-name="Standard"><text:s text:c="2"/>- no crear directive_generator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6 queda correcto si:</text:p>
      <text:p text:style-name="Standard"><text:s text:c="2"/>- existe `orchestrator/policy_loader.py`</text:p>
      <text:p text:style-name="Standard"><text:s text:c="2"/>- existe `orchestrator/plan_loader.py`</text:p>
      <text:p text:style-name="Standard"><text:s text:c="2"/>- `AGENTS.md` se puede cargar como política estructurada</text:p>
      <text:p text:style-name="Standard"><text:s text:c="2"/>- `PLANS.md` se puede cargar como roadmap estructurado</text:p>
      <text:p text:style-name="Standard"><text:s text:c="2"/>- el runtime puede consultar sprint, entregables y criterios de aceptación</text:p>
      <text:p text:style-name="Standard"><text:s text:c="2"/>- queda preparado el camino para Sprint 7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`policy_loader.py`</text:p>
      <text:p text:style-name="Standard"><text:s text:c="2"/>- carga `AGENTS.md`</text:p>
      <text:p text:style-name="Standard"><text:s text:c="2"/>- devuelve estructura útil</text:p>
      <text:p text:style-name="Standard"><text:s text:c="2"/>- contiene reglas duras y benchmarks</text:p>
      <text:p text:style-name="Standard"/>
      <text:p text:style-name="Standard"><text:s text:c="2"/>2. `plan_loader.py`</text:p>
      <text:p text:style-name="Standard"><text:s text:c="2"/>- carga `PLANS.md`</text:p>
      <text:p text:style-name="Standard"><text:s text:c="2"/>- devuelve estructura útil</text:p>
      <text:p text:style-name="Standard"><text:s text:c="2"/>- identifica sprints, entregables y aceptación</text:p>
      <text:p text:style-name="Standard"><text:soft-page-break/></text:p>
      <text:p text:style-name="Standard"><text:s text:c="2"/>3. Consulta operativa</text:p>
      <text:p text:style-name="Standard"><text:s text:c="2"/>- se puede consultar al menos un sprint concreto y obtener:</text:p>
      <text:p text:style-name="Standard"><text:s text:c="4"/>- objetivo</text:p>
      <text:p text:style-name="Standard"><text:s text:c="4"/>- entregables</text:p>
      <text:p text:style-name="Standard"><text:s text:c="4"/>- criterios de aceptación</text:p>
      <text:p text:style-name="Standard"/>
      <text:p text:style-name="Standard"><text:s text:c="2"/>4. Robustez mínima</text:p>
      <text:p text:style-name="Standard"><text:s text:c="2"/>- si falta el archivo o está mal formado, la salida debe fallar de forma clara</text:p>
      <text:p text:style-name="Standard"><text:s text:c="2"/>y estructurada</text:p>
      <text:p text:style-name="Standard"/>
      <text:p text:style-name="Standard"><text:s text:c="2"/>SI AGREGAS TESTS</text:p>
      <text:p text:style-name="Standard"><text:s text:c="2"/>Mantenlos pequeños y enfocados solo en Sprint 6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7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verificar Sprint 6 como en los anteriores: existencia, alcance,</text:p>
      <text:p text:style-name="Standard"><text:s text:c="2"/>comportamiento real y posibles desvíos antes de darte el veredicto.</text:p>
      <text:p text:style-name="Standard"/>
      <text:p text:style-name="Standard">• Explored</text:p>
      <text:p text:style-name="Standard"><text:s text:c="2"/>└ Read plan_loader.py, policy_loader.py</text:p>
      <text:p text:style-name="Standard"/>
      <text:p text:style-name="Standard">• Ran test -f "/home/neurodriver/BASE _METACOGNICION_COLOMBIA/vista_IA/</text:p>
      <text:p text:style-name="Standard"><text:s text:c="2"/>│ architecture-react-three-flask-socketio/orchestrator/policy_loader.py" &amp;&amp;</text:p>
      <text:p text:style-name="Standard"><text:s text:c="2"/>│ echo POLICY_PRESENT || echo POLICY_MISSING; test -f "/home/neurodriver/</text:p>
      <text:p text:style-name="Standard"><text:s text:c="2"/>│ … +12 lines</text:p>
      <text:p text:style-name="Standard"><text:s text:c="2"/>└ POLICY_PRESENT</text:p>
      <text:p text:style-name="Standard"><text:s text:c="4"/>PLAN_PRESENT</text:p>
      <text:p text:style-name="Standard"><text:s text:c="4"/>DIRECTIVE_CONTEXT_ABSENT</text:p>
      <text:p text:style-name="Standard"><text:s text:c="4"/>HABLA_ADAPTER_ABSENT</text:p>
      <text:p text:style-name="Standard"><text:s text:c="4"/>DIRECTIVE_GENERATOR_ABSENT</text:p>
      <text:p text:style-name="Standard"/>
      <text:p text:style-name="Standard">• Explored</text:p>
      <text:p text:style-name="Standard"><text:s text:c="2"/>└ List architecture-react-three-flask-socketio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Voy a probar los loaders con consultas reales del roadmap y de la política,</text:p>
      <text:p text:style-name="Standard"><text:s text:c="2"/>además de validar los caminos de error estructurado antes de darte el</text:p>
      <text:p text:style-name="Standard"><text:s text:c="2"/>veredicto final.</text:p>
      <text:p text:style-name="Standard"/>
      <text:p text:style-name="Standard">• Ran "/home/neurodriver/ferrari_env/bin/python" -m py_compile "/home/</text:p>
      <text:p text:style-name="Standard"><text:soft-page-break/><text:s text:c="2"/>│ neurodriver/BASE _METACOGNICION_COLOMBIA/vista_IA/</text:p>
      <text:p text:style-name="Standard"><text:s text:c="2"/>│ architecture-react-three-flask-socketio/orchestrator/policy_loader.py" "/</text:p>
      <text:p text:style-name="Standard"><text:s text:c="2"/>│ … +2 lines</text:p>
      <text:p text:style-name="Standard"><text:s text:c="2"/>└ (no output)</text:p>
      <text:p text:style-name="Standard"/>
      <text:p text:style-name="Standard">• Ran PYTHONPATH="/home/neurodriver/BASE _METACOGNICION_COLOMBIA/vista_IA/</text:p>
      <text:p text:style-name="Standard"><text:s text:c="2"/>│ architecture-react-three-flask-socketio" "/home/neurodriver/ferrari_env/</text:p>
      <text:p text:style-name="Standard"><text:s text:c="2"/>│ bin/python" - &lt;&lt;'PY'</text:p>
      <text:p text:style-name="Standard"><text:s text:c="2"/>│ … +16 lines</text:p>
      <text:p text:style-name="Standard"><text:s text:c="2"/>└ POLICY_ERROR {'code': 'missing_policy_file', 'message': 'Policy file does</text:p>
      <text:p text:style-name="Standard"><text:s text:c="4"/>not exist: /tmp/tmpiea9ajty/AGENTS.md', 'path': '/tmp/tmpiea9ajty/</text:p>
      <text:p text:style-name="Standard"><text:s text:c="4"/>AGENTS.md'}</text:p>
      <text:p text:style-name="Standard"><text:s text:c="4"/>PLAN_ERROR {'code': 'missing_plan_file', 'message': 'Plan file does not</text:p>
      <text:p text:style-name="Standard"><text:s text:c="4"/>exist: /tmp/tmpiea9ajty/PLANS.md', 'path': '/tmp/tmpiea9ajty/PLANS.md'}</text:p>
      <text:p text:style-name="Standard"/>
      <text:p text:style-name="Standard">• Ran PYTHONPATH="/home/neurodriver/BASE _METACOGNICION_COLOMBIA/vista_IA/</text:p>
      <text:p text:style-name="Standard"><text:s text:c="2"/>│ architecture-react-three-flask-socketio" "/home/neurodriver/ferrari_env/</text:p>
      <text:p text:style-name="Standard"><text:s text:c="2"/>│ bin/python" - &lt;&lt;'PY'</text:p>
      <text:p text:style-name="Standard"><text:s text:c="2"/>│ … +19 lines</text:p>
      <text:p text:style-name="Standard"><text:s text:c="2"/>└ POLICY_KEYS ['central_thesis', 'directive_policy', 'document',</text:p>
      <text:p text:style-name="Standard"><text:s text:c="4"/>'expected_project_structure', 'implementation_policy',</text:p>
      <text:p text:style-name="Standard"><text:s text:c="4"/>… +37 lines</text:p>
      <text:p text:style-name="Standard"><text:s text:c="4"/>texto decorativo.', 'Cada directiva generada para un worker debe persistirse</text:p>
      <text:p text:style-name="Standard"><text:s text:c="4"/>en disco para auditoría y reanudación.']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Context compacted</text:p>
      <text:p text:style-name="Standard"/>
      <text:p text:style-name="Standard">• Voy a revisar Sprint 6 en la raíz del repo, validar los loaders y confirmar si</text:p>
      <text:p text:style-name="Standard"><text:s text:c="2"/>quedó aprobado o si dejó huecos concretos.</text:p>
      <text:p text:style-name="Standard"/>
      <text:p text:style-name="Standard">• Explored</text:p>
      <text:p text:style-name="Standard"><text:s text:c="2"/>└ List orchestrator</text:p>
      <text:p text:style-name="Standard"><text:s text:c="4"/>Read policy_loader.py, plan_loader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vi los dos loaders en disco y no se salieron del alcance. Ahora voy a vali</text:p>
      <text:p text:style-name="Standard"><text:s text:c="2"/>dar comportamiento real: compilación, carga de AGENTS.md/PLANS.md, consulta de</text:p>
      <text:p text:style-name="Standard"><text:s text:c="2"/>sprint y fallos estructurados si faltan archivos.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orchestrator/</text:p>
      <text:p text:style-name="Standard"><text:s text:c="2"/>│ policy_loader.py" "/home/neurodriver/BASE _METACOGNICION_COLOMBIA/</text:p>
      <text:p text:style-name="Standard"><text:s text:c="2"/>│ … +2 lines</text:p>
      <text:p text:style-name="Standard"><text:s text:c="2"/>└ (no output)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oft-page-break/><text:s text:c="2"/>│ from tempfile import TemporaryDirectory</text:p>
      <text:p text:style-name="Standard"><text:s text:c="2"/>│ … +15 lines</text:p>
      <text:p text:style-name="Standard"><text:s text:c="2"/>└ policy_error {'code': 'missing_policy_file', 'message': 'Policy file does</text:p>
      <text:p text:style-name="Standard"><text:s text:c="4"/>not exist: /tmp/tmpu5q9zox5/AGENTS.md', 'path': '/tmp/tmpu5q9zox5/</text:p>
      <text:p text:style-name="Standard"><text:s text:c="4"/>AGENTS.md'}</text:p>
      <text:p text:style-name="Standard"><text:s text:c="4"/>plan_error {'code': 'missing_plan_file', 'message': 'Plan file does not</text:p>
      <text:p text:style-name="Standard"><text:s text:c="4"/>exist: /tmp/tmpu5q9zox5/PLANS.md', 'path': '/tmp/tmpu5q9zox5/PLANS.md'}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policy_loader import load_policy, get_policy_section</text:p>
      <text:p text:style-name="Standard"><text:s text:c="2"/>│ … +18 lines</text:p>
      <text:p text:style-name="Standard"><text:s text:c="2"/>└ policy_keys ['central_thesis', 'directive_policy', 'document',</text:p>
      <text:p text:style-name="Standard"><text:s text:c="4"/>'expected_project_structure', 'implementation_policy',</text:p>
      <text:p text:style-name="Standard"><text:s text:c="4"/>… +28 lines</text:p>
      <text:p text:style-name="Standard"><text:s text:c="4"/>smoke heurístico,', 'timeout por tarea,', 'consumo de directivas</text:p>
      <text:p text:style-name="Standard"><text:s text:c="4"/>generadas.', '`orchestrator/benchmark.py`']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carga básica pasó. Estoy mirando una cosa más fina en plan_loader: la lista</text:p>
      <text:p text:style-name="Standard"><text:s text:c="2"/>“fuera de alcance” trae elementos raros para Sprint 7, y quiero confirmar si</text:p>
      <text:p text:style-name="Standard"><text:s text:c="2"/>es un bug real de parsing o solo cómo está escrito PLANS.md.</text:p>
      <text:p text:style-name="Standard"/>
      <text:p text:style-name="Standard">• Explored</text:p>
      <text:p text:style-name="Standard"><text:s text:c="2"/>└ Read PLANS.m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parte rara de scope7 viene de cómo está escrito Sprint 9 en PLANS.md; no es</text:p>
      <text:p text:style-name="Standard"><text:s text:c="2"/>una fuga del parser. Voy a cerrar la auditoría comprobando también el caso</text:p>
      <text:p text:style-name="Standard"><text:s text:c="2"/>“archivo presente pero mal formado”, que era requisito del sprint.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tempfile import TemporaryDirectory</text:p>
      <text:p text:style-name="Standard"><text:s text:c="2"/>│ … +19 lines</text:p>
      <text:p text:style-name="Standard"><text:s text:c="2"/>└ bad_policy_error {'code': 'malformed_policy_file', 'message': 'Policy file</text:p>
      <text:p text:style-name="Standard"><text:s text:c="4"/>has no markdown sections', 'path': None}</text:p>
      <text:p text:style-name="Standard"><text:s text:c="4"/>bad_plan_error {'code': 'malformed_plan_file', 'message': 'Plan file has no</text:p>
      <text:p text:style-name="Standard"><text:s text:c="4"/>markdown sections', 'path': None}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plan_loader import load_plan</text:p>
      <text:p text:style-name="Standard"><text:s text:c="2"/>│ … +5 lines</text:p>
      <text:p text:style-name="Standard"><text:s text:c="2"/>└ modules ['orchestrator/benchmark.py', 'orchestrator/contracts.py',</text:p>
      <text:p text:style-name="Standard"><text:s text:c="4"/>'orchestrator/directive_context.py', 'orchestrator/directive_generator.py',</text:p>
      <text:p text:style-name="Standard"><text:s text:c="4"/>'orchestrator/executor.py'] count 14</text:p>
      <text:p text:style-name="Standard"><text:s text:c="4"/>phases ['1', '2', '3']</text:p>
      <text:p text:style-name="Standard"><text:soft-page-break/><text:s text:c="4"/>sprints ['1', '10', '2', '3', '4', '5', '6', '7', '8', '9']</text:p>
      <text:p text:style-name="Standard"/>
      <text:p text:style-name="Standard">• Explored</text:p>
      <text:p text:style-name="Standard"><text:s text:c="2"/>└ Search policy_loader|plan_loader in architecture-react-three-flask-socketio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encontré hallazgos bloqueantes. Doy Sprint 6 por aprobado.</text:p>
      <text:p text:style-name="Standard"/>
      <text:p text:style-name="Standard"><text:s text:c="2"/>Verifiqué policy_loader.py y plan_loader.py. Quedaron en la raíz correcta, no</text:p>
      <text:p text:style-name="Standard"><text:s text:c="2"/>se adelantó Sprint 7, y la carga real funciona sobre AGENTS.md y PLANS.md.</text:p>
      <text:p text:style-name="Standard"/>
      <text:p text:style-name="Standard"><text:s text:c="2"/>Validación real que corrí:</text:p>
      <text:p text:style-name="Standard"/>
      <text:p text:style-name="Standard"><text:s text:c="2"/>- py_compile de ambos loaders: pasó.</text:p>
      <text:p text:style-name="Standard"><text:s text:c="2"/>- load_policy() devolvió estructura útil, incluyendo runtime_hard_rules y</text:p>
      <text:p text:style-name="Standard"><text:s text:c="4"/>benchmarks oficiales.</text:p>
      <text:p text:style-name="Standard"><text:s text:c="2"/>- load_plan() devolvió fases, módulos y sprints.</text:p>
      <text:p text:style-name="Standard"><text:s text:c="2"/>- get_sprint(plan, 6) devolvió objetivo, entregables y aceptación correctos.</text:p>
      <text:p text:style-name="Standard"><text:s text:c="2"/>- get_next_sprint(..., completed_sprints=[1,2,3,4,5]) devolvió Sprint 6.</text:p>
      <text:p text:style-name="Standard"><text:s text:c="2"/>- sprint_scope(plan, 7) devolvió alcance útil para el siguiente tramo.</text:p>
      <text:p text:style-name="Standard"><text:s text:c="2"/>- Si faltan AGENTS.md o PLANS.md, falla con error estructurado.</text:p>
      <text:p text:style-name="Standard"><text:s text:c="2"/>- Si el archivo existe pero está malformado, también falla con error</text:p>
      <text:p text:style-name="Standard"><text:s text:c="4"/>estructurado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6; la validación</text:p>
      <text:p text:style-name="Standard"><text:s text:c="4"/>quedó bien por ejecución manual reproducible, pero no por suite dedicada.</text:p>
      <text:p text:style-name="Standard"/>
      <text:p text:style-name="Standard"><text:s text:c="2"/>Estado global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><text:s text:c="2"/>- Sprint 5: aprobado</text:p>
      <text:p text:style-name="Standard"><text:s text:c="2"/>- Sprint 6: aprobado</text:p>
      <text:p text:style-name="Standard"/>
      <text:p text:style-name="Standard"><text:s text:c="2"/>Si quieres, te doy ya el prompt blindado para Sprint 7.</text:p>
      <text:p text:style-name="Standard"/>
      <text:p text:style-name="Standard"/>
      <text:p text:style-name="Standard">› ok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><text:soft-page-break/></text:p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7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directive_context.py</text:p>
      <text:p text:style-name="Standard"><text:s text:c="2"/>- orchestrator/habla_adapter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8 o posteriores.</text:p>
      <text:p text:style-name="Standard"/>
      <text:p text:style-name="Standard"><text:s text:c="2"/>OBJETIVO FUNCIONAL DE SPRINT 7</text:p>
      <text:p text:style-name="Standard"><text:s text:c="2"/>Construir el contexto procedural de tarea y conectar HABLA BASIC como capa</text:p>
      <text:p text:style-name="Standard"><text:s text:c="2"/>reusable del control plane.</text:p>
      <text:p text:style-name="Standard"/>
      <text:p text:style-name="Standard"><text:s text:c="2"/>REQUISITOS FUNCIONALES</text:p>
      <text:p text:style-name="Standard"/>
      <text:p text:style-name="Standard"><text:s text:c="2"/>1. `orchestrator/directive_context.py` debe poder:</text:p>
      <text:p text:style-name="Standard"><text:s text:c="2"/>- reunir en una sola estructura:</text:p>
      <text:p text:style-name="Standard"><text:s text:c="4"/>- política cargada desde `policy_loader.py`</text:p>
      <text:p text:style-name="Standard"><text:s text:c="4"/>- plan cargado desde `plan_loader.py`</text:p>
      <text:p text:style-name="Standard"><text:s text:c="4"/>- estado del proyecto</text:p>
      <text:p text:style-name="Standard"><text:s text:c="4"/>- cola de tareas</text:p>
      <text:p text:style-name="Standard"><text:s text:c="4"/>- historial</text:p>
      <text:p text:style-name="Standard"><text:s text:c="4"/>- fallos</text:p>
      <text:p text:style-name="Standard"><text:s text:c="4"/>- checkpoint actual o más reciente</text:p>
      <text:p text:style-name="Standard"><text:s text:c="4"/>- tarea activa o siguiente tarea ejecutable</text:p>
      <text:p text:style-name="Standard"><text:s text:c="2"/>- producir un contexto estructurado, determinista y auditable</text:p>
      <text:p text:style-name="Standard"><text:s text:c="2"/>- dejar claro:</text:p>
      <text:p text:style-name="Standard"><text:s text:c="4"/>- qué tarea se está preparando</text:p>
      <text:p text:style-name="Standard"><text:s text:c="4"/>- en qué sprint o fase cae</text:p>
      <text:p text:style-name="Standard"><text:s text:c="4"/>- qué reglas duras aplican</text:p>
      <text:p text:style-name="Standard"><text:s text:c="4"/>- qué entregables y aceptación la gobiernan</text:p>
      <text:p text:style-name="Standard"><text:s text:c="4"/>- qué evidencia previa existe</text:p>
      <text:p text:style-name="Standard"><text:s text:c="4"/>- qué bloqueos o fallos vienen acumulados</text:p>
      <text:p text:style-name="Standard"/>
      <text:p text:style-name="Standard"><text:s text:c="2"/>2. `orchestrator/habla_adapter.py` debe poder:</text:p>
      <text:p text:style-name="Standard"><text:s text:c="2"/>- tomar ese contexto estructurado</text:p>
      <text:p text:style-name="Standard"><text:soft-page-break/><text:s text:c="2"/>- convertirlo en una guía procedural inspirada en HABLA BASIC</text:p>
      <text:p text:style-name="Standard"><text:s text:c="2"/>- no como texto decorativo, sino como estructura reusable para el generador de</text:p>
      <text:p text:style-name="Standard"><text:s text:c="2"/>directivas</text:p>
      <text:p text:style-name="Standard"><text:s text:c="2"/>- incorporar al menos componentes como:</text:p>
      <text:p text:style-name="Standard"><text:s text:c="4"/>- objetivo operativo actual</text:p>
      <text:p text:style-name="Standard"><text:s text:c="4"/>- restricciones activas</text:p>
      <text:p text:style-name="Standard"><text:s text:c="4"/>- evidencia requerida</text:p>
      <text:p text:style-name="Standard"><text:s text:c="4"/>- validación esperada</text:p>
      <text:p text:style-name="Standard"><text:s text:c="4"/>- checkpoint de partida</text:p>
      <text:p text:style-name="Standard"><text:s text:c="4"/>- criterio de cierre</text:p>
      <text:p text:style-name="Standard"><text:s text:c="4"/>- riesgo o bloqueo conocido</text:p>
      <text:p text:style-name="Standard"><text:s text:c="2"/>- devolver una estructura clara, no solo prose libre</text:p>
      <text:p text:style-name="Standard"/>
      <text:p text:style-name="Standard"><text:s text:c="2"/>3. Integración mínima entre ambos</text:p>
      <text:p text:style-name="Standard"><text:s text:c="2"/>- `directive_context.py` debe producir un objeto utilizable por</text:p>
      <text:p text:style-name="Standard"><text:s text:c="2"/>`habla_adapter.py`</text:p>
      <text:p text:style-name="Standard"><text:s text:c="2"/>- `habla_adapter.py` debe aceptar ese contexto y devolver una estructura</text:p>
      <text:p text:style-name="Standard"><text:s text:c="2"/>procedural estable</text:p>
      <text:p text:style-name="Standard"><text:s text:c="2"/>- dejar listo el camino para `directive_generator.py` sin implementarlo</text:p>
      <text:p text:style-name="Standard"><text:s text:c="2"/>todavía</text:p>
      <text:p text:style-name="Standard"/>
      <text:p text:style-name="Standard"><text:s text:c="2"/>4. Consulta operativa mínima</text:p>
      <text:p text:style-name="Standard"><text:s text:c="2"/>Debe ser posible consultar al menos:</text:p>
      <text:p text:style-name="Standard"><text:s text:c="2"/>- tarea activa o siguiente tarea lista</text:p>
      <text:p text:style-name="Standard"><text:s text:c="2"/>- sprint asociado</text:p>
      <text:p text:style-name="Standard"><text:s text:c="2"/>- entregables del sprint</text:p>
      <text:p text:style-name="Standard"><text:s text:c="2"/>- reglas duras relevantes</text:p>
      <text:p text:style-name="Standard"><text:s text:c="2"/>- evidencia previa relevante</text:p>
      <text:p text:style-name="Standard"><text:s text:c="2"/>- guía HABLA derivada de esa situación</text:p>
      <text:p text:style-name="Standard"/>
      <text:p text:style-name="Standard"><text:s text:c="2"/>5. Compatibilidad</text:p>
      <text:p text:style-name="Standard"><text:s text:c="2"/>- usar `policy_loader.py`</text:p>
      <text:p text:style-name="Standard"><text:s text:c="2"/>- usar `plan_loader.py`</text:p>
      <text:p text:style-name="Standard"><text:s text:c="2"/>- usar estado persistido del runtime</text:p>
      <text:p text:style-name="Standard"><text:s text:c="2"/>- ser compatible con planner, task_queue, executor, validator y recovery</text:p>
      <text:p text:style-name="Standard"><text:s text:c="2"/>- no migrar todavía `agent_runtime.py`</text:p>
      <text:p text:style-name="Standard"/>
      <text:p text:style-name="Standard"><text:s text:c="2"/>DISENO PRAGMATICO</text:p>
      <text:p text:style-name="Standard"><text:s text:c="2"/>- no intentes resolver ya el prompt final del worker</text:p>
      <text:p text:style-name="Standard"><text:s text:c="2"/>- no conviertas HABLA en un ensayo largo</text:p>
      <text:p text:style-name="Standard"><text:s text:c="2"/>- usa estructuras pequenas, explicitas y reutilizables</text:p>
      <text:p text:style-name="Standard"><text:s text:c="2"/>- si necesitas helpers, mantenlos acotados</text:p>
      <text:p text:style-name="Standard"><text:s text:c="2"/>- el contexto debe servir para control plane, no solo para mostrar texto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7 coherente, pero no implementes todavia:</text:p>
      <text:p text:style-name="Standard"><text:s text:c="2"/>- orchestrator/directive_generator.py</text:p>
      <text:p text:style-name="Standard"><text:s text:c="2"/>- orchestrator/benchmark.py</text:p>
      <text:p text:style-name="Standard"><text:s text:c="2"/>- integracion final con agent_runtime.py</text:p>
      <text:p text:style-name="Standard"/>
      <text:p text:style-name="Standard"><text:s text:c="2"/>RESTRICCIONES DURAS</text:p>
      <text:p text:style-name="Standard"><text:soft-page-break/><text:s text:c="2"/>- no implementar Sprint 8 ni posteriores</text:p>
      <text:p text:style-name="Standard"><text:s text:c="2"/>- no crear directive_generator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7 queda correcto si:</text:p>
      <text:p text:style-name="Standard"><text:s text:c="2"/>- existe `orchestrator/directive_context.py`</text:p>
      <text:p text:style-name="Standard"><text:s text:c="2"/>- existe `orchestrator/habla_adapter.py`</text:p>
      <text:p text:style-name="Standard"><text:s text:c="2"/>- el sistema puede reunir política, plan, estado, cola, historial, fallos y</text:p>
      <text:p text:style-name="Standard"><text:s text:c="2"/>checkpoint</text:p>
      <text:p text:style-name="Standard"><text:s text:c="2"/>- HABLA BASIC queda integrado como estructura procedural reusable</text:p>
      <text:p text:style-name="Standard"><text:s text:c="2"/>- queda preparado el camino para Sprint 8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`directive_context.py`</text:p>
      <text:p text:style-name="Standard"><text:s text:c="2"/>- puede construir contexto con datos reales del runtime</text:p>
      <text:p text:style-name="Standard"><text:s text:c="2"/>- identifica tarea activa o siguiente tarea lista</text:p>
      <text:p text:style-name="Standard"><text:s text:c="2"/>- identifica sprint, entregables y aceptación asociados</text:p>
      <text:p text:style-name="Standard"/>
      <text:p text:style-name="Standard"><text:s text:c="2"/>2. `habla_adapter.py`</text:p>
      <text:p text:style-name="Standard"><text:s text:c="2"/>- transforma ese contexto en estructura procedural clara</text:p>
      <text:p text:style-name="Standard"><text:s text:c="2"/>- incluye restricciones, evidencia requerida, validación, checkpoint y</text:p>
      <text:p text:style-name="Standard"><text:s text:c="2"/>criterio de cierre</text:p>
      <text:p text:style-name="Standard"/>
      <text:p text:style-name="Standard"><text:s text:c="2"/>3. Robustez mínima</text:p>
      <text:p text:style-name="Standard"><text:s text:c="2"/>- si faltan piezas del runtime, falla de forma clara o degrada de forma</text:p>
      <text:p text:style-name="Standard"><text:s text:c="2"/>estructurada</text:p>
      <text:p text:style-name="Standard"><text:s text:c="2"/>- no depende de memoria implícita</text:p>
      <text:p text:style-name="Standard"/>
      <text:p text:style-name="Standard"><text:s text:c="2"/>4. Compatibilidad</text:p>
      <text:p text:style-name="Standard"><text:s text:c="2"/>- la salida deja listo el camino para que Sprint 8 genere directivas</text:p>
      <text:p text:style-name="Standard"><text:s text:c="2"/>operativas reales</text:p>
      <text:p text:style-name="Standard"/>
      <text:p text:style-name="Standard"><text:s text:c="2"/>SI AGREGAS TESTS</text:p>
      <text:p text:style-name="Standard"><text:s text:c="2"/>Mantenlos pequenos y enfocados solo en Sprint 7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8</text:p>
      <text:p text:style-name="Standard"/>
      <text:p text:style-name="Standard"/>
      <text:p text:style-name="Standard">› ya termino</text:p>
      <text:p text:style-name="Standard"/>
      <text:p text:style-name="Standard"><text:soft-page-break/></text:p>
      <text:p text:style-name="Standard">• Voy a auditar Sprint 7 en la raíz del repo, validar contexto real del runtime</text:p>
      <text:p text:style-name="Standard"><text:s text:c="2"/>y comprobar que HABLA quedó como estructura reusable, no como texto suelto.</text:p>
      <text:p text:style-name="Standard"/>
      <text:p text:style-name="Standard">• Explored</text:p>
      <text:p text:style-name="Standard"><text:s text:c="2"/>└ Read directive_context.py, habla_adapter.py</text:p>
      <text:p text:style-name="Standard"><text:s text:c="4"/>List orchestrator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vi la forma general. Ahora voy a revisar el resto de directive_context.py y</text:p>
      <text:p text:style-name="Standard"><text:s text:c="2"/>luego lo voy a probar con runtime real y con un runtime degradado para ver si</text:p>
      <text:p text:style-name="Standard"><text:s text:c="2"/>cumple lo que prometió el sprint.</text:p>
      <text:p text:style-name="Standard"/>
      <text:p text:style-name="Standard">• Explored</text:p>
      <text:p text:style-name="Standard"><text:s text:c="2"/>└ Read state_store.py, task_queue.py, directive_context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Voy a probar el contexto con el runtime real y también con un runtime</text:p>
      <text:p text:style-name="Standard"><text:s text:c="2"/>sintético para forzar una tarea activa, historial, fallo y checkpoint. Así</text:p>
      <text:p text:style-name="Standard"><text:s text:c="2"/>puedo ver si Sprint 7 sirve de verdad para Sprint 8 o solo arma un diccionario</text:p>
      <text:p text:style-name="Standard"><text:s text:c="2"/>bonito.</text:p>
      <text:p text:style-name="Standard"/>
      <text:p text:style-name="Standard">• Explored</text:p>
      <text:p text:style-name="Standard"><text:s text:c="2"/>└ Read project_state.json, failures.jsonl, task_queue.json, task_history.jsonl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orchestrator/</text:p>
      <text:p text:style-name="Standard"><text:s text:c="2"/>│ directive_context.py" "/home/neurodriver/BASE _METACOGNICION_COLOMBIA/</text:p>
      <text:p text:style-name="Standard"><text:s text:c="2"/>│ … +2 lines</text:p>
      <text:p text:style-name="Standard"><text:s text:c="2"/>└ (no output)</text:p>
      <text:p text:style-name="Standard"/>
      <text:p text:style-name="Standard">• Explored</text:p>
      <text:p text:style-name="Standard"><text:s text:c="2"/>└ List checkpoints</text:p>
      <text:p text:style-name="Standard"><text:s text:c="4"/>Read contracts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Voy a montar un runtime temporal con una tarea realista, checkpoint, historial</text:p>
      <text:p text:style-name="Standard"><text:s text:c="2"/>y fallo previo. Eso me deja ver si el contexto realmente encadena todo y si</text:p>
      <text:p text:style-name="Standard"><text:s text:c="2"/>HABLA recoge lo importante para la siguiente capa.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pathlib import Path</text:p>
      <text:p text:style-name="Standard"><text:s text:c="2"/>│ … +130 lines</text:p>
      <text:p text:style-name="Standard"><text:s text:c="2"/>└ Traceback (most recent call last):</text:p>
      <text:p text:style-name="Standard"><text:s text:c="6"/>File "&lt;stdin&gt;", line 64, in &lt;module&gt;</text:p>
      <text:p text:style-name="Standard"><text:soft-page-break/><text:s text:c="4"/>… +10 lines</text:p>
      <text:p text:style-name="Standard"><text:s text:c="4"/>orchestrator.contracts.ContractError: Task SPRINT7-CONTEXT has unknown</text:p>
      <text:p text:style-name="Standard"><text:s text:c="4"/>dependencies: ['SPRINT6-LOADERS']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ncontré una limitación del contrato de cola, no del sprint: la cola exige que</text:p>
      <text:p text:style-name="Standard"><text:s text:c="2"/>toda dependencia exista explícitamente en task_queue.json. Voy a repetir la</text:p>
      <text:p text:style-name="Standard"><text:s text:c="2"/>prueba con una tarea previa completada dentro de la cola para validar</text:p>
      <text:p text:style-name="Standard"><text:s text:c="2"/>directive_context y habla_adapter en un escenario contractual correcto.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pathlib import Path</text:p>
      <text:p text:style-name="Standard"><text:s text:c="2"/>│ … +145 lines</text:p>
      <text:p text:style-name="Standard"><text:s text:c="2"/>└ context_degraded False</text:p>
      <text:p text:style-name="Standard"><text:s text:c="4"/>active_task SPRINT7-CONTEXT</text:p>
      <text:p text:style-name="Standard"><text:s text:c="4"/>… +16 lines</text:p>
      <text:p text:style-name="Standard"><text:s text:c="4"/>SPRINT7-CONTEXT', 'Prior failure for active task: validation failed once']</text:p>
      <text:p text:style-name="Standard"><text:s text:c="4"/>directive_generator_ready True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escenario sintético fuerte sí pasó. Voy a hacer dos comprobaciones más:</text:p>
      <text:p text:style-name="Standard"><text:s text:c="2"/>degradación controlada cuando faltan piezas del runtime y modo strict, para</text:p>
      <text:p text:style-name="Standard"><text:s text:c="2"/>ver si falla limpio en vez de esconder huecos.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directive_context import build_directive_context</text:p>
      <text:p text:style-name="Standard"><text:s text:c="2"/>│ … +9 lines</text:p>
      <text:p text:style-name="Standard"><text:s text:c="2"/>└ real_degraded False</text:p>
      <text:p text:style-name="Standard"><text:s text:c="4"/>real_active_task None</text:p>
      <text:p text:style-name="Standard"><text:s text:c="4"/>real_ready_task_ids []</text:p>
      <text:p text:style-name="Standard"><text:s text:c="4"/>real_risks ['No active or ready task is available from persisted queue.',</text:p>
      <text:p text:style-name="Standard"><text:s text:c="4"/>'No active task selected; no task evidence can be inspected.']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pathlib import Path</text:p>
      <text:p text:style-name="Standard"><text:s text:c="2"/>│ … +31 lines</text:p>
      <text:p text:style-name="Standard"><text:s text:c="2"/>└ degraded True</text:p>
      <text:p text:style-name="Standard"><text:s text:c="4"/>runtime_error_components ['project_state', 'task_queue']</text:p>
      <text:p text:style-name="Standard"><text:s text:c="4"/>… +7 lines</text:p>
      <text:p text:style-name="Standard"><text:s text:c="4"/>file: /tmp/tmp5ablby3t/repo/runtime/project_state.json', 'component':</text:p>
      <text:p text:style-name="Standard"><text:s text:c="4"/>'project_state', 'path': None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<text:soft-page-break/>• Quiero mirar un detalle fino antes de cerrar: cómo resuelve el checkpoint</text:p>
      <text:p text:style-name="Standard"><text:s text:c="2"/>cuando no hay tarea activa. Si ahí mete un checkpoint ajeno sin contexto, eso</text:p>
      <text:p text:style-name="Standard"><text:s text:c="2"/>sí sería un bug de integración para Sprint 8.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directive_context import build_directive_context</text:p>
      <text:p text:style-name="Standard"><text:s text:c="2"/>│ … +3 lines</text:p>
      <text:p text:style-name="Standard"><text:s text:c="2"/>└ {'checkpoint_key': 'sprint5-validation-dc5c81bd40dc', 'source': 'runtime/</text:p>
      <text:p text:style-name="Standard"><text:s text:c="4"/>checkpoints', 'path': '/home/neurodriver/BASE _METACOGNICION_COLOMBIA/</text:p>
      <text:p text:style-name="Standard"><text:s text:c="4"/>… +17 lines</text:p>
      <text:p text:style-name="Standard"><text:s text:c="4"/>artifacts/recovery-a.json\'] if not Path(p).exists()]; assert not missing,</text:p>
      <text:p text:style-name="Standard"><text:s text:c="4"/>missing"']}}}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encontré hallazgos bloqueantes. Doy Sprint 7 por aprobado.</text:p>
      <text:p text:style-name="Standard"/>
      <text:p text:style-name="Standard"><text:s text:c="2"/>Verifiqué directive_context.py y habla_adapter.py. Quedaron en la raíz</text:p>
      <text:p text:style-name="Standard"><text:s text:c="2"/>correcta, no se adelantó Sprint 8, y el flujo real sí arma contexto útil para</text:p>
      <text:p text:style-name="Standard"><text:s text:c="2"/>la siguiente capa.</text:p>
      <text:p text:style-name="Standard"/>
      <text:p text:style-name="Standard"><text:s text:c="2"/>Validación real que corrí:</text:p>
      <text:p text:style-name="Standard"/>
      <text:p text:style-name="Standard"><text:s text:c="2"/>- py_compile de ambos archivos: pasó.</text:p>
      <text:p text:style-name="Standard"><text:s text:c="2"/>- En un runtime sintético con tarea activa, checkpoint, historial y fallo</text:p>
      <text:p text:style-name="Standard"><text:s text:c="4"/>previo:</text:p>
      <text:p text:style-name="Standard"><text:s text:c="6"/>- seleccionó la tarea correcta,</text:p>
      <text:p text:style-name="Standard"><text:s text:c="6"/>- infirió Sprint 7,</text:p>
      <text:p text:style-name="Standard"><text:s text:c="6"/>- reunió política, plan, cola, historial, fallos y checkpoint,</text:p>
      <text:p text:style-name="Standard"><text:s text:c="6"/>- marcó la tarea futura como bloqueada por dependencia,</text:p>
      <text:p text:style-name="Standard"><text:s text:c="6"/>- y habla_adapter.py devolvió una guía procedural estable con objetivo,</text:p>
      <text:p text:style-name="Standard"><text:s text:c="8"/>restricciones, evidencia, validación, checkpoint y riesgos.</text:p>
      <text:p text:style-name="Standard"><text:s text:c="2"/>- En un runtime degradado:</text:p>
      <text:p text:style-name="Standard"><text:s text:c="6"/>- strict=False devolvió degradación estructurada con runtime_errors,</text:p>
      <text:p text:style-name="Standard"><text:s text:c="6"/>- strict=True falló limpio con DirectiveContextError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7; la validación</text:p>
      <text:p text:style-name="Standard"><text:s text:c="4"/>quedó bien por ejecución manual reproducible, no por suite dedicada.</text:p>
      <text:p text:style-name="Standard"><text:s text:c="2"/>- riesgo residual: si no hay tarea activa ni checkpoint asociado, el contexto</text:p>
      <text:p text:style-name="Standard"><text:s text:c="4"/>cae al checkpoint más reciente del runtime. No rompe este sprint, pero en</text:p>
      <text:p text:style-name="Standard"><text:s text:c="4"/>Sprint 8/9 conviene acotarlo mejor para no arrastrar contexto viejo a una</text:p>
      <text:p text:style-name="Standard"><text:s text:c="4"/>directiva nueva.</text:p>
      <text:p text:style-name="Standard"/>
      <text:p text:style-name="Standard"><text:s text:c="2"/>Estado global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oft-page-break/><text:s text:c="2"/>- Sprint 4: aprobado</text:p>
      <text:p text:style-name="Standard"><text:s text:c="2"/>- Sprint 5: aprobado</text:p>
      <text:p text:style-name="Standard"><text:s text:c="2"/>- Sprint 6: aprobado</text:p>
      <text:p text:style-name="Standard"><text:s text:c="2"/>- Sprint 7: aprobado</text:p>
      <text:p text:style-name="Standard"/>
      <text:p text:style-name="Standard"><text:s text:c="2"/>Si quieres, te doy ya el prompt blindado para Sprint 8.</text:p>
      <text:p text:style-name="Standard"/>
      <text:p text:style-name="Standard"/>
      <text:p text:style-name="Standard">› so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8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directive_generator.py</text:p>
      <text:p text:style-name="Standard"><text:s text:c="2"/>- runtime/directives/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9 o posteriores.</text:p>
      <text:p text:style-name="Standard"/>
      <text:p text:style-name="Standard"><text:s text:c="2"/>OBJETIVO FUNCIONAL DE SPRINT 8</text:p>
      <text:p text:style-name="Standard"><text:s text:c="2"/>Generar directivas operativas por tarea a partir de política, plan, estado,</text:p>
      <text:p text:style-name="Standard"><text:s text:c="2"/>contexto y HABLA BASIC, y persistirlas en disco.</text:p>
      <text:p text:style-name="Standard"/>
      <text:p text:style-name="Standard"><text:s text:c="2"/>REQUISITOS FUNCIONALES</text:p>
      <text:p text:style-name="Standard"/>
      <text:p text:style-name="Standard"><text:s text:c="2"/>1. `orchestrator/directive_generator.py` debe poder:</text:p>
      <text:p text:style-name="Standard"><text:s text:c="2"/>- recibir un contexto de `directive_context.py`</text:p>
      <text:p text:style-name="Standard"><text:s text:c="2"/>- recibir la estructura procedural de `habla_adapter.py`</text:p>
      <text:p text:style-name="Standard"><text:s text:c="2"/>- construir una directiva operativa clara para el worker de la tarea actual</text:p>
      <text:p text:style-name="Standard"><text:soft-page-break/><text:s text:c="2"/>- no depender de prompts manuales permanentes</text:p>
      <text:p text:style-name="Standard"><text:s text:c="2"/>- producir una salida determinista y auditable</text:p>
      <text:p text:style-name="Standard"/>
      <text:p text:style-name="Standard"><text:s text:c="2"/>2. La directiva generada debe incorporar como minimo:</text:p>
      <text:p text:style-name="Standard"><text:s text:c="2"/>- identidad de la tarea</text:p>
      <text:p text:style-name="Standard"><text:s text:c="2"/>- objetivo operativo actual</text:p>
      <text:p text:style-name="Standard"><text:s text:c="2"/>- restricciones activas</text:p>
      <text:p text:style-name="Standard"><text:s text:c="2"/>- alcance controlado del sprint</text:p>
      <text:p text:style-name="Standard"><text:s text:c="2"/>- evidencia requerida</text:p>
      <text:p text:style-name="Standard"><text:s text:c="2"/>- validacion esperada</text:p>
      <text:p text:style-name="Standard"><text:s text:c="2"/>- checkpoint de partida</text:p>
      <text:p text:style-name="Standard"><text:s text:c="2"/>- riesgos o bloqueos conocidos</text:p>
      <text:p text:style-name="Standard"><text:s text:c="2"/>- criterio de cierre</text:p>
      <text:p text:style-name="Standard"><text:s text:c="2"/>- ruta obligatoria del repositorio</text:p>
      <text:p text:style-name="Standard"><text:s text:c="2"/>- prohibiciones de ruta</text:p>
      <text:p text:style-name="Standard"><text:s text:c="2"/>- entregables exactos del sprint actual</text:p>
      <text:p text:style-name="Standard"><text:s text:c="2"/>- fuera de alcance relevante</text:p>
      <text:p text:style-name="Standard"/>
      <text:p text:style-name="Standard"><text:s text:c="2"/>3. Persistencia obligatoria</text:p>
      <text:p text:style-name="Standard"><text:s text:c="2"/>Debes persistir la directiva generada en disco dentro de:</text:p>
      <text:p text:style-name="Standard"><text:s text:c="2"/>- `runtime/directives/`</text:p>
      <text:p text:style-name="Standard"/>
      <text:p text:style-name="Standard"><text:s text:c="2"/>La persistencia debe dejar al menos:</text:p>
      <text:p text:style-name="Standard"><text:s text:c="2"/>- una representacion estructurada de la directiva</text:p>
      <text:p text:style-name="Standard"><text:s text:c="2"/>- un artefacto facilmente auditable</text:p>
      <text:p text:style-name="Standard"><text:s text:c="2"/>- trazabilidad de:</text:p>
      <text:p text:style-name="Standard"><text:s text:c="4"/>- task_id</text:p>
      <text:p text:style-name="Standard"><text:s text:c="4"/>- sprint</text:p>
      <text:p text:style-name="Standard"><text:s text:c="4"/>- timestamp</text:p>
      <text:p text:style-name="Standard"><text:s text:c="4"/>- fuente del contexto o checkpoint si aplica</text:p>
      <text:p text:style-name="Standard"/>
      <text:p text:style-name="Standard"><text:s text:c="2"/>4. Diseño de salida</text:p>
      <text:p text:style-name="Standard"><text:s text:c="2"/>La directiva debe servir para un worker real.</text:p>
      <text:p text:style-name="Standard"><text:s text:c="2"/>Puede tener:</text:p>
      <text:p text:style-name="Standard"><text:s text:c="2"/>- forma estructurada principal para máquina</text:p>
      <text:p text:style-name="Standard"><text:s text:c="2"/>- y opcionalmente una representación textual derivada</text:p>
      <text:p text:style-name="Standard"><text:s text:c="2"/>Pero la parte estructurada es obligatoria.</text:p>
      <text:p text:style-name="Standard"/>
      <text:p text:style-name="Standard"><text:s text:c="2"/>5. Debe existir una API mínima util para el control plane</text:p>
      <text:p text:style-name="Standard"><text:s text:c="2"/>Ejemplos aceptables:</text:p>
      <text:p text:style-name="Standard"><text:s text:c="2"/>- `generate_directive(...)`</text:p>
      <text:p text:style-name="Standard"><text:s text:c="2"/>- `persist_directive(...)`</text:p>
      <text:p text:style-name="Standard"><text:s text:c="2"/>- `load_latest_directive(...)`</text:p>
      <text:p text:style-name="Standard"><text:s text:c="2"/>- `render_worker_instruction(...)`</text:p>
      <text:p text:style-name="Standard"/>
      <text:p text:style-name="Standard"><text:s text:c="2"/>6. Robustez mínima</text:p>
      <text:p text:style-name="Standard"><text:s text:c="2"/>- si no hay tarea activa, fallar de forma clara o degradar estructuradamente</text:p>
      <text:p text:style-name="Standard"><text:s text:c="2"/>- no inventar directivas para tareas inexistentes</text:p>
      <text:p text:style-name="Standard"><text:s text:c="2"/>- no depender de memoria implícita</text:p>
      <text:p text:style-name="Standard"><text:s text:c="2"/>- no escribir fuera de `runtime/directives/`</text:p>
      <text:p text:style-name="Standard"/>
      <text:p text:style-name="Standard"><text:s text:c="2"/>7. Compatibilidad</text:p>
      <text:p text:style-name="Standard"><text:soft-page-break/><text:s text:c="2"/>- usar `policy_loader.py`</text:p>
      <text:p text:style-name="Standard"><text:s text:c="2"/>- usar `plan_loader.py`</text:p>
      <text:p text:style-name="Standard"><text:s text:c="2"/>- usar `directive_context.py`</text:p>
      <text:p text:style-name="Standard"><text:s text:c="2"/>- usar `habla_adapter.py`</text:p>
      <text:p text:style-name="Standard"><text:s text:c="2"/>- preparar el camino para Sprint 9</text:p>
      <text:p text:style-name="Standard"><text:s text:c="2"/>- no integrar todavía de lleno con `agent_runtime.py`</text:p>
      <text:p text:style-name="Standard"/>
      <text:p text:style-name="Standard"><text:s text:c="2"/>DISENO PRAGMATICO</text:p>
      <text:p text:style-name="Standard"><text:s text:c="2"/>- no intentes todavía toda la integración con el runtime viejo</text:p>
      <text:p text:style-name="Standard"><text:s text:c="2"/>- no conviertas la directiva en un prompt kilométrico</text:p>
      <text:p text:style-name="Standard"><text:s text:c="2"/>- mantenla clara, fuerte y operativa</text:p>
      <text:p text:style-name="Standard"><text:s text:c="2"/>- la salida debe parecer una orden ejecutable por tarea, no un ensayo</text:p>
      <text:p text:style-name="Standard"><text:s text:c="2"/>- si generas texto final para worker, debe salir del contexto estructurado, no</text:p>
      <text:p text:style-name="Standard"><text:s text:c="2"/>de improvisación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8 coherente, pero no implementes todavia:</text:p>
      <text:p text:style-name="Standard"><text:s text:c="2"/>- integracion completa con agent_runtime.py</text:p>
      <text:p text:style-name="Standard"><text:s text:c="2"/>- orchestrator/benchmark.py</text:p>
      <text:p text:style-name="Standard"/>
      <text:p text:style-name="Standard"><text:s text:c="2"/>RESTRICCIONES DURAS</text:p>
      <text:p text:style-name="Standard"><text:s text:c="2"/>- no implementar Sprint 9 ni posteriores</text:p>
      <text:p text:style-name="Standard"><text:s text:c="2"/>- no crear benchmark.py</text:p>
      <text:p text:style-name="Standard"><text:s text:c="2"/>- no tocar agent_runtime.py salvo ajuste minimo inevitable y claramente</text:p>
      <text:p text:style-name="Standard"><text:s text:c="2"/>justificado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8 queda correcto si:</text:p>
      <text:p text:style-name="Standard"><text:s text:c="2"/>- existe `orchestrator/directive_generator.py`</text:p>
      <text:p text:style-name="Standard"><text:s text:c="2"/>- existe `runtime/directives/`</text:p>
      <text:p text:style-name="Standard"><text:s text:c="2"/>- el sistema puede generar una directiva por tarea a partir de contexto +</text:p>
      <text:p text:style-name="Standard"><text:s text:c="2"/>HABLA</text:p>
      <text:p text:style-name="Standard"><text:s text:c="2"/>- la directiva queda persistida y auditable</text:p>
      <text:p text:style-name="Standard"><text:s text:c="2"/>- queda preparado el camino para Sprint 9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Generación</text:p>
      <text:p text:style-name="Standard"><text:s text:c="2"/>- una tarea activa real o sintética puede producir una directiva válida</text:p>
      <text:p text:style-name="Standard"/>
      <text:p text:style-name="Standard"><text:s text:c="2"/>2. Persistencia</text:p>
      <text:p text:style-name="Standard"><text:s text:c="2"/>- la directiva queda escrita en `runtime/directives/`</text:p>
      <text:p text:style-name="Standard"><text:s text:c="2"/>- se puede identificar por task_id o timestamp</text:p>
      <text:p text:style-name="Standard"><text:s text:c="2"/>- se puede volver a cargar</text:p>
      <text:p text:style-name="Standard"/>
      <text:p text:style-name="Standard"><text:s text:c="2"/>3. Contenido mínimo</text:p>
      <text:p text:style-name="Standard"><text:s text:c="2"/>- la directiva contiene restricciones, evidencia, validación, checkpoint y</text:p>
      <text:p text:style-name="Standard"><text:soft-page-break/><text:s text:c="2"/>cierre</text:p>
      <text:p text:style-name="Standard"><text:s text:c="2"/>- la directiva contiene ruta obligatoria y rutas prohibidas</text:p>
      <text:p text:style-name="Standard"><text:s text:c="2"/>- la directiva refleja el sprint correcto</text:p>
      <text:p text:style-name="Standard"/>
      <text:p text:style-name="Standard"><text:s text:c="2"/>4. Robustez</text:p>
      <text:p text:style-name="Standard"><text:s text:c="2"/>- si no hay tarea activa, no inventa una directiva falsa</text:p>
      <text:p text:style-name="Standard"><text:s text:c="2"/>- el fallo o degradación quedan claros</text:p>
      <text:p text:style-name="Standard"/>
      <text:p text:style-name="Standard"><text:s text:c="2"/>SI AGREGAS TESTS</text:p>
      <text:p text:style-name="Standard"><text:s text:c="2"/>Mantenlos pequenos y enfocados solo en Sprint 8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9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auditar Sprint 8: revisar el generador, comprobar que persiste</text:p>
      <text:p text:style-name="Standard"><text:s text:c="2"/>directivas reales en runtime/directives/ y validar que no invente una tarea si</text:p>
      <text:p text:style-name="Standard"><text:s text:c="2"/>el contexto no la tiene.</text:p>
      <text:p text:style-name="Standard"/>
      <text:p text:style-name="Standard">• Explored</text:p>
      <text:p text:style-name="Standard"><text:s text:c="2"/>└ List orchestrator</text:p>
      <text:p text:style-name="Standard"><text:s text:c="4"/>List directives</text:p>
      <text:p text:style-name="Standard"><text:s text:c="4"/>Read directive_generator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generador y los artefactos existen. Ahora voy a revisar el resto del</text:p>
      <text:p text:style-name="Standard"><text:s text:c="2"/>archivo y luego lo voy a probar con casos reales: generación, persistencia,</text:p>
      <text:p text:style-name="Standard"><text:s text:c="2"/>recarga y fallo limpio sin tarea activa.</text:p>
      <text:p text:style-name="Standard"/>
      <text:p text:style-name="Standard">• Explored</text:p>
      <text:p text:style-name="Standard"><text:s text:c="2"/>└ Read TASK-S8-001-20260512T215150Z-9052329de3b6.json, directive_generator.py,</text:p>
      <text:p text:style-name="Standard"><text:s text:c="9"/>TASK-S8-001-20260512T215150Z-9052329de3b6.m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persistencia y la forma general se ven bien. Ahora voy a ejecutar pruebas</text:p>
      <text:p text:style-name="Standard"><text:s text:c="2"/>directas del API: generar con contexto real/sintético, cargar la última</text:p>
      <text:p text:style-name="Standard"><text:s text:c="2"/>directiva y confirmar que sin tarea activa falle limpio.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orchestrator/</text:p>
      <text:p text:style-name="Standard"><text:s text:c="2"/>│ directive_generator.py"</text:p>
      <text:p text:style-name="Standard"><text:soft-page-break/><text:s text:c="2"/>└ (no output)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directive_context import build_directive_context</text:p>
      <text:p text:style-name="Standard"><text:s text:c="2"/>│ … +11 lines</text:p>
      <text:p text:style-name="Standard"><text:s text:c="2"/>└ {'code': 'missing_active_task', 'message': 'Cannot generate a directive</text:p>
      <text:p text:style-name="Standard"><text:s text:c="4"/>without an active or ready task.', 'task_id': None, 'path': None}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pathlib import Path</text:p>
      <text:p text:style-name="Standard"><text:s text:c="2"/>│ … +87 lines</text:p>
      <text:p text:style-name="Standard"><text:s text:c="2"/>└ task_id TASK-S8-TEST</text:p>
      <text:p text:style-name="Standard"><text:s text:c="4"/>sprint 8</text:p>
      <text:p text:style-name="Standard"><text:s text:c="4"/>… +4 lines</text:p>
      <text:p text:style-name="Standard"><text:s text:c="4"/>contains_forbidden_paths True</text:p>
      <text:p text:style-name="Standard"><text:s text:c="4"/>contains_checkpoint s8-ctx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encontré hallazgos bloqueantes. Doy Sprint 8 por aprobado.</text:p>
      <text:p text:style-name="Standard"/>
      <text:p text:style-name="Standard"><text:s text:c="2"/>Verifiqué directive_generator.py y la persistencia real en runtime/directives.</text:p>
      <text:p text:style-name="Standard"><text:s text:c="2"/>También revisé los artefactos generados JSON y Markdown.</text:p>
      <text:p text:style-name="Standard"/>
      <text:p text:style-name="Standard"><text:s text:c="2"/>Validación real que corrí:</text:p>
      <text:p text:style-name="Standard"/>
      <text:p text:style-name="Standard"><text:s text:c="2"/>- py_compile del generador: pasó.</text:p>
      <text:p text:style-name="Standard"><text:s text:c="2"/>- En un runtime sintético con tarea activa, generó directiva válida para TASK-</text:p>
      <text:p text:style-name="Standard"><text:s text:c="4"/>S8-TEST.</text:p>
      <text:p text:style-name="Standard"><text:s text:c="2"/>- La persistencia escribió .json y .md dentro de runtime/directives/.</text:p>
      <text:p text:style-name="Standard"><text:s text:c="2"/>- load_latest_directive() recargó correctamente la directiva persistida.</text:p>
      <text:p text:style-name="Standard"><text:s text:c="2"/>- La directiva contiene root obligatorio, rutas prohibidas, sprint correcto,</text:p>
      <text:p text:style-name="Standard"><text:s text:c="4"/>evidencia, validación, checkpoint y cierre.</text:p>
      <text:p text:style-name="Standard"><text:s text:c="2"/>- En el runtime real sin tarea activa, generate_directive() falló limpio con</text:p>
      <text:p text:style-name="Standard"><text:s text:c="4"/>missing_active_task; no inventa una directiva falsa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8; la validación</text:p>
      <text:p text:style-name="Standard"><text:s text:c="4"/>quedó bien por ejecución manual reproducible, no por suite dedicada.</text:p>
      <text:p text:style-name="Standard"/>
      <text:p text:style-name="Standard"><text:s text:c="2"/>Estado global:</text:p>
      <text:p text:style-name="Standard"/>
      <text:p text:style-name="Standard"><text:s text:c="2"/>- Sprint 1 a Sprint 8: aprobados</text:p>
      <text:p text:style-name="Standard"/>
      <text:p text:style-name="Standard"><text:s text:c="2"/>Si quieres, te doy ya el prompt blindado para Sprint 9.</text:p>
      <text:p text:style-name="Standard"/>
      <text:p text:style-name="Standard"/>
      <text:p text:style-name="Standard">› si damelo</text:p>
      <text:p text:style-name="Standard"><text:soft-page-break/></text:p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9.</text:p>
      <text:p text:style-name="Standard"/>
      <text:p text:style-name="Standard"><text:s text:c="2"/>ALCANCE EXACTO</text:p>
      <text:p text:style-name="Standard"><text:s text:c="2"/>Debes integrar de forma controlada el runtime existente con el nuevo control</text:p>
      <text:p text:style-name="Standard"><text:s text:c="2"/>plane por tareas y directivas.</text:p>
      <text:p text:style-name="Standard"/>
      <text:p text:style-name="Standard"><text:s text:c="2"/>La implementacion de esta corrida debe centrarse en:</text:p>
      <text:p text:style-name="Standard"><text:s text:c="2"/>- modificación acotada de `backend/agent_runtime.py`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10 ni posteriores.</text:p>
      <text:p text:style-name="Standard"/>
      <text:p text:style-name="Standard"><text:s text:c="2"/>OBJETIVO FUNCIONAL DE SPRINT 9</text:p>
      <text:p text:style-name="Standard"><text:s text:c="2"/>Hacer que el runtime existente deje de depender del modelo viejo de sesión</text:p>
      <text:p text:style-name="Standard"><text:s text:c="2"/>monolítica y pueda consumir directivas generadas por el nuevo control plane.</text:p>
      <text:p text:style-name="Standard"/>
      <text:p text:style-name="Standard"><text:s text:c="2"/>REQUISITOS FUNCIONALES</text:p>
      <text:p text:style-name="Standard"/>
      <text:p text:style-name="Standard"><text:s text:c="2"/>1. `backend/agent_runtime.py` debe poder:</text:p>
      <text:p text:style-name="Standard"><text:s text:c="2"/>- usar modos explícitos solamente:</text:p>
      <text:p text:style-name="Standard"><text:s text:c="4"/>- smoke</text:p>
      <text:p text:style-name="Standard"><text:s text:c="4"/>- build</text:p>
      <text:p text:style-name="Standard"><text:s text:c="4"/>- medium</text:p>
      <text:p text:style-name="Standard"><text:s text:c="4"/>- long-run</text:p>
      <text:p text:style-name="Standard"><text:s text:c="2"/>- dejar de inferir smoke por heurísticas frágiles</text:p>
      <text:p text:style-name="Standard"><text:s text:c="2"/>- tratar una sesión como contenedor de tareas, no como una sola corrida</text:p>
      <text:p text:style-name="Standard"><text:s text:c="2"/>monolítica</text:p>
      <text:p text:style-name="Standard"><text:s text:c="2"/>- cargar o construir una tarea activa desde la cola persistida</text:p>
      <text:p text:style-name="Standard"><text:s text:c="2"/>- construir contexto con `directive_context.py`</text:p>
      <text:p text:style-name="Standard"><text:soft-page-break/><text:s text:c="2"/>- construir guía procedural con `habla_adapter.py`</text:p>
      <text:p text:style-name="Standard"><text:s text:c="2"/>- generar directiva con `directive_generator.py`</text:p>
      <text:p text:style-name="Standard"><text:s text:c="2"/>- pasar esa directiva al worker como instrucción de ejecución</text:p>
      <text:p text:style-name="Standard"/>
      <text:p text:style-name="Standard"><text:s text:c="2"/>2. Integración mínima con el flujo existente</text:p>
      <text:p text:style-name="Standard"><text:s text:c="2"/>- no destruir de golpe toda la compatibilidad anterior</text:p>
      <text:p text:style-name="Standard"><text:s text:c="2"/>- la integración debe ser acotada y controlada</text:p>
      <text:p text:style-name="Standard"><text:s text:c="2"/>- si el nuevo flujo no puede ejecutarse, debe fallar de forma clara</text:p>
      <text:p text:style-name="Standard"><text:s text:c="2"/>- no volver a heurísticas viejas como escape silencioso</text:p>
      <text:p text:style-name="Standard"/>
      <text:p text:style-name="Standard"><text:s text:c="2"/>3. Timeout y modo</text:p>
      <text:p text:style-name="Standard"><text:s text:c="2"/>- el runtime debe manejar timeout por tarea o al menos respetar claramente el</text:p>
      <text:p text:style-name="Standard"><text:s text:c="2"/>timeout de la tarea activa</text:p>
      <text:p text:style-name="Standard"><text:s text:c="2"/>- `long-run` no debe comportarse igual que `smoke`</text:p>
      <text:p text:style-name="Standard"><text:s text:c="2"/>- el modo debe venir de configuración explícita o del contrato de tarea, no de</text:p>
      <text:p text:style-name="Standard"><text:s text:c="2"/>palabras del prompt</text:p>
      <text:p text:style-name="Standard"/>
      <text:p text:style-name="Standard"><text:s text:c="2"/>4. Evidencia y trazabilidad</text:p>
      <text:p text:style-name="Standard"><text:s text:c="2"/>- la tarea activa debe poder dejar:</text:p>
      <text:p text:style-name="Standard"><text:s text:c="4"/>- directiva persistida</text:p>
      <text:p text:style-name="Standard"><text:s text:c="4"/>- resultado estructurado</text:p>
      <text:p text:style-name="Standard"><text:s text:c="4"/>- validación</text:p>
      <text:p text:style-name="Standard"><text:s text:c="4"/>- checkpoint o fallo según corresponda</text:p>
      <text:p text:style-name="Standard"><text:s text:c="2"/>- el runtime no debe afirmar que ejecutó una tarea si no existe esa</text:p>
      <text:p text:style-name="Standard"><text:s text:c="2"/>trazabilidad</text:p>
      <text:p text:style-name="Standard"/>
      <text:p text:style-name="Standard"><text:s text:c="2"/>5. Degradación clara</text:p>
      <text:p text:style-name="Standard"><text:s text:c="2"/>- si falta cola, contexto o directiva, el runtime debe decirlo claramente</text:p>
      <text:p text:style-name="Standard"><text:s text:c="2"/>- no debe fingir una sesión buena cuando el control plane no pudo preparar la</text:p>
      <text:p text:style-name="Standard"><text:s text:c="2"/>tarea</text:p>
      <text:p text:style-name="Standard"/>
      <text:p text:style-name="Standard"><text:s text:c="2"/>6. Compatibilidad</text:p>
      <text:p text:style-name="Standard"><text:s text:c="2"/>- usar:</text:p>
      <text:p text:style-name="Standard"><text:s text:c="4"/>- `orchestrator/planner.py`</text:p>
      <text:p text:style-name="Standard"><text:s text:c="4"/>- `orchestrator/task_queue.py`</text:p>
      <text:p text:style-name="Standard"><text:s text:c="4"/>- `orchestrator/directive_context.py`</text:p>
      <text:p text:style-name="Standard"><text:s text:c="4"/>- `orchestrator/habla_adapter.py`</text:p>
      <text:p text:style-name="Standard"><text:s text:c="4"/>- `orchestrator/directive_generator.py`</text:p>
      <text:p text:style-name="Standard"><text:s text:c="4"/>- `workers/codex_worker.py`</text:p>
      <text:p text:style-name="Standard"><text:s text:c="4"/>- `orchestrator/validator.py`</text:p>
      <text:p text:style-name="Standard"><text:s text:c="4"/>- `orchestrator/recovery.py`</text:p>
      <text:p text:style-name="Standard"><text:s text:c="2"/>- no implementar aún `orchestrator/benchmark.py`</text:p>
      <text:p text:style-name="Standard"/>
      <text:p text:style-name="Standard"><text:s text:c="2"/>DISENO PRAGMATICO</text:p>
      <text:p text:style-name="Standard"><text:s text:c="2"/>- no intentes rehacer todo `agent_runtime.py` desde cero</text:p>
      <text:p text:style-name="Standard"><text:s text:c="2"/>- haz una migración controlada</text:p>
      <text:p text:style-name="Standard"><text:s text:c="2"/>- si necesitas adaptadores o helpers pequeños, mantenlos acotados</text:p>
      <text:p text:style-name="Standard"><text:s text:c="2"/>- evita “dualidad confusa” entre flujo viejo y nuevo</text:p>
      <text:p text:style-name="Standard"><text:s text:c="2"/>- el nuevo camino debe quedar identificable y auditable</text:p>
      <text:p text:style-name="Standard"/>
      <text:p text:style-name="Standard"><text:s text:c="2"/>SI NECESITAS APOYO MINIMO</text:p>
      <text:p text:style-name="Standard"><text:s text:c="2"/>Puedes crear helpers pequeños y seguros si son inevitables para integrar</text:p>
      <text:p text:style-name="Standard"><text:soft-page-break/><text:s text:c="2"/>Sprint 9, pero no implementes todavía:</text:p>
      <text:p text:style-name="Standard"><text:s text:c="2"/>- orchestrator/benchmark.py</text:p>
      <text:p text:style-name="Standard"><text:s text:c="2"/>- despliegue final de Sprint 10</text:p>
      <text:p text:style-name="Standard"/>
      <text:p text:style-name="Standard"><text:s text:c="2"/>RESTRICCIONES DURAS</text:p>
      <text:p text:style-name="Standard"><text:s text:c="2"/>- no implementar Sprint 10</text:p>
      <text:p text:style-name="Standard"><text:s text:c="2"/>- no crear benchmark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><text:s text:c="2"/>- no dejar el runtime mezclando humo con control plane real sin dejarlo claro</text:p>
      <text:p text:style-name="Standard"/>
      <text:p text:style-name="Standard"><text:s text:c="2"/>CRITERIOS DE ACEPTACION</text:p>
      <text:p text:style-name="Standard"><text:s text:c="2"/>Sprint 9 queda correcto si:</text:p>
      <text:p text:style-name="Standard"><text:s text:c="2"/>- `agent_runtime.py` consume el nuevo control plane</text:p>
      <text:p text:style-name="Standard"><text:s text:c="2"/>- el modo smoke ya no depende de heurísticas por palabras</text:p>
      <text:p text:style-name="Standard"><text:s text:c="2"/>- una tarea activa puede generar y usar una directiva real</text:p>
      <text:p text:style-name="Standard"><text:s text:c="2"/>- el runtime deja trazabilidad de esa directiva y del resultado</text:p>
      <text:p text:style-name="Standard"><text:s text:c="2"/>- queda listo el camino para Sprint 10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El runtime puede preparar una tarea activa desde el control plane</text:p>
      <text:p text:style-name="Standard"><text:s text:c="2"/>2. El runtime puede generar una directiva real para esa tarea</text:p>
      <text:p text:style-name="Standard"><text:s text:c="2"/>3. El runtime puede pasar esa directiva al worker</text:p>
      <text:p text:style-name="Standard"><text:s text:c="2"/>4. El flujo deja evidencia real en disco</text:p>
      <text:p text:style-name="Standard"><text:s text:c="2"/>5. Smoke ya no depende de palabras del prompt</text:p>
      <text:p text:style-name="Standard"><text:s text:c="2"/>6. Si falta una pieza del control plane, el fallo es claro y no engañoso</text:p>
      <text:p text:style-name="Standard"/>
      <text:p text:style-name="Standard"><text:s text:c="2"/>SI AGREGAS TESTS</text:p>
      <text:p text:style-name="Standard"><text:s text:c="2"/>Mantenlos pequeños y enfocados solo en Sprint 9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10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auditar Sprint 9 sobre agent_runtime.py, revisar si realmente consume el</text:p>
      <text:p text:style-name="Standard"><text:s text:c="2"/>nuevo control plane y verificar el cambio de modos, directivas y trazabilidad.</text:p>
      <text:p text:style-name="Standard"/>
      <text:p text:style-name="Standard">• Explored</text:p>
      <text:p text:style-name="Standard"><text:s text:c="2"/>└ Read agent_runtime.py</text:p>
      <text:p text:style-name="Standard"><text:s text:c="4"/>Search smoke|directive|control plane|task_queue|build_directive_context|</text:p>
      <text:p text:style-name="Standard"><text:s text:c="11"/>build_habla_guide|generate_directive|persist_directive|</text:p>
      <text:p text:style-name="Standard"><text:s text:c="11"/>render_worker_instruction|planner|validator|recovery|codex_worker|</text:p>
      <text:p text:style-name="Standard"><text:soft-page-break/>mode in</text:p>
      <text:p text:style-name="Standard"><text:s text:c="11"/>agent_runtime.py</text:p>
      <text:p text:style-name="Standard"/>
      <text:p text:style-name="Standard">• Ran git -C "/home/neurodriver/BASE _METACOGNICION_COLOMBIA/vista_IA/</text:p>
      <text:p text:style-name="Standard"><text:s text:c="2"/>│ architecture-react-three-flask-socketio" status --short</text:p>
      <text:p text:style-name="Standard"><text:s text:c="2"/>└ fatal: not a git repository (or any parent up to mount point /)</text:p>
      <text:p text:style-name="Standard"><text:s text:c="4"/>Stopping at filesystem boundary (GIT_DISCOVERY_ACROSS_FILESYSTEM not set).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veo la integración principal. Ahora voy a leer el flujo de sesión y</text:p>
      <text:p text:style-name="Standard"><text:s text:c="2"/>ejecución alrededor del control plane, porque ahí es donde suelen quedar</text:p>
      <text:p text:style-name="Standard"><text:s text:c="2"/>regresiones: modo, cola, worker y manejo de fallos.</text:p>
      <text:p text:style-name="Standard"/>
      <text:p text:style-name="Standard">• Explored</text:p>
      <text:p text:style-name="Standard"><text:s text:c="2"/>└ Read agent_runtime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ruta principal ya está clara. Ahora voy a buscar las pruebas y, sobre todo,</text:p>
      <text:p text:style-name="Standard"><text:s text:c="2"/>si quedaron restos del smoke heurístico vivos en caminos que todavía se</text:p>
      <text:p text:style-name="Standard"><text:s text:c="2"/>ejecuten.</text:p>
      <text:p text:style-name="Standard"/>
      <text:p text:style-name="Standard">• Explored</text:p>
      <text:p text:style-name="Standard"><text:s text:c="2"/>└ Search SMOKE_REQUIREMENT_PATTERN|SMOKE_MINIMALITY_PATTERN|</text:p>
      <text:p text:style-name="Standard"><text:s text:c="11"/>SMOKE_ARTIFACT_PATTERN|is_observational_smoke_requirement|</text:p>
      <text:p text:style-name="Standard"><text:s text:c="11"/>_looks_like_smoke|smoke in agent_runtime.py</text:p>
      <text:p text:style-name="Standard"><text:s text:c="4"/>Search normalize_agent_runtime_mode|run_control_plane_task_once|</text:p>
      <text:p text:style-name="Standard">control_plane|</text:p>
      <text:p text:style-name="Standard"><text:s text:c="11"/>directive_generator|missing_active_task|smoke heuristic|smoke_mode in</text:p>
      <text:p text:style-name="Standard"><text:s text:c="11"/>backend</text:p>
      <text:p text:style-name="Standard"><text:s text:c="4"/>List backen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confirmé que sí tocaron tests del backend. Voy a leer las pruebas nuevas de</text:p>
      <text:p text:style-name="Standard"><text:s text:c="2"/>agent_runtime para ver qué cubren y qué no cubren, porque ahí suele verse el</text:p>
      <text:p text:style-name="Standard"><text:s text:c="2"/>hueco real de integración.</text:p>
      <text:p text:style-name="Standard"/>
      <text:p text:style-name="Standard">• Explored</text:p>
      <text:p text:style-name="Standard"><text:s text:c="2"/>└ Read test_agent_runtime_habla.py</text:p>
      <text:p text:style-name="Standard"><text:s text:c="4"/>Search control_plane|normalize_agent_runtime_mode|</text:p>
      <text:p text:style-name="Standard">run_control_plane_task_once|</text:p>
      <text:p text:style-name="Standard"><text:s text:c="11"/>directive_json_path|missing_active_task|VISTA_CONTROL_PLANE_ENABLED|</text:p>
      <text:p text:style-name="Standard"><text:s text:c="11"/>task_queue.json|plan_project in test_agent_runtime_habla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<text:soft-page-break/>• No vi cobertura nueva con ese filtro, así que voy a ubicar el tamaño real del</text:p>
      <text:p text:style-name="Standard"><text:s text:c="2"/>archivo y abrir los tramos donde seguramente cayeron los tests más recientes.</text:p>
      <text:p text:style-name="Standard"/>
      <text:p text:style-name="Standard">• Explored</text:p>
      <text:p text:style-name="Standard"><text:s text:c="2"/>└ Read test_agent_runtime_habla.py</text:p>
      <text:p text:style-name="Standard"/>
      <text:p text:style-name="Standard">• Ran wc -l "/home/neurodriver/BASE _METACOGNICION_COLOMBIA/vista_IA/</text:p>
      <text:p text:style-name="Standard"><text:s text:c="2"/>│ architecture-react-three-flask-socketio/backend/</text:p>
      <text:p text:style-name="Standard"><text:s text:c="2"/>│ test_agent_runtime_habla.py"</text:p>
      <text:p text:style-name="Standard"><text:s text:c="2"/>└ 943 /home/neurodriver/BASE _METACOGNICION_COLOMBIA/vista_IA/</text:p>
      <text:p text:style-name="Standard"><text:s text:c="4"/>architecture-react-three-flask-socketio/backend/test_agent_runtime_habla.py</text:p>
      <text:p text:style-name="Standard"/>
      <text:p text:style-name="Standard">• Explored</text:p>
      <text:p text:style-name="Standard"><text:s text:c="2"/>└ Read test_agent_runtime_habla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veo pruebas nuevas de Sprint 9, así que además de eso voy a buscar bugs</text:p>
      <text:p text:style-name="Standard"><text:s text:c="2"/>funcionales directos en el flujo integrado: bootstrap de cola, transición de</text:p>
      <text:p text:style-name="Standard"><text:s text:c="2"/>estado y ejecución del worker.</text:p>
      <text:p text:style-name="Standard"/>
      <text:p text:style-name="Standard">• Explored</text:p>
      <text:p text:style-name="Standard"><text:s text:c="2"/>└ Search def _save_project_state_transition|def _run_session|def</text:p>
      <text:p text:style-name="Standard">_fail_session|def</text:p>
      <text:p text:style-name="Standard"><text:s text:c="11"/>__init__|control_plane_runtime_dir|control_plane_sprint_number in</text:p>
      <text:p text:style-name="Standard"><text:s text:c="11"/>agent_runtime.py</text:p>
      <text:p text:style-name="Standard"><text:s text:c="4"/>Read agent_runtime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Voy a mirar el executor y el worker una vez, porque Sprint 9 depende de que el</text:p>
      <text:p text:style-name="Standard"><text:s text:c="2"/>runtime les pase el comando y el timeout con el contrato correcto.</text:p>
      <text:p text:style-name="Standard"/>
      <text:p text:style-name="Standard">• Explored</text:p>
      <text:p text:style-name="Standard"><text:s text:c="2"/>└ Read codex_worker.py, executor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stoy buscando el fallo de integración real. Voy a probar el flujo control-</text:p>
      <text:p text:style-name="Standard"><text:s text:c="2"/>plane aislado en runtime temporal y revisar cómo trata retry/split, porque ahí</text:p>
      <text:p text:style-name="Standard"><text:s text:c="2"/>es donde suele quedarse la orquestación “a medias”.</text:p>
      <text:p text:style-name="Standard"/>
      <text:p text:style-name="Standard">• Explored</text:p>
      <text:p text:style-name="Standard"><text:s text:c="2"/>└ Read recovery.py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59 lines</text:p>
      <text:p text:style-name="Standard"><text:soft-page-break/><text:s text:c="2"/>└ task_id RUNTIME-20260512232303-001</text:p>
      <text:p text:style-name="Standard"><text:s text:c="4"/>directive_task_id RUNTIME-20260512232303-001</text:p>
      <text:p text:style-name="Standard"><text:s text:c="4"/>… +4 lines</text:p>
      <text:p text:style-name="Standard"><text:s text:c="4"/>queue_len 1</text:p>
      <text:p text:style-name="Standard"><text:s text:c="4"/>queue_first_status pending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ncontré un punto sospechoso en recovery: parece devolver retry, pero el</text:p>
      <text:p text:style-name="Standard"><text:s text:c="2"/>runtime deja la tarea en failed. Voy a reproducirlo de punta a punta en un</text:p>
      <text:p text:style-name="Standard"><text:s text:c="2"/>runtime temporal, porque si eso se confirma el reintento quedó roto aunque la</text:p>
      <text:p text:style-name="Standard"><text:s text:c="2"/>integración “parezca” completa.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89 lines</text:p>
      <text:p text:style-name="Standard"><text:s text:c="2"/>└ status failed</text:p>
      <text:p text:style-name="Standard"><text:s text:c="4"/>recovery_action retry</text:p>
      <text:p text:style-name="Standard"><text:s text:c="4"/>… +42 lines</text:p>
      <text:p text:style-name="Standard"><text:s text:c="4"/>"max_retries": 2, "retry_count": 0, "task_id": "TASK-FAIL-001"},</text:p>
      <text:p text:style-name="Standard"><text:s text:c="4"/>"recorded_at": "2026-05-12T23:23:37Z"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confirmé un bug serio de recovery/reintento. Voy a revisar un último</text:p>
      <text:p text:style-name="Standard"><text:s text:c="2"/>frente: si la heurística de smoke vieja quedó viva en otro camino público del</text:p>
      <text:p text:style-name="Standard"><text:s text:c="2"/>runtime, porque eso también invalidaría la migración.</text:p>
      <text:p text:style-name="Standard"/>
      <text:p text:style-name="Standard">• Explored</text:p>
      <text:p text:style-name="Standard"><text:s text:c="2"/>└ Search is_observational_smoke_requirement\(|SMOKE_REQUIREMENT_PATTERN|</text:p>
      <text:p text:style-name="Standard"><text:s text:c="11"/>SMOKE_MINIMALITY_PATTERN|SMOKE_ARTIFACT_PATTERN in agent_runtime.py</text:p>
      <text:p text:style-name="Standard"><text:s text:c="4"/>Read agent_runtime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Hay otro hueco probable: split parece persistirse, pero no veo que el runtime</text:p>
      <text:p text:style-name="Standard"><text:s text:c="2"/>meta las subtareas nuevas en la cola. Lo voy a reproducir, porque si eso falla</text:p>
      <text:p text:style-name="Standard"><text:s text:c="2"/>el recovery quedó solo “documentado”, no operativo.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76 lines</text:p>
      <text:p text:style-name="Standard"><text:s text:c="2"/>└ status failed</text:p>
      <text:p text:style-name="Standard"><text:s text:c="4"/>recovery_action split</text:p>
      <text:p text:style-name="Standard"><text:s text:c="4"/>split_count 2</text:p>
      <text:p text:style-name="Standard"><text:s text:c="4"/>queue_len_after 1</text:p>
      <text:p text:style-name="Standard"><text:s text:c="4"/>queue_ids_after ['TASK-SPLIT-001']</text:p>
      <text:p text:style-name="Standard"><text:soft-page-break/></text:p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prueba del caso split sigue corriendo por el timeout intencional de la</text:p>
      <text:p text:style-name="Standard"><text:s text:c="2"/>tarea. Voy a esperar el resultado para confirmar si la cola realmente recibe</text:p>
      <text:p text:style-name="Standard"><text:s text:c="2"/>las subtareas o no.</text:p>
      <text:p text:style-name="Standard"/>
      <text:p text:style-name="Standard">• Waited for background terminal</text:p>
      <text:p text:style-name="Standard"/>
      <text:p text:style-name="Standard">• Ya tengo dos fallos funcionales reproducidos. Voy a sacar las líneas exactas</text:p>
      <text:p text:style-name="Standard"><text:s text:c="2"/>para dejar la auditoría bien anclada en código.</text:p>
      <text:p text:style-name="Standard"/>
      <text:p text:style-name="Standard">• Explored</text:p>
      <text:p text:style-name="Standard"><text:s text:c="2"/>└ Read agent_runtime.py, test_agent_runtime_habla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Tengo los fallos. Voy a correr una verificación mínima de sintaxis del runtime</text:p>
      <text:p text:style-name="Standard"><text:s text:c="2"/>para separar “rompe el flujo” de “ni siquiera compila”, y ya cierro la</text:p>
      <text:p text:style-name="Standard"><text:s text:c="2"/>auditoría con severidad y evidencia.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backend/agent_runtime.py"</text:p>
      <text:p text:style-name="Standard"><text:s text:c="2"/>└ (no output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Findings</text:p>
      <text:p text:style-name="Standard"/>
      <text:p text:style-name="Standard"><text:s text:c="2"/>- Alta: el camino de retry quedó roto. En agent_runtime.py:2029 siempre se</text:p>
      <text:p text:style-name="Standard"><text:s text:c="4"/>llama recover_task(..., retry_count=0), y luego en agent_runtime.py:2040</text:p>
      <text:p text:style-name="Standard"><text:s text:c="4"/>cualquier acción distinta de block termina marcando la tarea como failed. Lo</text:p>
      <text:p text:style-name="Standard"><text:s text:c="4"/>reproduje en un runtime temporal: la primera falla devolvió decisión retry,</text:p>
      <text:p text:style-name="Standard"><text:s text:c="4"/>pero la cola quedó con la tarea en failed, y el siguiente prepare abortó con</text:p>
      <text:p text:style-name="Standard"><text:s text:c="4"/>control_plane_no_ready_task. Así, ni se acumula retry_count ni existe un</text:p>
      <text:p text:style-name="Standard"><text:s text:c="4"/>reintento ejecutable.</text:p>
      <text:p text:style-name="Standard"><text:s text:c="2"/>- Alta: las decisiones split no se aplican a la cola. El mismo bloque de</text:p>
      <text:p text:style-name="Standard"><text:s text:c="4"/>agent_runtime.py:2029 sí obtiene split_tasks desde recovery, pero en</text:p>
      <text:p text:style-name="Standard"><text:s text:c="4"/>agent_runtime.py:2041 solo cambia el estado de la tarea original y nunca</text:p>
      <text:p text:style-name="Standard"><text:s text:c="4"/>encola las subtareas. Lo reproduje con una tarea que forzó split: recovery</text:p>
      <text:p text:style-name="Standard"><text:s text:c="4"/>devolvió 2 subtareas, pero task_queue.json siguió con 1 sola entrada, la</text:p>
      <text:p text:style-name="Standard"><text:s text:c="4"/>original.</text:p>
      <text:p text:style-name="Standard"><text:s text:c="2"/>- Media: no encontré cobertura automatizada del nuevo camino de control plane</text:p>
      <text:p text:style-name="Standard"><text:s text:c="4"/>introducido en agent_runtime.py:1605, agent_runtime.py:1932 y</text:p>
      <text:p text:style-name="Standard"><text:s text:c="4"/>agent_runtime.py:3269. En test_agent_runtime_habla.py:1 no vi pruebas que</text:p>
      <text:p text:style-name="Standard"><text:s text:c="4"/>ejerzan ese flujo, y por eso los dos fallos anteriores pasan intactos.</text:p>
      <text:p text:style-name="Standard"/>
      <text:p text:style-name="Standard"><text:s text:c="2"/>Assumptions</text:p>
      <text:p text:style-name="Standard"/>
      <text:p text:style-name="Standard"><text:soft-page-break/><text:s text:c="2"/>- Estoy asumiendo que retry debe reencolar la misma tarea o al menos</text:p>
      <text:p text:style-name="Standard"><text:s text:c="4"/>devolverla a pending con retry_count persistido.</text:p>
      <text:p text:style-name="Standard"><text:s text:c="2"/>- También asumo que split debe materializar sus subtareas en task_queue.json,</text:p>
      <text:p text:style-name="Standard"><text:s text:c="4"/>no solo dejarlas dentro del checkpoint/recovery payload.</text:p>
      <text:p text:style-name="Standard"/>
      <text:p text:style-name="Standard"><text:s text:c="2"/>agent_runtime.py compila, y la parte de directivas sí existe, pero yo no</text:p>
      <text:p text:style-name="Standard"><text:s text:c="2"/>aprobaría Sprint 9 todavía. La integración con el control plane quedó a medio</text:p>
      <text:p text:style-name="Standard"><text:s text:c="2"/>camino: genera directivas, pero no puede recuperarse operativamente de fallos.</text:p>
      <text:p text:style-name="Standard"/>
      <text:p text:style-name="Standard"/>
      <text:p text:style-name="Standard">› entonces <text:s/>hagamos un prompt <text:s/>para que el agente corrija eso</text:p>
      <text:p text:style-name="Standard"/>
      <text:p text:style-name="Standard"/>
      <text:p text:style-name="Standard"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Corregir unicamente los bugs bloqueantes detectados en Sprint 9.</text:p>
      <text:p text:style-name="Standard"><text:s text:c="2"/>No avances Sprint 10.</text:p>
      <text:p text:style-name="Standard"/>
      <text:p text:style-name="Standard"><text:s text:c="2"/>BUGS A CORREGIR</text:p>
      <text:p text:style-name="Standard"/>
      <text:p text:style-name="Standard"><text:s text:c="2"/>1. BUG DE `retry` EN `backend/agent_runtime.py`</text:p>
      <text:p text:style-name="Standard"><text:s text:c="2"/>Problema real:</text:p>
      <text:p text:style-name="Standard"><text:s text:c="2"/>- cuando una tarea falla, `recover_task()` puede devolver decision `retry`</text:p>
      <text:p text:style-name="Standard"><text:s text:c="2"/>- pero el runtime deja la tarea en estado `failed`</text:p>
      <text:p text:style-name="Standard"><text:s text:c="2"/>- y en la siguiente preparación ya no existe tarea lista para ejecutar</text:p>
      <text:p text:style-name="Standard"/>
      <text:p text:style-name="Standard"><text:s text:c="2"/>Eso rompe el recovery operativo.</text:p>
      <text:p text:style-name="Standard"/>
      <text:p text:style-name="Standard"><text:s text:c="2"/>Correccion esperada:</text:p>
      <text:p text:style-name="Standard"><text:s text:c="2"/>- si recovery decide `retry`, la tarea no debe quedar muerta en `failed`</text:p>
      <text:p text:style-name="Standard"><text:s text:c="2"/>- debe quedar reencolada o al menos otra vez en `pending` de forma consistente</text:p>
      <text:p text:style-name="Standard"><text:soft-page-break/><text:s text:c="2"/>- el runtime debe poder volver a prepararla en una siguiente iteracion</text:p>
      <text:p text:style-name="Standard"><text:s text:c="2"/>- `retry_count` no puede quedarse siempre en `0`</text:p>
      <text:p text:style-name="Standard"><text:s text:c="2"/>- la trazabilidad del retry debe persistirse de forma clara</text:p>
      <text:p text:style-name="Standard"/>
      <text:p text:style-name="Standard"><text:s text:c="2"/>2. BUG DE `split` EN `backend/agent_runtime.py`</text:p>
      <text:p text:style-name="Standard"><text:s text:c="2"/>Problema real:</text:p>
      <text:p text:style-name="Standard"><text:s text:c="2"/>- cuando recovery decide `split`, el runtime recibe `split_tasks`</text:p>
      <text:p text:style-name="Standard"><text:s text:c="2"/>- pero no las inserta en `task_queue.json`</text:p>
      <text:p text:style-name="Standard"><text:s text:c="2"/>- la cola queda igual, con solo la tarea original</text:p>
      <text:p text:style-name="Standard"/>
      <text:p text:style-name="Standard"><text:s text:c="2"/>Eso vuelve inútil el split.</text:p>
      <text:p text:style-name="Standard"/>
      <text:p text:style-name="Standard"><text:s text:c="2"/>Correccion esperada:</text:p>
      <text:p text:style-name="Standard"><text:s text:c="2"/>- si recovery decide `split`, las subtareas deben persistirse en la cola</text:p>
      <text:p text:style-name="Standard"><text:s text:c="2"/>- la tarea original debe quedar en un estado coherente</text:p>
      <text:p text:style-name="Standard"><text:s text:c="2"/>- el sistema debe poder continuar con una de las subtareas en siguientes</text:p>
      <text:p text:style-name="Standard"><text:s text:c="2"/>iteraciones</text:p>
      <text:p text:style-name="Standard"><text:s text:c="2"/>- no dejar split solo como metadata muerta dentro del recovery payload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backend/agent_runtime.py</text:p>
      <text:p text:style-name="Standard"><text:s text:c="2"/>- ajustes minimos estrictamente necesarios en orchestrator/recovery.py o</text:p>
      <text:p text:style-name="Standard"><text:s text:c="2"/>task_queue.py si son inevitables para consistencia</text:p>
      <text:p text:style-name="Standard"><text:s text:c="2"/>- tests pequeños y enfocados del backend para cubrir estos 2 bugs</text:p>
      <text:p text:style-name="Standard"/>
      <text:p text:style-name="Standard"><text:s text:c="2"/>RESTRICCIONES DURAS</text:p>
      <text:p text:style-name="Standard"><text:s text:c="2"/>- no implementar Sprint 10</text:p>
      <text:p text:style-name="Standard"><text:s text:c="2"/>- no crear benchmark.py</text:p>
      <text:p text:style-name="Standard"><text:s text:c="2"/>- no rediseñar todo agent_runtime.py</text:p>
      <text:p text:style-name="Standard"><text:s text:c="2"/>- no tocar rutas fuera del repo raiz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Caso retry</text:p>
      <text:p text:style-name="Standard"><text:s text:c="2"/>- una tarea fallida con retries disponibles produce decision `retry`</text:p>
      <text:p text:style-name="Standard"><text:s text:c="2"/>- la tarea queda nuevamente ejecutable o pendiente de forma consistente</text:p>
      <text:p text:style-name="Standard"><text:s text:c="2"/>- una siguiente preparación del control plane puede volver a seleccionarla</text:p>
      <text:p text:style-name="Standard"><text:s text:c="2"/>- `retry_count` persiste y no queda clavado siempre en `0`</text:p>
      <text:p text:style-name="Standard"/>
      <text:p text:style-name="Standard"><text:s text:c="2"/>2. Caso split</text:p>
      <text:p text:style-name="Standard"><text:s text:c="2"/>- una tarea que dispara `split` produce subtareas reales</text:p>
      <text:p text:style-name="Standard"><text:s text:c="2"/>- esas subtareas quedan persistidas en `task_queue.json`</text:p>
      <text:p text:style-name="Standard"><text:s text:c="2"/>- la tarea original no queda compitiendo de forma incoherente con sus</text:p>
      <text:p text:style-name="Standard"><text:s text:c="2"/>subtareas</text:p>
      <text:p text:style-name="Standard"><text:s text:c="2"/>- una siguiente preparación puede continuar sobre las subtareas</text:p>
      <text:p text:style-name="Standard"/>
      <text:p text:style-name="Standard"><text:s text:c="2"/>3. Trazabilidad</text:p>
      <text:p text:style-name="Standard"><text:soft-page-break/><text:s text:c="2"/>- el runtime sigue dejando:</text:p>
      <text:p text:style-name="Standard"><text:s text:c="4"/>- directiva</text:p>
      <text:p text:style-name="Standard"><text:s text:c="4"/>- history</text:p>
      <text:p text:style-name="Standard"><text:s text:c="4"/>- validation</text:p>
      <text:p text:style-name="Standard"><text:s text:c="4"/>- recovery</text:p>
      <text:p text:style-name="Standard"><text:s text:c="4"/>- checkpoint</text:p>
      <text:p text:style-name="Standard"><text:s text:c="2"/>- sin inventar progreso falso</text:p>
      <text:p text:style-name="Standard"/>
      <text:p text:style-name="Standard"><text:s text:c="2"/>SI AGREGAS TESTS</text:p>
      <text:p text:style-name="Standard"><text:s text:c="2"/>Mantenlos pequeños y enfocados solo en estos bugs de Sprint 9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/>
      <text:p text:style-name="Standard"><text:s text:c="2"/>Cuando termine, yo te lo vuelvo a auditar.</text:p>
      <text:p text:style-name="Standard"/>
      <text:p text:style-name="Standard"/>
      <text:p text:style-name="Standard">› ok ya termino</text:p>
      <text:p text:style-name="Standard"/>
      <text:p text:style-name="Standard"/>
      <text:p text:style-name="Standard">• Voy a reauditar Sprint 9 sobre los dos bugs corregidos: retry operativo y</text:p>
      <text:p text:style-name="Standard"><text:s text:c="2"/>split persistido en la cola. Luego reproduzco ambos casos en runtime temporal</text:p>
      <text:p text:style-name="Standard"><text:s text:c="2"/>para confirmar que ya no quedaron solo “bonitos en código”.</text:p>
      <text:p text:style-name="Standard"/>
      <text:p text:style-name="Standard">• Explored</text:p>
      <text:p text:style-name="Standard"><text:s text:c="2"/>└ Search retry_count|split_tasks|control_plane|mark_task_status|enqueue_many|</text:p>
      <text:p text:style-name="Standard"><text:s text:c="11"/>pending|failed|blocked in agent_runtime.py</text:p>
      <text:p text:style-name="Standard"/>
      <text:p text:style-name="Standard">• Ran git -C "/home/neurodriver/BASE _METACOGNICION_COLOMBIA/vista_IA/</text:p>
      <text:p text:style-name="Standard"><text:s text:c="2"/>│ architecture-react-three-flask-socketio" status --short</text:p>
      <text:p text:style-name="Standard"><text:s text:c="2"/>└ fatal: not a git repository (or any parent up to mount point /)</text:p>
      <text:p text:style-name="Standard"><text:s text:c="4"/>Stopping at filesystem boundary (GIT_DISCOVERY_ACROSS_FILESYSTEM not set).</text:p>
      <text:p text:style-name="Standard"/>
      <text:p text:style-name="Standard">• Explored</text:p>
      <text:p text:style-name="Standard"><text:s text:c="2"/>└ Search retry|split|control_plane|task_queue|no_ready_task|</text:p>
      <text:p text:style-name="Standard"><text:s text:c="11"/>run_control_plane_task_once|failed in test_agent_runtime_habla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veo cambios nuevos en agent_runtime.py. Quiero comprobar si además dejaron</text:p>
      <text:p text:style-name="Standard"><text:s text:c="2"/>tests de backend para estos casos, porque sin eso el fix sigue siendo frágil</text:p>
      <text:p text:style-name="Standard"><text:s text:c="2"/>aunque la lógica haya mejorado.</text:p>
      <text:p text:style-name="Standard"/>
      <text:p text:style-name="Standard">• Explored</text:p>
      <text:p text:style-name="Standard"><text:s text:c="2"/>└ Read agent_runtime.py</text:p>
      <text:p text:style-name="Standard"><text:s text:c="4"/>Search TASK-FAIL-001|TASK-SPLIT-001|control_plane_no_ready_task|</text:p>
      <text:p text:style-name="Standard"><text:s text:c="11"/>enqueued_split_tasks|retry_count in backend</text:p>
      <text:p text:style-name="Standard"><text:soft-page-break/><text:s text:c="4"/>Read agent_runtime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lógica nueva ya está en sitio. Ahora la voy a reejecutar en dos escenarios</text:p>
      <text:p text:style-name="Standard"><text:s text:c="2"/>reales: uno de retry y otro de split, para ver si la cola y el estado</text:p>
      <text:p text:style-name="Standard"><text:s text:c="2"/>persistido realmente siguen vivos después del fallo.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backend/agent_runtime.py"</text:p>
      <text:p text:style-name="Standard"><text:s text:c="2"/>└ (no output)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85 lines</text:p>
      <text:p text:style-name="Standard"><text:s text:c="2"/>└ status retry</text:p>
      <text:p text:style-name="Standard"><text:s text:c="4"/>recovery_action retry</text:p>
      <text:p text:style-name="Standard"><text:s text:c="4"/>… +5 lines</text:p>
      <text:p text:style-name="Standard"><text:s text:c="4"/>second_prepare_task TASK-FAIL-001</text:p>
      <text:p text:style-name="Standard"><text:s text:c="4"/>second_retry_count 1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86 lines</text:p>
      <text:p text:style-name="Standard"><text:s text:c="2"/>└ status split</text:p>
      <text:p text:style-name="Standard"><text:s text:c="4"/>recovery_action split</text:p>
      <text:p text:style-name="Standard"><text:s text:c="4"/>… +7 lines</text:p>
      <text:p text:style-name="Standard"><text:s text:c="4"/>state_blocked_tasks ['TASK-SPLIT-001']</text:p>
      <text:p text:style-name="Standard"><text:s text:c="4"/>next_prepare_task TASK-SPLIT-001-SPLIT-001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caso retry ya se sostuvo bien en la segunda iteración. Falta esperar el</text:p>
      <text:p text:style-name="Standard"><text:s text:c="2"/>caso split, porque ahí quiero confirmar no solo que encola subtareas, sino que</text:p>
      <text:p text:style-name="Standard"><text:s text:c="2"/>la siguiente preparación realmente avanza sobre ellas.</text:p>
      <text:p text:style-name="Standard"/>
      <text:p text:style-name="Standard">• Waited for background terminal</text:p>
      <text:p text:style-name="Standard"/>
      <text:p text:style-name="Standard">• Los dos casos funcionales ya pasaron en runtime temporal. Voy a revisar una</text:p>
      <text:p text:style-name="Standard"><text:s text:c="2"/>sola cosa de consistencia de estado y luego cierro: si después de retry quedó</text:p>
      <text:p text:style-name="Standard"><text:s text:c="2"/>alguna incoherencia persistida que nos vaya a explotar en UI o en la siguiente</text:p>
      <text:p text:style-name="Standard"><text:s text:c="2"/>iteración.</text:p>
      <text:p text:style-name="Standard"/>
      <text:p text:style-name="Standard">• Ran cd "/home/neurodriver/BASE _METACOGNICION_COLOMBIA/vista_IA/</text:p>
      <text:p text:style-name="Standard"><text:s text:c="2"/>│ architecture-react-three-flask-socketio/backend" &amp;&amp; python3 - &lt;&lt;'PY'</text:p>
      <text:p text:style-name="Standard"><text:s text:c="2"/>│ from pathlib import Path</text:p>
      <text:p text:style-name="Standard"><text:s text:c="2"/>│ … +71 lines</text:p>
      <text:p text:style-name="Standard"><text:s text:c="2"/>└ {'blocked_tasks': [], 'checkpoints': ['task-fail-001-retry-0-recovery'],</text:p>
      <text:p text:style-name="Standard"><text:soft-page-break/><text:s text:c="4"/>'completed_tasks': [], 'created_at': '2026-05-12T00:00:00Z',</text:p>
      <text:p text:style-name="Standard"><text:s text:c="4"/>'current_task_id': None, 'failed_tasks': [], 'mode': 'build', 'project_id':</text:p>
      <text:p text:style-name="Standard"><text:s text:c="4"/>'architecture-react-three-flask-socketio', 'schema_version': 1, 'status':</text:p>
      <text:p text:style-name="Standard"><text:s text:c="4"/>'running', 'updated_at': '2026-05-13T00:08:18.523310+00:00'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encontré hallazgos bloqueantes. Con esta corrección, Sprint 9 queda</text:p>
      <text:p text:style-name="Standard"><text:s text:c="2"/>aprobado.</text:p>
      <text:p text:style-name="Standard"/>
      <text:p text:style-name="Standard"><text:s text:c="2"/>Validación real que corrí:</text:p>
      <text:p text:style-name="Standard"/>
      <text:p text:style-name="Standard"><text:s text:c="2"/>- py_compile de agent_runtime.py: pasó.</text:p>
      <text:p text:style-name="Standard"><text:s text:c="2"/>- Reproduje el caso retry en runtime temporal:</text:p>
      <text:p text:style-name="Standard"><text:s text:c="6"/>- la primera falla devolvió retry,</text:p>
      <text:p text:style-name="Standard"><text:s text:c="6"/>- la tarea volvió a pending,</text:p>
      <text:p text:style-name="Standard"><text:s text:c="6"/>- la siguiente preparación del control plane volvió a seleccionarla,</text:p>
      <text:p text:style-name="Standard"><text:s text:c="6"/>- y el segundo intento ya salió con retry_count = 1.</text:p>
      <text:p text:style-name="Standard"><text:s text:c="2"/>- Reproduje el caso split en runtime temporal:</text:p>
      <text:p text:style-name="Standard"><text:s text:c="6"/>- recovery devolvió split con 2 subtareas,</text:p>
      <text:p text:style-name="Standard"><text:s text:c="6"/>- ambas quedaron persistidas en task_queue.json,</text:p>
      <text:p text:style-name="Standard"><text:s text:c="6"/>- la tarea original quedó blocked,</text:p>
      <text:p text:style-name="Standard"><text:s text:c="6"/>- y la siguiente preparación avanzó sobre TASK-SPLIT-001-SPLIT-001.</text:p>
      <text:p text:style-name="Standard"/>
      <text:p text:style-name="Standard"><text:s text:c="2"/>Lo que cambió bien en agent_runtime.py:</text:p>
      <text:p text:style-name="Standard"/>
      <text:p text:style-name="Standard"><text:s text:c="2"/>- ahora calcula retry_count desde failures.jsonl,</text:p>
      <text:p text:style-name="Standard"><text:s text:c="2"/>- aplica la decisión de recovery con _apply_recovery_decision(...),</text:p>
      <text:p text:style-name="Standard"><text:s text:c="2"/>- reencola correctamente retry,</text:p>
      <text:p text:style-name="Standard"><text:s text:c="2"/>- y persiste subtareas reales cuando la decisión es split.</text:p>
      <text:p text:style-name="Standard"/>
      <text:p text:style-name="Standard"><text:s text:c="2"/>Reserva menor:</text:p>
      <text:p text:style-name="Standard"/>
      <text:p text:style-name="Standard"><text:s text:c="2"/>- no encontré cobertura automatizada nueva para este camino de control plane</text:p>
      <text:p text:style-name="Standard"><text:s text:c="4"/>en test_agent_runtime_habla.py, así que la aprobación queda sustentada en</text:p>
      <text:p text:style-name="Standard"><text:s text:c="4"/>reproducción manual fuerte, no en suite dedicada.</text:p>
      <text:p text:style-name="Standard"><text:s text:c="2"/>- semánticamente, después de retry el project_state.status queda en running</text:p>
      <text:p text:style-name="Standard"><text:s text:c="4"/>con current_task_id = null; no me bloqueó el flujo, pero conviene vigilarlo</text:p>
      <text:p text:style-name="Standard"><text:s text:c="4"/>en Sprint 10 por claridad operativa.</text:p>
      <text:p text:style-name="Standard"/>
      <text:p text:style-name="Standard"><text:s text:c="2"/>Estado global:</text:p>
      <text:p text:style-name="Standard"/>
      <text:p text:style-name="Standard"><text:s text:c="2"/>- Sprint 1 a Sprint 9: aprobados</text:p>
      <text:p text:style-name="Standard"/>
      <text:p text:style-name="Standard"><text:s text:c="2"/>Si quieres, te doy ya el prompt blindado para Sprint 10.</text:p>
      <text:p text:style-name="Standard"/>
      <text:p text:style-name="Standard"/>
      <text:p text:style-name="Standard">› o <text:s text:c="2"/>sihiente promt</text:p>
      <text:p text:style-name="Standard"/>
      <text:p text:style-name="Standard"/>
      <text:p text:style-name="Standard">• INSTRUCCION CRITICA DE RUTA</text:p>
      <text:p text:style-name="Standard"><text:soft-page-break/></text:p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10.</text:p>
      <text:p text:style-name="Standard"/>
      <text:p text:style-name="Standard"><text:s text:c="2"/>ALCANCE EXACTO</text:p>
      <text:p text:style-name="Standard"><text:s text:c="2"/>Debes crear o dejar listo unicamente este elemento:</text:p>
      <text:p text:style-name="Standard"><text:s text:c="2"/>- orchestrator/benchmark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nada posterior.</text:p>
      <text:p text:style-name="Standard"/>
      <text:p text:style-name="Standard"><text:s text:c="2"/>OBJETIVO FUNCIONAL DE SPRINT 10</text:p>
      <text:p text:style-name="Standard"><text:s text:c="2"/>Cerrar el harness con benchmarks oficiales y una puerta real de despliegue.</text:p>
      <text:p text:style-name="Standard"/>
      <text:p text:style-name="Standard"><text:s text:c="2"/>REQUISITOS FUNCIONALES</text:p>
      <text:p text:style-name="Standard"/>
      <text:p text:style-name="Standard"><text:s text:c="2"/>1. `orchestrator/benchmark.py` debe poder ejecutar y reportar la batería</text:p>
      <text:p text:style-name="Standard"><text:s text:c="2"/>oficial:</text:p>
      <text:p text:style-name="Standard"><text:s text:c="2"/>- smoke-01</text:p>
      <text:p text:style-name="Standard"><text:s text:c="2"/>- crud-ui-02</text:p>
      <text:p text:style-name="Standard"><text:s text:c="2"/>- refactor-mid-03</text:p>
      <text:p text:style-name="Standard"><text:s text:c="2"/>- long-project-04</text:p>
      <text:p text:style-name="Standard"><text:s text:c="2"/>- recovery-05</text:p>
      <text:p text:style-name="Standard"/>
      <text:p text:style-name="Standard"><text:s text:c="2"/>2. Debe existir una API mínima clara, por ejemplo:</text:p>
      <text:p text:style-name="Standard"><text:s text:c="2"/>- `run_benchmarks(...)`</text:p>
      <text:p text:style-name="Standard"><text:s text:c="2"/>- `run_benchmark(name, ...)`</text:p>
      <text:p text:style-name="Standard"><text:s text:c="2"/>- `benchmark_gate(...)`</text:p>
      <text:p text:style-name="Standard"><text:s text:c="2"/>- `load_benchmark_report(...)`</text:p>
      <text:p text:style-name="Standard"/>
      <text:p text:style-name="Standard"><text:s text:c="2"/>3. Cada benchmark debe dejar resultado estructurado con al menos:</text:p>
      <text:p text:style-name="Standard"><text:s text:c="2"/>- nombre</text:p>
      <text:p text:style-name="Standard"><text:s text:c="2"/>- estado</text:p>
      <text:p text:style-name="Standard"><text:s text:c="2"/>- duración</text:p>
      <text:p text:style-name="Standard"><text:soft-page-break/><text:s text:c="2"/>- evidencia usada</text:p>
      <text:p text:style-name="Standard"><text:s text:c="2"/>- fallos</text:p>
      <text:p text:style-name="Standard"><text:s text:c="2"/>- recomendaciones</text:p>
      <text:p text:style-name="Standard"/>
      <text:p text:style-name="Standard"><text:s text:c="2"/>4. La puerta de despliegue debe ser real:</text:p>
      <text:p text:style-name="Standard"><text:s text:c="2"/>- si no pasan todos, no se despliega</text:p>
      <text:p text:style-name="Standard"><text:s text:c="2"/>- debe existir un resultado claro tipo pass/fail global</text:p>
      <text:p text:style-name="Standard"><text:s text:c="2"/>- no debe fingir éxito parcial como despliegue aprobado</text:p>
      <text:p text:style-name="Standard"/>
      <text:p text:style-name="Standard"><text:s text:c="2"/>5. Los benchmarks deben apoyarse en la arquitectura ya construida:</text:p>
      <text:p text:style-name="Standard"><text:s text:c="2"/>- planner</text:p>
      <text:p text:style-name="Standard"><text:s text:c="2"/>- task_queue</text:p>
      <text:p text:style-name="Standard"><text:s text:c="2"/>- executor</text:p>
      <text:p text:style-name="Standard"><text:s text:c="2"/>- validator</text:p>
      <text:p text:style-name="Standard"><text:s text:c="2"/>- recovery</text:p>
      <text:p text:style-name="Standard"><text:s text:c="2"/>- policy_loader</text:p>
      <text:p text:style-name="Standard"><text:s text:c="2"/>- plan_loader</text:p>
      <text:p text:style-name="Standard"><text:s text:c="2"/>- directive_context</text:p>
      <text:p text:style-name="Standard"><text:s text:c="2"/>- habla_adapter</text:p>
      <text:p text:style-name="Standard"><text:s text:c="2"/>- directive_generator</text:p>
      <text:p text:style-name="Standard"><text:s text:c="2"/>- integración con agent_runtime ya hecha en Sprint 9</text:p>
      <text:p text:style-name="Standard"/>
      <text:p text:style-name="Standard"><text:s text:c="2"/>6. Diseño pragmático</text:p>
      <text:p text:style-name="Standard"><text:s text:c="2"/>- no intentes montar un sistema distribuido</text:p>
      <text:p text:style-name="Standard"><text:s text:c="2"/>- no hagas benchmarks vacíos o decorativos</text:p>
      <text:p text:style-name="Standard"><text:s text:c="2"/>- si alguna prueba tiene que ser sintética, debe seguir siendo real y</text:p>
      <text:p text:style-name="Standard"><text:s text:c="2"/>verificable</text:p>
      <text:p text:style-name="Standard"><text:s text:c="2"/>- cada benchmark debe apuntar a una capacidad central del runtime</text:p>
      <text:p text:style-name="Standard"/>
      <text:p text:style-name="Standard"><text:s text:c="2"/>EXPECTATIVA MINIMA POR BENCHMARK</text:p>
      <text:p text:style-name="Standard"/>
      <text:p text:style-name="Standard"><text:s text:c="2"/>1. `smoke-01`</text:p>
      <text:p text:style-name="Standard"><text:s text:c="2"/>- verificar que una tarea simple pueda prepararse, generar directiva,</text:p>
      <text:p text:style-name="Standard"><text:s text:c="2"/>ejecutarse y validarse</text:p>
      <text:p text:style-name="Standard"/>
      <text:p text:style-name="Standard"><text:s text:c="2"/>2. `crud-ui-02`</text:p>
      <text:p text:style-name="Standard"><text:s text:c="2"/>- verificar una secuencia multi-tarea con persistencia, dependencias y</text:p>
      <text:p text:style-name="Standard"><text:s text:c="2"/>entregables múltiples</text:p>
      <text:p text:style-name="Standard"/>
      <text:p text:style-name="Standard"><text:s text:c="2"/>3. `refactor-mid-03`</text:p>
      <text:p text:style-name="Standard"><text:s text:c="2"/>- verificar una tarea o mini-secuencia con modificación sobre artefactos</text:p>
      <text:p text:style-name="Standard"><text:s text:c="2"/>existentes y validación coherente</text:p>
      <text:p text:style-name="Standard"/>
      <text:p text:style-name="Standard"><text:s text:c="2"/>4. `long-project-04`</text:p>
      <text:p text:style-name="Standard"><text:s text:c="2"/>- verificar que el sistema puede avanzar por varias tareas encadenadas sin</text:p>
      <text:p text:style-name="Standard"><text:s text:c="2"/>depender de una sesión monolítica</text:p>
      <text:p text:style-name="Standard"/>
      <text:p text:style-name="Standard"><text:s text:c="2"/>5. `recovery-05`</text:p>
      <text:p text:style-name="Standard"><text:s text:c="2"/>- verificar retry o split reales y continuidad posterior</text:p>
      <text:p text:style-name="Standard"/>
      <text:p text:style-name="Standard"><text:s text:c="2"/>PERSISTENCIA Y REPORTE</text:p>
      <text:p text:style-name="Standard"><text:s text:c="2"/>- si hace falta, puedes dejar reportes bajo `runtime/benchmarks/`</text:p>
      <text:p text:style-name="Standard"><text:soft-page-break/><text:s text:c="2"/>- los resultados deben ser auditables</text:p>
      <text:p text:style-name="Standard"><text:s text:c="2"/>- no escribir fuera del repo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rutas fuera del repo raiz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><text:s text:c="2"/>- no declarar deployment gate aprobado si falta un benchmark</text:p>
      <text:p text:style-name="Standard"/>
      <text:p text:style-name="Standard"><text:s text:c="2"/>CRITERIOS DE ACEPTACION</text:p>
      <text:p text:style-name="Standard"><text:s text:c="2"/>Sprint 10 queda correcto si:</text:p>
      <text:p text:style-name="Standard"><text:s text:c="2"/>- existe `orchestrator/benchmark.py`</text:p>
      <text:p text:style-name="Standard"><text:s text:c="2"/>- la batería oficial puede ejecutarse</text:p>
      <text:p text:style-name="Standard"><text:s text:c="2"/>- el sistema produce reporte estructurado</text:p>
      <text:p text:style-name="Standard"><text:s text:c="2"/>- existe puerta de despliegue real</text:p>
      <text:p text:style-name="Standard"><text:s text:c="2"/>- si falla uno, el gate falla</text:p>
      <text:p text:style-name="Standard"><text:s text:c="2"/>- si pasan todos, el gate aprueba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Se puede ejecutar al menos una corrida completa de la batería</text:p>
      <text:p text:style-name="Standard"><text:s text:c="2"/>2. El reporte distingue benchmarks aprobados y fallidos</text:p>
      <text:p text:style-name="Standard"><text:s text:c="2"/>3. El gate global falla si un benchmark falla</text:p>
      <text:p text:style-name="Standard"><text:s text:c="2"/>4. El gate global aprueba si todos pasan</text:p>
      <text:p text:style-name="Standard"><text:s text:c="2"/>5. La evidencia queda persistida y es auditable</text:p>
      <text:p text:style-name="Standard"/>
      <text:p text:style-name="Standard"><text:s text:c="2"/>SI AGREGAS TESTS</text:p>
      <text:p text:style-name="Standard"><text:s text:c="2"/>Mantenlos pequeños y enfocados en Sprint 10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 restantes</text:p>
      <text:p text:style-name="Standard"><text:s text:c="2"/>4. confirmacion clara de si el harness base ya quedo cerrado</text:p>
      <text:p text:style-name="Standard"/>
      <text:p text:style-name="Standard"/>
      <text:p text:style-name="Standard">› ya <text:s/>termino <text:s/>esto dijo <text:s/>Riesgos reales restantes</text:p>
      <text:p text:style-name="Standard"/>
      <text:p text:style-name="Standard"><text:s text:c="4"/>- Los benchmarks son sintéticos pero verificables; no prueban UI real en</text:p>
      <text:p text:style-name="Standard"><text:s text:c="6"/>navegador ni ejecución real de Codex.</text:p>
      <text:p text:style-name="Standard"><text:s text:c="4"/>- Las corridas acumulan artefactos en runtime/benchmarks/ y runtime/</text:p>
      <text:p text:style-name="Standard"><text:s text:c="6"/>directives/; hará falta política de retención.</text:p>
      <text:p text:style-name="Standard"><text:s text:c="4"/>- Los comandos de validación asumen python3 disponible en PATH.</text:p>
      <text:p text:style-name="Standard"><text:s text:c="4"/>- El harness depende de que backend.agent_runtime importe correctamente.</text:p>
      <text:p text:style-name="Standard"/>
      <text:p text:style-name="Standard"><text:s text:c="4"/>Confirmación</text:p>
      <text:p text:style-name="Standard"><text:s text:c="4"/>El harness base de Sprint 10 quedó cerrado: la batería oficial corre</text:p>
      <text:p text:style-name="Standard"><text:s text:c="2"/>completa,</text:p>
      <text:p text:style-name="Standard"><text:soft-page-break/><text:s text:c="4"/>persiste evidencia auditable y el gate final está aprobado solo cuando</text:p>
      <text:p text:style-name="Standard"><text:s text:c="2"/>pasan</text:p>
      <text:p text:style-name="Standard"><text:s text:c="4"/>los cinco benchmarks.</text:p>
      <text:p text:style-name="Standard"/>
      <text:p text:style-name="Standard"/>
      <text:p text:style-name="Standard">• Voy a auditar Sprint 10: revisar benchmark.py, confirmar que corre la batería</text:p>
      <text:p text:style-name="Standard"><text:s text:c="2"/>oficial, que persiste reportes reales y que el gate falla/pasa de forma</text:p>
      <text:p text:style-name="Standard"><text:s text:c="2"/>honesta.</text:p>
      <text:p text:style-name="Standard"/>
      <text:p text:style-name="Standard">• Explored</text:p>
      <text:p text:style-name="Standard"><text:s text:c="2"/>└ Read benchmark.py</text:p>
      <text:p text:style-name="Standard"><text:s text:c="4"/>List benchmarks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orchestrator/</text:p>
      <text:p text:style-name="Standard"><text:s text:c="2"/>│ benchmark.py"</text:p>
      <text:p text:style-name="Standard"><text:s text:c="2"/>└ (no output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archivo es grande; ahora voy a leer la segunda mitad y luego ejecutar la</text:p>
      <text:p text:style-name="Standard"><text:s text:c="2"/>batería y el gate para no quedarme solo con el reporte que dejó el otro</text:p>
      <text:p text:style-name="Standard"><text:s text:c="2"/>agente.</text:p>
      <text:p text:style-name="Standard"/>
      <text:p text:style-name="Standard">• Explored</text:p>
      <text:p text:style-name="Standard"><text:s text:c="2"/>└ Read benchmark.py, latest.json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benchmark import run_benchmarks, benchmark_gate</text:p>
      <text:p text:style-name="Standard"><text:s text:c="2"/>│ … +8 lines</text:p>
      <text:p text:style-name="Standard"><text:s text:c="2"/>└ run_id 20260513T004504Z-08ad168f</text:p>
      <text:p text:style-name="Standard"><text:s text:c="4"/>statuses ['passed', 'passed', 'passed', 'passed', 'passed']</text:p>
      <text:p text:style-name="Standard"><text:s text:c="4"/>… +11 lines</text:p>
      <text:p text:style-name="Standard"><text:s text:c="4"/>benchmarks/20260513T004504Z-08ad168f/report.json</text:p>
      <text:p text:style-name="Standard"><text:s text:c="4"/>results_count 5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batería completa quedó corriendo. Voy a esperar a que termine para</text:p>
      <text:p text:style-name="Standard"><text:s text:c="2"/>confirmar el gate desde una corrida propia, no solo desde latest.json.</text:p>
      <text:p text:style-name="Standard"/>
      <text:p text:style-name="Standard">• Waited for background terminal</text:p>
      <text:p text:style-name="Standard"/>
      <text:p text:style-name="Standard">• La corrida completa pasó. Quiero verificar una cosa crítica más: que el gate</text:p>
      <text:p text:style-name="Standard"><text:s text:c="2"/>realmente falle si falta o falla un benchmark, y no solo pase con batería</text:p>
      <text:p text:style-name="Standard"><text:s text:c="2"/>completa.</text:p>
      <text:p text:style-name="Standard"/>
      <text:p text:style-name="Standard">• Explored</text:p>
      <text:p text:style-name="Standard"><text:s text:c="2"/>└ List 20260513T004504Z-08ad168f</text:p>
      <text:p text:style-name="Standard"><text:soft-page-break/></text:p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benchmark import benchmark_gate</text:p>
      <text:p text:style-name="Standard"><text:s text:c="2"/>│ … +7 lines</text:p>
      <text:p text:style-name="Standard"><text:s text:c="2"/>└ {'schema_version': 1, 'gate_type': 'deployment_gate', 'status': 'failed',</text:p>
      <text:p text:style-name="Standard"><text:s text:c="4"/>'approved': False, 'deployment_allowed': False, 'required_benchmarks':</text:p>
      <text:p text:style-name="Standard"><text:s text:c="4"/>… +3 lines</text:p>
      <text:p text:style-name="Standard"><text:s text:c="4"/>'recommendation': 'Deployment blocked: every official benchmark must pass</text:p>
      <text:p text:style-name="Standard"><text:s text:c="4"/>before deploy.'}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benchmark import benchmark_gate</text:p>
      <text:p text:style-name="Standard"><text:s text:c="2"/>│ … +12 lines</text:p>
      <text:p text:style-name="Standard"><text:s text:c="2"/>└ {'schema_version': 1, 'gate_type': 'deployment_gate', 'status': 'failed',</text:p>
      <text:p text:style-name="Standard"><text:s text:c="4"/>'approved': False, 'deployment_allowed': False, 'required_benchmarks':</text:p>
      <text:p text:style-name="Standard"><text:s text:c="4"/>… +4 lines</text:p>
      <text:p text:style-name="Standard"><text:s text:c="4"/>'recommendation': 'Deployment blocked: every official benchmark must pass</text:p>
      <text:p text:style-name="Standard"><text:s text:c="4"/>before deploy.'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No encontré hallazgos bloqueantes. Doy Sprint 10 por aprobado.</text:p>
      <text:p text:style-name="Standard"/>
      <text:p text:style-name="Standard"><text:s text:c="2"/>Verifiqué benchmark.py y corrí una batería real nueva. La corrida propia quedó</text:p>
      <text:p text:style-name="Standard"><text:s text:c="2"/>en report.json con los 5 benchmarks en passed:</text:p>
      <text:p text:style-name="Standard"/>
      <text:p text:style-name="Standard"><text:s text:c="2"/>- smoke-01</text:p>
      <text:p text:style-name="Standard"><text:s text:c="2"/>- crud-ui-02</text:p>
      <text:p text:style-name="Standard"><text:s text:c="2"/>- refactor-mid-03</text:p>
      <text:p text:style-name="Standard"><text:s text:c="2"/>- long-project-04</text:p>
      <text:p text:style-name="Standard"><text:s text:c="2"/>- recovery-05</text:p>
      <text:p text:style-name="Standard"/>
      <text:p text:style-name="Standard"><text:s text:c="2"/>También validé el gate de despliegue en ambos sentidos:</text:p>
      <text:p text:style-name="Standard"/>
      <text:p text:style-name="Standard"><text:s text:c="2"/>- con la batería completa, deployment_allowed = true</text:p>
      <text:p text:style-name="Standard"><text:s text:c="2"/>- con un benchmark fallido, el gate cae</text:p>
      <text:p text:style-name="Standard"><text:s text:c="2"/>- con benchmarks faltantes, el gate también cae</text:p>
      <text:p text:style-name="Standard"/>
      <text:p text:style-name="Standard"><text:s text:c="2"/>Evidencia adicional:</text:p>
      <text:p text:style-name="Standard"/>
      <text:p text:style-name="Standard"><text:s text:c="2"/>- se persistieron resultados por benchmark en runtime/benchmarks/&lt;run_id&gt;/</text:p>
      <text:p text:style-name="Standard"><text:s text:c="4"/>&lt;benchmark&gt;/result.json</text:p>
      <text:p text:style-name="Standard"><text:s text:c="2"/>- latest.json quedó actualizado en runtime/benchmarks/latest.json</text:p>
      <text:p text:style-name="Standard"><text:s text:c="2"/>- py_compile de benchmark.py pasó</text:p>
      <text:p text:style-name="Standard"/>
      <text:p text:style-name="Standard"><text:s text:c="2"/>Riesgos residuales, pero no bloqueantes:</text:p>
      <text:p text:style-name="Standard"/>
      <text:p text:style-name="Standard"><text:s text:c="2"/>- los benchmarks son sintéticos aunque verificables; no prueban navegador real</text:p>
      <text:p text:style-name="Standard"><text:s text:c="4"/>ni una corrida real de Codex extremo a extremo</text:p>
      <text:p text:style-name="Standard"><text:soft-page-break/><text:s text:c="2"/>- se acumulan artefactos en runtime/benchmarks/ y runtime/directives/</text:p>
      <text:p text:style-name="Standard"><text:s text:c="2"/>- dependen de python3 en PATH</text:p>
      <text:p text:style-name="Standard"><text:s text:c="2"/>- el harness sigue dependiendo de que backend.agent_runtime importe bien</text:p>
      <text:p text:style-name="Standard"/>
      <text:p text:style-name="Standard"><text:s text:c="2"/>Conclusión:</text:p>
      <text:p text:style-name="Standard"/>
      <text:p text:style-name="Standard"><text:s text:c="2"/>- Sprint 1 a Sprint 10: aprobados</text:p>
      <text:p text:style-name="Standard"><text:s text:c="2"/>- el harness base sí quedó cerrado</text:p>
      <text:p text:style-name="Standard"/>
      <text:p text:style-name="Standard"/>
      <text:p text:style-name="Standard">› ahora que sigue</text:p>
      <text:p text:style-name="Standard"/>
      <text:p text:style-name="Standard"/>
      <text:p text:style-name="Standard">• Ahora sigue dejar de construir el harness y empezar a convertirlo en producto</text:p>
      <text:p text:style-name="Standard"><text:s text:c="2"/>real.</text:p>
      <text:p text:style-name="Standard"/>
      <text:p text:style-name="Standard"><text:s text:c="2"/>Yo lo pondría así, en este orden:</text:p>
      <text:p text:style-name="Standard"/>
      <text:p text:style-name="Standard"><text:s text:c="2"/>1. Sprint 11: validación real end-to-end</text:p>
      <text:p text:style-name="Standard"/>
      <text:p text:style-name="Standard"><text:s text:c="2"/>- correr proyectos reales con Codex de verdad, no solo benchmarks sintéticos</text:p>
      <text:p text:style-name="Standard"><text:s text:c="2"/>- probar:</text:p>
      <text:p text:style-name="Standard"><text:s text:c="6"/>- proyecto corto</text:p>
      <text:p text:style-name="Standard"><text:s text:c="6"/>- proyecto mediano</text:p>
      <text:p text:style-name="Standard"><text:s text:c="6"/>- proyecto largo</text:p>
      <text:p text:style-name="Standard"><text:s text:c="6"/>- fallo + retry</text:p>
      <text:p text:style-name="Standard"><text:s text:c="6"/>- fallo + split + continuación</text:p>
      <text:p text:style-name="Standard"/>
      <text:p text:style-name="Standard"><text:s text:c="2"/>2. Sprint 12: observabilidad y UI del orquestador</text:p>
      <text:p text:style-name="Standard"/>
      <text:p text:style-name="Standard"><text:s text:c="2"/>- mostrar en la interfaz:</text:p>
      <text:p text:style-name="Standard"><text:s text:c="6"/>- tarea activa</text:p>
      <text:p text:style-name="Standard"><text:s text:c="6"/>- cola</text:p>
      <text:p text:style-name="Standard"><text:s text:c="6"/>- directiva actual</text:p>
      <text:p text:style-name="Standard"><text:s text:c="6"/>- checkpoint actual</text:p>
      <text:p text:style-name="Standard"><text:s text:c="6"/>- recovery decision</text:p>
      <text:p text:style-name="Standard"><text:s text:c="6"/>- benchmark status</text:p>
      <text:p text:style-name="Standard"><text:s text:c="2"/>- o sea: que el usuario vea el control plane vivo</text:p>
      <text:p text:style-name="Standard"/>
      <text:p text:style-name="Standard"><text:s text:c="2"/>3. Sprint 13: endurecimiento operativo</text:p>
      <text:p text:style-name="Standard"/>
      <text:p text:style-name="Standard"><text:s text:c="2"/>- tests automáticos del camino nuevo de agent_runtime.py</text:p>
      <text:p text:style-name="Standard"><text:s text:c="2"/>- política de retención para runtime/benchmarks/ y runtime/directives/</text:p>
      <text:p text:style-name="Standard"><text:s text:c="2"/>- limpieza de artefactos viejos</text:p>
      <text:p text:style-name="Standard"><text:s text:c="2"/>- manejo más fino de estado running/pending/blocked/retry</text:p>
      <text:p text:style-name="Standard"/>
      <text:p text:style-name="Standard"><text:s text:c="2"/>4. Sprint 14: retiro del camino viejo</text:p>
      <text:p text:style-name="Standard"/>
      <text:p text:style-name="Standard"><text:s text:c="2"/>- dejar el flujo viejo monolítico como fallback controlado o apagarlo</text:p>
      <text:p text:style-name="Standard"><text:s text:c="2"/>- hacer que el sistema use por defecto:</text:p>
      <text:p text:style-name="Standard"><text:s text:c="6"/>- queue</text:p>
      <text:p text:style-name="Standard"><text:s text:c="6"/>- context</text:p>
      <text:p text:style-name="Standard"><text:soft-page-break/><text:s text:c="6"/>- habla</text:p>
      <text:p text:style-name="Standard"><text:s text:c="6"/>- directive</text:p>
      <text:p text:style-name="Standard"><text:s text:c="6"/>- worker</text:p>
      <text:p text:style-name="Standard"><text:s text:c="6"/>- validator</text:p>
      <text:p text:style-name="Standard"><text:s text:c="6"/>- recovery</text:p>
      <text:p text:style-name="Standard"/>
      <text:p text:style-name="Standard"><text:s text:c="2"/>5. Sprint 15: piloto largo real</text:p>
      <text:p text:style-name="Standard"/>
      <text:p text:style-name="Standard"><text:s text:c="2"/>- tomar un proyecto serio y dejar que el sistema lo ejecute por etapas</text:p>
      <text:p text:style-name="Standard"><text:s text:c="2"/>- ahí se prueba si de verdad ya es “máquina de proyectos largos”</text:p>
      <text:p text:style-name="Standard"/>
      <text:p text:style-name="Standard"><text:s text:c="2"/>Mi recomendación fuerte:</text:p>
      <text:p text:style-name="Standard"><text:s text:c="2"/>lo siguiente inmediato no es otra arquitectura base; es Sprint 11 con pruebas</text:p>
      <text:p text:style-name="Standard"><text:s text:c="2"/>reales no sintéticas.</text:p>
      <text:p text:style-name="Standard"/>
      <text:p text:style-name="Standard"><text:s text:c="2"/>Si quieres, te redacto ya el prompt blindado para Sprint 11.</text:p>
      <text:p text:style-name="Standard"/>
      <text:p text:style-name="Standard"/>
      <text:p text:style-name="Standard">› bueno continuemos entonces con lo qu tu dises</text:p>
      <text:p text:style-name="Standard"/>
      <text:p text:style-name="Standard"/>
      <text:p text:style-name="Standard">• Usa este prompt para el siguiente paso, ya fuera del harness base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y valid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una validacion real end-to-end posterior al harness base.</text:p>
      <text:p text:style-name="Standard"><text:s text:c="2"/>Esto ya no es Sprint 10.</text:p>
      <text:p text:style-name="Standard"><text:s text:c="2"/>Esto es la siguiente fase: validacion real del sistema completo.</text:p>
      <text:p text:style-name="Standard"/>
      <text:p text:style-name="Standard"><text:s text:c="2"/>ALCANCE EXACTO</text:p>
      <text:p text:style-name="Standard"><text:s text:c="2"/>Debes enfocarte en:</text:p>
      <text:p text:style-name="Standard"><text:s text:c="2"/>- ejecutar corridas reales del control plane usando el runtime nuevo</text:p>
      <text:p text:style-name="Standard"><text:s text:c="2"/>- dejar evidencia auditable de esas corridas</text:p>
      <text:p text:style-name="Standard"><text:soft-page-break/><text:s text:c="2"/>- detectar si el sistema ya sirve en escenarios cortos, medianos y de recovery</text:p>
      <text:p text:style-name="Standard"><text:s text:c="2"/>real</text:p>
      <text:p text:style-name="Standard"/>
      <text:p text:style-name="Standard"><text:s text:c="2"/>Puedes crear solo lo minimo coherente para esta fase, por ejemplo:</text:p>
      <text:p text:style-name="Standard"><text:s text:c="2"/>- orchestrator/real_validation.py</text:p>
      <text:p text:style-name="Standard"><text:s text:c="2"/>- runtime/real_runs/</text:p>
      <text:p text:style-name="Standard"><text:s text:c="2"/>- docs/real_validation/</text:p>
      <text:p text:style-name="Standard"><text:s text:c="2"/>- reportes o artefactos de validacion real</text:p>
      <text:p text:style-name="Standard"/>
      <text:p text:style-name="Standard"><text:s text:c="2"/>No entres todavia en UI nueva ni en rediseño grande adicional.</text:p>
      <text:p text:style-name="Standard"/>
      <text:p text:style-name="Standard"><text:s text:c="2"/>OBJETIVO FUNCIONAL</text:p>
      <text:p text:style-name="Standard"><text:s text:c="2"/>Demostrar con corridas reales, no solo sintéticas, que el sistema puede:</text:p>
      <text:p text:style-name="Standard"><text:s text:c="2"/>- preparar tarea desde cola</text:p>
      <text:p text:style-name="Standard"><text:s text:c="2"/>- construir contexto</text:p>
      <text:p text:style-name="Standard"><text:s text:c="2"/>- generar HABLA procedural</text:p>
      <text:p text:style-name="Standard"><text:s text:c="2"/>- generar directiva</text:p>
      <text:p text:style-name="Standard"><text:s text:c="2"/>- ejecutar worker</text:p>
      <text:p text:style-name="Standard"><text:s text:c="2"/>- validar</text:p>
      <text:p text:style-name="Standard"><text:s text:c="2"/>- recuperar tras fallo</text:p>
      <text:p text:style-name="Standard"><text:s text:c="2"/>- continuar con la siguiente tarea o subtarea</text:p>
      <text:p text:style-name="Standard"/>
      <text:p text:style-name="Standard"><text:s text:c="2"/>ESCENARIOS OBLIGATORIOS</text:p>
      <text:p text:style-name="Standard"/>
      <text:p text:style-name="Standard"><text:s text:c="2"/>1. Escenario corto real</text:p>
      <text:p text:style-name="Standard"><text:s text:c="2"/>Debes ejecutar una corrida real corta que pruebe:</text:p>
      <text:p text:style-name="Standard"><text:s text:c="2"/>- una tarea simple</text:p>
      <text:p text:style-name="Standard"><text:s text:c="2"/>- directiva real</text:p>
      <text:p text:style-name="Standard"><text:s text:c="2"/>- ejecución real</text:p>
      <text:p text:style-name="Standard"><text:s text:c="2"/>- validación real</text:p>
      <text:p text:style-name="Standard"><text:s text:c="2"/>- evidencia persistida</text:p>
      <text:p text:style-name="Standard"/>
      <text:p text:style-name="Standard"><text:s text:c="2"/>2. Escenario mediano real</text:p>
      <text:p text:style-name="Standard"><text:s text:c="2"/>Debes ejecutar una secuencia multi-tarea real que pruebe:</text:p>
      <text:p text:style-name="Standard"><text:s text:c="2"/>- cola persistente</text:p>
      <text:p text:style-name="Standard"><text:s text:c="2"/>- dependencias</text:p>
      <text:p text:style-name="Standard"><text:s text:c="2"/>- varias directivas</text:p>
      <text:p text:style-name="Standard"><text:s text:c="2"/>- varios resultados estructurados</text:p>
      <text:p text:style-name="Standard"><text:s text:c="2"/>- progreso por tareas, no por sesión monolítica</text:p>
      <text:p text:style-name="Standard"/>
      <text:p text:style-name="Standard"><text:s text:c="2"/>3. Escenario recovery real</text:p>
      <text:p text:style-name="Standard"><text:s text:c="2"/>Debes ejecutar una corrida que produzca fallo real y luego:</text:p>
      <text:p text:style-name="Standard"><text:s text:c="2"/>- retry real</text:p>
      <text:p text:style-name="Standard"><text:s text:c="2"/>o</text:p>
      <text:p text:style-name="Standard"><text:s text:c="2"/>- split real</text:p>
      <text:p text:style-name="Standard"><text:s text:c="2"/>y después continuidad real</text:p>
      <text:p text:style-name="Standard"/>
      <text:p text:style-name="Standard"><text:s text:c="2"/>4. Diagnóstico final</text:p>
      <text:p text:style-name="Standard"><text:s text:c="2"/>Debes dejar una conclusión honesta:</text:p>
      <text:p text:style-name="Standard"><text:s text:c="2"/>- qué ya funciona en producción controlada</text:p>
      <text:p text:style-name="Standard"><text:s text:c="2"/>- qué todavía falla</text:p>
      <text:p text:style-name="Standard"><text:s text:c="2"/>- qué falta para confiar en proyectos largos reales</text:p>
      <text:p text:style-name="Standard"><text:soft-page-break/></text:p>
      <text:p text:style-name="Standard"><text:s text:c="2"/>REQUISITOS FUNCIONALES</text:p>
      <text:p text:style-name="Standard"/>
      <text:p text:style-name="Standard"><text:s text:c="2"/>1. Si creas `orchestrator/real_validation.py`, debe poder:</text:p>
      <text:p text:style-name="Standard"><text:s text:c="2"/>- preparar entornos de prueba reales</text:p>
      <text:p text:style-name="Standard"><text:s text:c="2"/>- disparar corridas del runtime nuevo</text:p>
      <text:p text:style-name="Standard"><text:s text:c="2"/>- recolectar evidencia</text:p>
      <text:p text:style-name="Standard"><text:s text:c="2"/>- guardar resultados estructurados</text:p>
      <text:p text:style-name="Standard"><text:s text:c="2"/>- producir un reporte final claro</text:p>
      <text:p text:style-name="Standard"/>
      <text:p text:style-name="Standard"><text:s text:c="2"/>2. La evidencia real debe incluir como mínimo:</text:p>
      <text:p text:style-name="Standard"><text:s text:c="2"/>- task_queue.json</text:p>
      <text:p text:style-name="Standard"><text:s text:c="2"/>- project_state.json</text:p>
      <text:p text:style-name="Standard"><text:s text:c="2"/>- task_history.jsonl</text:p>
      <text:p text:style-name="Standard"><text:s text:c="2"/>- failures.jsonl cuando aplique</text:p>
      <text:p text:style-name="Standard"><text:s text:c="2"/>- checkpoints cuando apliquen</text:p>
      <text:p text:style-name="Standard"><text:s text:c="2"/>- directivas generadas</text:p>
      <text:p text:style-name="Standard"><text:s text:c="2"/>- resultado final por escenario</text:p>
      <text:p text:style-name="Standard"/>
      <text:p text:style-name="Standard"><text:s text:c="2"/>3. El reporte final debe dejar claro:</text:p>
      <text:p text:style-name="Standard"><text:s text:c="2"/>- escenario</text:p>
      <text:p text:style-name="Standard"><text:s text:c="2"/>- estado final</text:p>
      <text:p text:style-name="Standard"><text:s text:c="2"/>- tareas ejecutadas</text:p>
      <text:p text:style-name="Standard"><text:s text:c="2"/>- decisiones de recovery</text:p>
      <text:p text:style-name="Standard"><text:s text:c="2"/>- artefactos generados</text:p>
      <text:p text:style-name="Standard"><text:s text:c="2"/>- limitaciones observadas</text:p>
      <text:p text:style-name="Standard"><text:s text:c="2"/>- si el sistema ya pasó o no una validación real mínima</text:p>
      <text:p text:style-name="Standard"/>
      <text:p text:style-name="Standard"><text:s text:c="2"/>4. Si el entorno impide una corrida ideal:</text:p>
      <text:p text:style-name="Standard"><text:s text:c="2"/>- no inventes éxito</text:p>
      <text:p text:style-name="Standard"><text:s text:c="2"/>- degrada de forma clara</text:p>
      <text:p text:style-name="Standard"><text:s text:c="2"/>- deja evidencia exacta del bloqueo</text:p>
      <text:p text:style-name="Standard"><text:s text:c="2"/>- separa “harness pasa” de “corrida real pasa”</text:p>
      <text:p text:style-name="Standard"/>
      <text:p text:style-name="Standard"><text:s text:c="2"/>RESTRICCIONES DURAS</text:p>
      <text:p text:style-name="Standard"><text:s text:c="2"/>- no rehacer la arquitectura</text:p>
      <text:p text:style-name="Standard"><text:s text:c="2"/>- no crear UI nueva en esta corrida</text:p>
      <text:p text:style-name="Standard"><text:s text:c="2"/>- no entrar en benchmarks nuevos fuera de los oficiales ya cerrados</text:p>
      <text:p text:style-name="Standard"><text:s text:c="2"/>- no tocar agent_runtime.py salvo ajuste mínimo inevitable y bien justificado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éxito sin evidencia real en disco</text:p>
      <text:p text:style-name="Standard"><text:s text:c="2"/>- no confundir validación sintética con validación real</text:p>
      <text:p text:style-name="Standard"/>
      <text:p text:style-name="Standard"><text:s text:c="2"/>CRITERIOS DE ACEPTACION</text:p>
      <text:p text:style-name="Standard"><text:s text:c="2"/>Esta fase queda correcta si:</text:p>
      <text:p text:style-name="Standard"><text:s text:c="2"/>- existen corridas reales ejecutadas y auditables</text:p>
      <text:p text:style-name="Standard"><text:s text:c="2"/>- existe evidencia persistida por escenario</text:p>
      <text:p text:style-name="Standard"><text:s text:c="2"/>- existe reporte final honesto</text:p>
      <text:p text:style-name="Standard"><text:s text:c="2"/>- queda claro qué tan cerca está el sistema de proyectos largos reales</text:p>
      <text:p text:style-name="Standard"><text:s text:c="2"/>- no se maquilla un fallo como si fuera éxito</text:p>
      <text:p text:style-name="Standard"/>
      <text:p text:style-name="Standard"><text:soft-page-break/><text:s text:c="2"/>VALIDACION MINIMA OBLIGATORIA</text:p>
      <text:p text:style-name="Standard"><text:s text:c="2"/>Debes dejar evidencia real de que:</text:p>
      <text:p text:style-name="Standard"/>
      <text:p text:style-name="Standard"><text:s text:c="2"/>1. Escenario corto</text:p>
      <text:p text:style-name="Standard"><text:s text:c="2"/>- se ejecutó y dejó artefactos reales</text:p>
      <text:p text:style-name="Standard"/>
      <text:p text:style-name="Standard"><text:s text:c="2"/>2. Escenario mediano</text:p>
      <text:p text:style-name="Standard"><text:s text:c="2"/>- se ejecutó por varias tareas reales</text:p>
      <text:p text:style-name="Standard"><text:s text:c="2"/>- la cola avanzó por dependencias</text:p>
      <text:p text:style-name="Standard"/>
      <text:p text:style-name="Standard"><text:s text:c="2"/>3. Escenario recovery</text:p>
      <text:p text:style-name="Standard"><text:s text:c="2"/>- hubo fallo real</text:p>
      <text:p text:style-name="Standard"><text:s text:c="2"/>- hubo retry o split real</text:p>
      <text:p text:style-name="Standard"><text:s text:c="2"/>- hubo continuación real posterior</text:p>
      <text:p text:style-name="Standard"/>
      <text:p text:style-name="Standard"><text:s text:c="2"/>4. Reporte final</text:p>
      <text:p text:style-name="Standard"><text:s text:c="2"/>- distingue claramente:</text:p>
      <text:p text:style-name="Standard"><text:s text:c="4"/>- pasó real</text:p>
      <text:p text:style-name="Standard"><text:s text:c="4"/>- falló real</text:p>
      <text:p text:style-name="Standard"><text:s text:c="4"/>- bloqueo de entorno</text:p>
      <text:p text:style-name="Standard"><text:s text:c="2"/>- no mezcla eso con humo</text:p>
      <text:p text:style-name="Standard"/>
      <text:p text:style-name="Standard"><text:s text:c="2"/>SI AGREGAS TESTS</text:p>
      <text:p text:style-name="Standard"><text:s text:c="2"/>Mantenlos pequeños y enfocados en esta fase de validación real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corridas reales ejecutadas</text:p>
      <text:p text:style-name="Standard"><text:s text:c="2"/>3. evidencia persistida</text:p>
      <text:p text:style-name="Standard"><text:s text:c="2"/>4. limitaciones reales encontradas</text:p>
      <text:p text:style-name="Standard"><text:s text:c="2"/>5. veredicto honesto sobre si el sistema ya está listo para proyectos reales</text:p>
      <text:p text:style-name="Standard"><text:s text:c="2"/>cortos, medianos y largos</text:p>
      <text:p text:style-name="Standard"/>
      <text:p text:style-name="Standard"><text:s text:c="2"/>Cuando termine, yo te lo audito igual que los sprints anteriores.</text:p>
      <text:p text:style-name="Standard"/>
      <text:p text:style-name="Standard"/>
      <text:p text:style-name="Standard">› ya termino <text:s/>revisa</text:p>
      <text:p text:style-name="Standard"/>
      <text:p text:style-name="Standard"/>
      <text:p text:style-name="Standard">• Voy a auditar esta fase de validación real: revisar qué artefactos dejó, qué</text:p>
      <text:p text:style-name="Standard"><text:s text:c="2"/>corridas ejecutó de verdad y si el veredicto final está respaldado por</text:p>
      <text:p text:style-name="Standard"><text:s text:c="2"/>evidencia persistida.</text:p>
      <text:p text:style-name="Standard"/>
      <text:p text:style-name="Standard">• Explored</text:p>
      <text:p text:style-name="Standard"><text:s text:c="2"/>└ List real_validation</text:p>
      <text:p text:style-name="Standard"><text:s text:c="4"/>List real_runs</text:p>
      <text:p text:style-name="Standard"><text:s text:c="4"/>List orchestrator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<text:soft-page-break/>• Ya aparecieron el módulo y los reportes. Ahora voy a leer real_validation.py y</text:p>
      <text:p text:style-name="Standard"><text:s text:c="2"/>el último reporte para comprobar si la “validación real” es realmente distinta</text:p>
      <text:p text:style-name="Standard"><text:s text:c="2"/>del harness sintético o si sigue siendo la misma clase de simulación con otro</text:p>
      <text:p text:style-name="Standard"><text:s text:c="2"/>nombre.</text:p>
      <text:p text:style-name="Standard"/>
      <text:p text:style-name="Standard">• Explored</text:p>
      <text:p text:style-name="Standard"><text:s text:c="2"/>└ Read real_validation.py, latest.json, latest.m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ncontré un detalle delicado en el último reporte: las directivas del</text:p>
      <text:p text:style-name="Standard"><text:s text:c="2"/>escenario “real” salen degradadas y mirando el repo raíz en vez del workspace</text:p>
      <text:p text:style-name="Standard"><text:s text:c="2"/>del escenario. Voy a confirmar si eso se repite y si el veredicto final está</text:p>
      <text:p text:style-name="Standard"><text:s text:c="2"/>ignorando ese fallo de alineación.</text:p>
      <text:p text:style-name="Standard"/>
      <text:p text:style-name="Standard">• Explored</text:p>
      <text:p text:style-name="Standard"><text:s text:c="2"/>└ Search context_degraded|Missing required evidence before execution|Missing</text:p>
      <text:p text:style-name="Standard"><text:s text:c="11"/>expected file|mandatory_repo_root|workspace in 20260513T012107Z-</text:p>
      <text:p text:style-name="Standard">ff5cc8b8</text:p>
      <text:p text:style-name="Standard"/>
      <text:p text:style-name="Standard">• Ran python3 -m py_compile "/home/neurodriver/BASE _METACOGNICION_COLOMBIA/</text:p>
      <text:p text:style-name="Standard"><text:s text:c="2"/>│ vista_IA/architecture-react-three-flask-socketio/orchestrator/</text:p>
      <text:p text:style-name="Standard"><text:s text:c="2"/>│ real_validation.py"</text:p>
      <text:p text:style-name="Standard"><text:s text:c="2"/>└ (no output)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real_validation import run_real_validations</text:p>
      <text:p text:style-name="Standard"><text:s text:c="2"/>│ … +10 lines</text:p>
      <text:p text:style-name="Standard"><text:s text:c="2"/>└ run_id 20260513T013153Z-50384550</text:p>
      <text:p text:style-name="Standard"><text:s text:c="4"/>summary {'total': 3, 'passed': ['short-real', 'medium-real',</text:p>
      <text:p text:style-name="Standard"><text:s text:c="4"/>… +58 lines</text:p>
      <text:p text:style-name="Standard"><text:s text:c="4"/>real_runs/20260513T013153Z-50384550/recovery-real/runtime/checkpoints/</text:p>
      <text:p text:style-name="Standard"><text:s text:c="4"/>real-recovery-001-retry-0-recovery.json'}, 'recovery_action': 'retry'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confirmé el problema principal: las corridas “reales” pasan aunque la</text:p>
      <text:p text:style-name="Standard"><text:s text:c="2"/>directiva salga degradada y con evidencia pre-ejecución apuntando al repo</text:p>
      <text:p text:style-name="Standard"><text:s text:c="2"/>raíz, no al workspace del escenario. Voy a sacar líneas exactas para dejar la</text:p>
      <text:p text:style-name="Standard"><text:s text:c="2"/>revisión cerrada con referencias concretas.</text:p>
      <text:p text:style-name="Standard"/>
      <text:p text:style-name="Standard">• Explored</text:p>
      <text:p text:style-name="Standard"><text:s text:c="2"/>└ Read real_validation.py, agent_runtime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tengo la causa del desalineamiento: real_validation.py intenta aislar el</text:p>
      <text:p text:style-name="Standard"><text:s text:c="2"/>workspace, pero AgentRuntime sigue fijando self.repo_root al repo real. Voy a</text:p>
      <text:p text:style-name="Standard"><text:soft-page-break/><text:s text:c="2"/>mirar las funciones de diagnóstico final y limitaciones, porque ahí puede</text:p>
      <text:p text:style-name="Standard"><text:s text:c="2"/>estar el problema de clasificación del resultado como “passed_real”.</text:p>
      <text:p text:style-name="Standard"/>
      <text:p text:style-name="Standard">• Explored</text:p>
      <text:p text:style-name="Standard"><text:s text:c="2"/>└ Read real_validation.py</text:p>
      <text:p text:style-name="Standard"/>
      <text:p text:style-name="Standard">• Ran python3 - &lt;&lt;'PY'</text:p>
      <text:p text:style-name="Standard"><text:s text:c="2"/>│ import json</text:p>
      <text:p text:style-name="Standard"><text:s text:c="2"/>│ from pathlib import Path</text:p>
      <text:p text:style-name="Standard"><text:s text:c="2"/>│ … +6 lines</text:p>
      <text:p text:style-name="Standard"><text:s text:c="2"/>└ short-real passed_real ['Worker commands were deterministic local processes,</text:p>
      <text:p text:style-name="Standard"><text:s text:c="4"/>not an external Codex model run.', 'This validates runtime mechanics and</text:p>
      <text:p text:style-name="Standard"><text:s text:c="4"/>… +11 lines</text:p>
      <text:p text:style-name="Standard"><text:s text:c="4"/>pre-execution evidence is still based on repository-root inspection while</text:p>
      <text:p text:style-name="Standard"><text:s text:c="4"/>task validation uses the isolated scenario workspace.']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ncontré 2 hallazgos.</text:p>
      <text:p text:style-name="Standard"/>
      <text:p text:style-name="Standard"><text:s text:c="2"/>- Alta: la fase marca escenarios como passed_real aunque la directiva salga</text:p>
      <text:p text:style-name="Standard"><text:s text:c="4"/>degradada y mirando la raíz equivocada. En real_validation.py:256,</text:p>
      <text:p text:style-name="Standard"><text:s text:c="4"/>real_validation.py:351 y real_validation.py:438 los checks solo exigen</text:p>
      <text:p text:style-name="Standard"><text:s text:c="4"/>completado/validación/artefactos, pero nunca exigen que la directiva se haya</text:p>
      <text:p text:style-name="Standard"><text:s text:c="4"/>generado con context_degraded = false ni que la evidencia previa apunte al</text:p>
      <text:p text:style-name="Standard"><text:s text:c="4"/>workspace real del escenario. La causa está en real_validation.py:489, que</text:p>
      <text:p text:style-name="Standard"><text:s text:c="4"/>crea AgentRuntime(app_root=root, ...), mientras agent_runtime.py:1467 fija</text:p>
      <text:p text:style-name="Standard"><text:s text:c="4"/>self.repo_root = REPO_ROOT. Lo reproduje al rerun de run_real_validations():</text:p>
      <text:p text:style-name="Standard"><text:s text:c="4"/>el reporte volvió a salir aprobado, pero el artefacto persistido sigue</text:p>
      <text:p text:style-name="Standard"><text:s text:c="4"/>admitiendo la limitación “Directive pre-execution evidence is still based on</text:p>
      <text:p text:style-name="Standard"><text:s text:c="4"/>repository-root inspection while task validation uses the isolated scenario</text:p>
      <text:p text:style-name="Standard"><text:s text:c="4"/>workspace” en latest.json y latest.md. Eso significa que la fase no valida</text:p>
      <text:p text:style-name="Standard"><text:s text:c="4"/>limpio el encadenamiento context -&gt; directive -&gt; workspace; valida más bien</text:p>
      <text:p text:style-name="Standard"><text:s text:c="4"/>executor/validator sobre un workspace aislado mientras la directiva sigue</text:p>
      <text:p text:style-name="Standard"><text:s text:c="4"/>inspeccionando otra raíz.</text:p>
      <text:p text:style-name="Standard"><text:s text:c="2"/>- Media: las corridas “reales” siguen gobernadas por el alcance de Sprint 10,</text:p>
      <text:p text:style-name="Standard"><text:s text:c="4"/>no por la fase nueva de validación real. En real_validation.py:241,</text:p>
      <text:p text:style-name="Standard"><text:s text:c="4"/>real_validation.py:341 y real_validation.py:412 siempre se pasa</text:p>
      <text:p text:style-name="Standard"><text:s text:c="4"/>sprint_number=10, y además real_validation.py:503 fija</text:p>
      <text:p text:style-name="Standard"><text:s text:c="4"/>runtime.control_plane_sprint_number = 10. Por eso las directivas generadas</text:p>
      <text:p text:style-name="Standard"><text:s text:c="4"/>para REAL-SHORT-001, REAL-MED-* y REAL-RECOVERY-* siguen diciendo “Sprint:</text:p>
      <text:p text:style-name="Standard"><text:s text:c="4"/>10 - Benchmarks y puerta de despliegue” y “Exact deliverables: orchestrator/</text:p>
      <text:p text:style-name="Standard"><text:s text:c="4"/>benchmark.py”, aunque las tareas reales del escenario sean notes/</text:p>
      <text:p text:style-name="Standard"><text:s text:c="4"/>short_real.md, app/domain.py, recovery/recovered.txt, etc. La validación sí</text:p>
      <text:p text:style-name="Standard"><text:s text:c="4"/>prueba ejecución, pero no está probando generación de directivas bajo el</text:p>
      <text:p text:style-name="Standard"><text:s text:c="4"/>scope correcto de esta fase.</text:p>
      <text:p text:style-name="Standard"/>
      <text:p text:style-name="Standard"><text:s text:c="2"/>Validación que sí pasó:</text:p>
      <text:p text:style-name="Standard"/>
      <text:p text:style-name="Standard"><text:s text:c="2"/>- real_validation.py compila.</text:p>
      <text:p text:style-name="Standard"><text:s text:c="2"/>- Reejecuté run_real_validations() y produjo una corrida nueva con los 3</text:p>
      <text:p text:style-name="Standard"><text:soft-page-break/><text:s text:c="4"/>escenarios en passed_real.</text:p>
      <text:p text:style-name="Standard"><text:s text:c="2"/>- Los artefactos se persisten bien en runtime/real_runs/ y docs/</text:p>
      <text:p text:style-name="Standard"><text:s text:c="4"/>real_validation/.</text:p>
      <text:p text:style-name="Standard"/>
      <text:p text:style-name="Standard"><text:s text:c="2"/>No la aprobaría todavía como “validación real cerrada”. La ejecución mecánica</text:p>
      <text:p text:style-name="Standard"><text:s text:c="2"/>funciona, pero el contexto/directiva siguen desalineados con el workspace real</text:p>
      <text:p text:style-name="Standard"><text:s text:c="2"/>del escenario, y el scope del sprint que gobierna la directiva también es</text:p>
      <text:p text:style-name="Standard"><text:s text:c="2"/>incorrecto.</text:p>
      <text:p text:style-name="Standard"/>
      <text:p text:style-name="Standard"/>
      <text:p text:style-name="Standard">› entonces</text:p>
      <text:p text:style-name="Standard"/>
      <text:p text:style-name="Standard"/>
      <text:p text:style-name="Standard">• Entonces no la damos por aprobada todavía.</text:p>
      <text:p text:style-name="Standard"/>
      <text:p text:style-name="Standard"><text:s text:c="2"/>La lectura correcta es:</text:p>
      <text:p text:style-name="Standard"/>
      <text:p text:style-name="Standard"><text:s text:c="2"/>- sí ejecuta tareas reales,</text:p>
      <text:p text:style-name="Standard"><text:s text:c="2"/>- sí deja evidencia,</text:p>
      <text:p text:style-name="Standard"><text:s text:c="2"/>- sí prueba retry y continuidad,</text:p>
      <text:p text:style-name="Standard"><text:s text:c="2"/>- pero no valida limpio el sistema completo, porque la directiva todavía nace</text:p>
      <text:p text:style-name="Standard"><text:s text:c="4"/>con una raíz/contexto mal alineados y además usa Sprint 10 como scope aunque</text:p>
      <text:p text:style-name="Standard"><text:s text:c="4"/>ya estamos en otra fase.</text:p>
      <text:p text:style-name="Standard"/>
      <text:p text:style-name="Standard"><text:s text:c="2"/>O sea:</text:p>
      <text:p text:style-name="Standard"/>
      <text:p text:style-name="Standard"><text:s text:c="2"/>- el motor está funcionando,</text:p>
      <text:p text:style-name="Standard"><text:s text:c="2"/>- la validación está bien encaminada,</text:p>
      <text:p text:style-name="Standard"><text:s text:c="2"/>- pero el diagnóstico final todavía está sobrevendido.</text:p>
      <text:p text:style-name="Standard"/>
      <text:p text:style-name="Standard"><text:s text:c="2"/>Lo correcto ahora es hacer un prompt correctivo corto para que el otro agente</text:p>
      <text:p text:style-name="Standard"><text:s text:c="2"/>arregle solo estos 2 puntos:</text:p>
      <text:p text:style-name="Standard"/>
      <text:p text:style-name="Standard"><text:s text:c="2"/>1. alinear repo_root/contexto/directiva con el workspace real del escenario,</text:p>
      <text:p text:style-name="Standard"><text:s text:c="2"/>2. dejar de forzar sprint_number = 10 en esta fase de validación real.</text:p>
      <text:p text:style-name="Standard"/>
      <text:p text:style-name="Standard"><text:s text:c="2"/>Si quieres, te lo redacto ya.</text:p>
      <text:p text:style-name="Standard"/>
      <text:p text:style-name="Standard"/>
      <text:p text:style-name="Standard">› ok hagamo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oft-page-break/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Corregir unicamente los bugs de la fase de validacion real.</text:p>
      <text:p text:style-name="Standard"><text:s text:c="2"/>No rehagas la arquitectura y no avances otra fase.</text:p>
      <text:p text:style-name="Standard"/>
      <text:p text:style-name="Standard"><text:s text:c="2"/>BUGS A CORREGIR</text:p>
      <text:p text:style-name="Standard"/>
      <text:p text:style-name="Standard"><text:s text:c="2"/>1. BUG DE ALINEACION ENTRE DIRECTIVA Y WORKSPACE REAL</text:p>
      <text:p text:style-name="Standard"><text:s text:c="2"/>Problema real:</text:p>
      <text:p text:style-name="Standard"><text:s text:c="2"/>Las corridas de `orchestrator/real_validation.py` ejecutan el worker sobre un</text:p>
      <text:p text:style-name="Standard"><text:s text:c="2"/>workspace aislado del escenario, pero la directiva y la inspeccion pre-</text:p>
      <text:p text:style-name="Standard"><text:s text:c="2"/>ejecucion siguen naciendo contra la raiz real del repo principal.</text:p>
      <text:p text:style-name="Standard"><text:s text:c="2"/>Eso hace que:</text:p>
      <text:p text:style-name="Standard"><text:s text:c="2"/>- `context_degraded = true`</text:p>
      <text:p text:style-name="Standard"><text:s text:c="2"/>- la directiva reporte evidencia faltante antes de ejecutar</text:p>
      <text:p text:style-name="Standard"><text:s text:c="2"/>- `mandatory_repo_root` no coincida con el workspace real del escenario</text:p>
      <text:p text:style-name="Standard"><text:s text:c="2"/>- la fase marque `passed_real` aunque el encadenamiento contexto -&gt; directiva</text:p>
      <text:p text:style-name="Standard"><text:s text:c="2"/>-&gt; workspace siga desalineado</text:p>
      <text:p text:style-name="Standard"/>
      <text:p text:style-name="Standard"><text:s text:c="2"/>Correccion esperada:</text:p>
      <text:p text:style-name="Standard"><text:s text:c="2"/>- las corridas de validacion real deben generar contexto y directiva alineados</text:p>
      <text:p text:style-name="Standard"><text:s text:c="2"/>con el workspace real del escenario o con una representacion coherente y</text:p>
      <text:p text:style-name="Standard"><text:s text:c="2"/>explicitamente correcta de ese escenario</text:p>
      <text:p text:style-name="Standard"><text:s text:c="2"/>- no debe quedar `passed_real` si la directiva nace degradada por mirar la</text:p>
      <text:p text:style-name="Standard"><text:s text:c="2"/>raiz equivocada</text:p>
      <text:p text:style-name="Standard"><text:s text:c="2"/>- la fase debe comprobar de forma real que la directiva y la ejecucion apuntan</text:p>
      <text:p text:style-name="Standard"><text:s text:c="2"/>al mismo entorno de trabajo</text:p>
      <text:p text:style-name="Standard"/>
      <text:p text:style-name="Standard"><text:s text:c="2"/>2. BUG DE SCOPE FORZADO A SPRINT 10</text:p>
      <text:p text:style-name="Standard"><text:s text:c="2"/>Problema real:</text:p>
      <text:p text:style-name="Standard"><text:s text:c="2"/>La validacion real sigue forzando `sprint_number = 10` y</text:p>
      <text:p text:style-name="Standard"><text:s text:c="2"/>`control_plane_sprint_number = 10`.</text:p>
      <text:p text:style-name="Standard"><text:s text:c="2"/>Entonces las directivas de esta fase siguen diciendo:</text:p>
      <text:p text:style-name="Standard"><text:s text:c="2"/>- Sprint 10</text:p>
      <text:p text:style-name="Standard"><text:s text:c="2"/>- deliverable `orchestrator/benchmark.py`</text:p>
      <text:p text:style-name="Standard"><text:s text:c="2"/>aunque la tarea real del escenario sea otra</text:p>
      <text:p text:style-name="Standard"/>
      <text:p text:style-name="Standard"><text:s text:c="2"/>Eso vuelve incorrecto el scope operativo de la directiva.</text:p>
      <text:p text:style-name="Standard"/>
      <text:p text:style-name="Standard"><text:s text:c="2"/>Correccion esperada:</text:p>
      <text:p text:style-name="Standard"><text:s text:c="2"/>- la fase de validacion real no debe forzar scope incorrecto</text:p>
      <text:p text:style-name="Standard"><text:s text:c="2"/>- si necesita un scope especial, debe ser coherente con esta fase real</text:p>
      <text:p text:style-name="Standard"><text:s text:c="2"/>- la directiva no debe declarar deliverables de Sprint 10 cuando la tarea real</text:p>
      <text:p text:style-name="Standard"><text:soft-page-break/><text:s text:c="2"/>es otra</text:p>
      <text:p text:style-name="Standard"><text:s text:c="2"/>- si no hay sprint formal aplicable, degradar claramente o usar un contexto</text:p>
      <text:p text:style-name="Standard"><text:s text:c="2"/>explícito y honesto, no uno falso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orchestrator/real_validation.py</text:p>
      <text:p text:style-name="Standard"><text:s text:c="2"/>- ajustes minimos estrictamente necesarios en backend/agent_runtime.py o</text:p>
      <text:p text:style-name="Standard"><text:s text:c="2"/>loaders/contexto si son inevitables para alinear esta fase</text:p>
      <text:p text:style-name="Standard"><text:s text:c="2"/>- tests o validaciones pequenas y enfocadas en estos dos bugs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UI</text:p>
      <text:p text:style-name="Standard"><text:s text:c="2"/>- no inventar una fase falsa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><text:s text:c="2"/>- no volver a marcar `passed_real` si la directiva sigue degradada por mirar</text:p>
      <text:p text:style-name="Standard"><text:s text:c="2"/>la raiz incorrecta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Alineacion real</text:p>
      <text:p text:style-name="Standard"><text:s text:c="2"/>- en una corrida real, la directiva ya no nace degradada por mirar la raiz</text:p>
      <text:p text:style-name="Standard"><text:s text:c="2"/>equivocada</text:p>
      <text:p text:style-name="Standard"><text:s text:c="2"/>o</text:p>
      <text:p text:style-name="Standard"><text:s text:c="2"/>- si por diseño debe degradar, entonces el escenario no puede marcarse</text:p>
      <text:p text:style-name="Standard"><text:s text:c="2"/>`passed_real`</text:p>
      <text:p text:style-name="Standard"/>
      <text:p text:style-name="Standard"><text:s text:c="2"/>2. Scope correcto</text:p>
      <text:p text:style-name="Standard"><text:s text:c="2"/>- la directiva ya no reporta Sprint 10 y `orchestrator/benchmark.py` como</text:p>
      <text:p text:style-name="Standard"><text:s text:c="2"/>deliverable falso para esta fase</text:p>
      <text:p text:style-name="Standard"><text:s text:c="2"/>- el scope mostrado por la directiva coincide con la tarea o con el contexto</text:p>
      <text:p text:style-name="Standard"><text:s text:c="2"/>real de validacion</text:p>
      <text:p text:style-name="Standard"/>
      <text:p text:style-name="Standard"><text:s text:c="2"/>3. Honestidad del resultado</text:p>
      <text:p text:style-name="Standard"><text:s text:c="2"/>- si el escenario queda totalmente alineado, puede pasar</text:p>
      <text:p text:style-name="Standard"><text:s text:c="2"/>- si sigue habiendo desalineacion real, debe fallar o quedar marcado como</text:p>
      <text:p text:style-name="Standard"><text:s text:c="2"/>bloqueo claro</text:p>
      <text:p text:style-name="Standard"><text:s text:c="2"/>- no maquilles esta condicion como limitacion menor si afecta la integridad de</text:p>
      <text:p text:style-name="Standard"><text:s text:c="2"/>la directiva</text:p>
      <text:p text:style-name="Standard"/>
      <text:p text:style-name="Standard"><text:s text:c="2"/>4. Reporte final</text:p>
      <text:p text:style-name="Standard"><text:s text:c="2"/>- el nuevo reporte debe reflejar correctamente:</text:p>
      <text:p text:style-name="Standard"><text:s text:c="4"/>- si la validacion real ya quedo limpia</text:p>
      <text:p text:style-name="Standard"><text:s text:c="4"/>- o si sigue habiendo una deuda estructural</text:p>
      <text:p text:style-name="Standard"/>
      <text:p text:style-name="Standard"><text:s text:c="2"/>SI AGREGAS TESTS</text:p>
      <text:p text:style-name="Standard"><text:s text:c="2"/>Mantenlos pequenos y enfocados solo en estos bugs de la fase real.</text:p>
      <text:p text:style-name="Standard"/>
      <text:p text:style-name="Standard"><text:soft-page-break/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><text:s text:c="2"/>5. confirmacion explicita de si la fase de validacion real ya quedo</text:p>
      <text:p text:style-name="Standard"><text:s text:c="2"/>honestamente aprobada o no</text:p>
      <text:p text:style-name="Standard"/>
      <text:p text:style-name="Standard"/>
      <text:p text:style-name="Standard">› y termino</text:p>
      <text:p text:style-name="Standard"/>
      <text:p text:style-name="Standard"/>
      <text:p text:style-name="Standard">• Voy a reauditar la fase de validación real enfocándome en los dos bugs</text:p>
      <text:p text:style-name="Standard"><text:s text:c="2"/>corregidos: alineación entre directiva y workspace, y el scope falso de Sprint</text:p>
      <text:p text:style-name="Standard"><text:s text:c="2"/>10. Luego reproduzco una corrida nueva para confirmar si ya quedó honestamente</text:p>
      <text:p text:style-name="Standard"><text:s text:c="2"/>aprobada o no.</text:p>
      <text:p text:style-name="Standard"/>
      <text:p text:style-name="Standard">• Explored</text:p>
      <text:p text:style-name="Standard"><text:s text:c="2"/>└ Read real_validation.py</text:p>
      <text:p text:style-name="Standard"><text:s text:c="4"/>Search sprint_number|control_plane_sprint_number|repo_root|context_degraded|</text:p>
      <text:p text:style-name="Standard"><text:s text:c="11"/>passed_real|blocked_environment|degraded|mandatory_repo_root|</text:p>
      <text:p text:style-name="Standard"><text:s text:c="11"/>validation_scope|limitations in real_validation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veo cambios concretos: ahora siembran AGENTS.md/PLANS.md en el workspace d</text:p>
      <text:p text:style-name="Standard"><text:s text:c="2"/>el escenario y pasan directive_repo_root=env["workspace"]. Voy a leer las com</text:p>
      <text:p text:style-name="Standard"><text:s text:c="2"/>probaciones nuevas de alineación y correr otra validación completa para confi</text:p>
      <text:p text:style-name="Standard"><text:s text:c="2"/>rmar si de verdad eliminó el context_degraded y el scope falso.</text:p>
      <text:p text:style-name="Standard"/>
      <text:p text:style-name="Standard">• Explored</text:p>
      <text:p text:style-name="Standard"><text:s text:c="2"/>└ Read real_validation.py</text:p>
      <text:p text:style-name="Standard"/>
      <text:p text:style-name="Standard">• Ran python3 - &lt;&lt;'PY'</text:p>
      <text:p text:style-name="Standard"><text:s text:c="2"/>│ import json</text:p>
      <text:p text:style-name="Standard"><text:s text:c="2"/>│ from pathlib import Path</text:p>
      <text:p text:style-name="Standard"><text:s text:c="2"/>│ … +8 lines</text:p>
      <text:p text:style-name="Standard"><text:s text:c="2"/>└ SCENARIO short-real</text:p>
      <text:p text:style-name="Standard"><text:s text:c="4"/>{'blockers': [], 'checkpoint': {'checkpoint_key':</text:p>
      <text:p text:style-name="Standard"><text:s text:c="4"/>… +60 lines</text:p>
      <text:p text:style-name="Standard"><text:s text:c="4"/>'build', 'recovery_action': None, 'status': 'completed', 'task_id':</text:p>
      <text:p text:style-name="Standard"><text:s text:c="4"/>'REAL-RECOVERY-001', 'validation_passed': True}</text:p>
      <text:p text:style-name="Standard"/>
      <text:p text:style-name="Standard">• Ran cd "/home/neurodriver/BASE _METACOGNICION_COLOMBIA/vista_IA/</text:p>
      <text:p text:style-name="Standard"><text:s text:c="2"/>│ architecture-react-three-flask-socketio" &amp;&amp; python3 - &lt;&lt;'PY'</text:p>
      <text:p text:style-name="Standard"><text:s text:c="2"/>│ from orchestrator.real_validation import run_real_validations</text:p>
      <text:p text:style-name="Standard"><text:s text:c="2"/>│ … +13 lines</text:p>
      <text:p text:style-name="Standard"><text:s text:c="2"/>└ run_id 20260513T025421Z-669f07c0</text:p>
      <text:p text:style-name="Standard"><text:s text:c="4"/>summary {'total': 3, 'passed': ['short-real', 'medium-real',</text:p>
      <text:p text:style-name="Standard"><text:s text:c="4"/>… +14 lines</text:p>
      <text:p text:style-name="Standard"><text:soft-page-break/><text:s text:c="4"/>scope_not_s10 True</text:p>
      <text:p text:style-name="Standard"><text:s text:c="4"/>root_matches_workspace None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corrida nueva quedó generando directivas dentro del workspace/runtime/</text:p>
      <text:p text:style-name="Standard"><text:s text:c="2"/>directives de cada escenario, que es justo lo que faltaba. Solo me falta</text:p>
      <text:p text:style-name="Standard"><text:s text:c="2"/>recoger el resumen final de esa ejecución para cerrar si ya pasó limpio o si</text:p>
      <text:p text:style-name="Standard"><text:s text:c="2"/>quedó algún residuo raro.</text:p>
      <text:p text:style-name="Standard"/>
      <text:p text:style-name="Standard">• Waited for background terminal</text:p>
      <text:p text:style-name="Standard"/>
      <text:p text:style-name="Standard">• La corrida nueva ya pasó con context_degraded = false y sin scope de Sprint</text:p>
      <text:p text:style-name="Standard"><text:s text:c="2"/>10. Estoy verificando una última cosa menor: el nombre del check de alineación</text:p>
      <text:p text:style-name="Standard"><text:s text:c="2"/>en el resumen, porque el script de impresión no coincidió con la etiqueta</text:p>
      <text:p text:style-name="Standard"><text:s text:c="2"/>exacta del check.</text:p>
      <text:p text:style-name="Standard"/>
      <text:p text:style-name="Standard">• Explored</text:p>
      <text:p text:style-name="Standard"><text:s text:c="2"/>└ Read latest.json, latest.md</text:p>
      <text:p text:style-name="Standard"/>
      <text:p text:style-name="Standard">• Ran python3 - &lt;&lt;'PY'</text:p>
      <text:p text:style-name="Standard"><text:s text:c="2"/>│ import json</text:p>
      <text:p text:style-name="Standard"><text:s text:c="2"/>│ from pathlib import Path</text:p>
      <text:p text:style-name="Standard"><text:s text:c="2"/>│ … +9 lines</text:p>
      <text:p text:style-name="Standard"><text:s text:c="2"/>└ SCENARIO short-real</text:p>
      <text:p text:style-name="Standard"><text:s text:c="4"/>['directive persisted', 'HABLA procedure in directive', 'directive context</text:p>
      <text:p text:style-name="Standard"><text:s text:c="4"/>… +132 lines</text:p>
      <text:p text:style-name="Standard"><text:s text:c="4"/>architecture-react-three-flask-socketio/runtime/</text:p>
      <text:p text:style-name="Standard"><text:s text:c="4"/>real_runs/20260513T025421Z-669f07c0/recovery-real/workspace'}]</text:p>
      <text:p text:style-name="Standard"/>
      <text:p text:style-name="Standard">─ Worked for 1m 01s ────────────────────────────────────────────────────────────</text:p>
      <text:p text:style-name="Standard"/>
      <text:p text:style-name="Standard">• Context compacted</text:p>
      <text:p text:style-name="Standard"/>
      <text:p text:style-name="Standard">• No encontré hallazgos bloqueantes. La fase de validación real ya quedó</text:p>
      <text:p text:style-name="Standard"><text:s text:c="2"/>honestamente aprobada.</text:p>
      <text:p text:style-name="Standard"/>
      <text:p text:style-name="Standard"><text:s text:c="2"/>Verifiqué real_validation.py, recompilé el archivo y relancé una corrida</text:p>
      <text:p text:style-name="Standard"><text:s text:c="2"/>nueva: 20260513T025421Z-669f07c0. El resultado quedó en runtime/real_runs/</text:p>
      <text:p text:style-name="Standard"><text:s text:c="2"/>latest.json y docs/real_validation/latest.md. Los 3 escenarios quedaron en</text:p>
      <text:p text:style-name="Standard"><text:s text:c="2"/>passed_real: short-real, medium-real y recovery-real.</text:p>
      <text:p text:style-name="Standard"/>
      <text:p text:style-name="Standard"><text:s text:c="2"/>Lo importante es que ahora sí quedó limpio lo que antes estaba mal:</text:p>
      <text:p text:style-name="Standard"/>
      <text:p text:style-name="Standard"><text:s text:c="2"/>- la directiva ya nace contra el workspace real del escenario, no contra la</text:p>
      <text:p text:style-name="Standard"><text:s text:c="4"/>raíz equivocada</text:p>
      <text:p text:style-name="Standard"><text:s text:c="2"/>- context_degraded quedó en false</text:p>
      <text:p text:style-name="Standard"><text:s text:c="2"/>- el root obligatorio coincide con el workspace de ejecución</text:p>
      <text:p text:style-name="Standard"><text:s text:c="2"/>- ya no se fuerza Sprint 10</text:p>
      <text:p text:style-name="Standard"><text:soft-page-break/><text:s text:c="2"/>- el scope y los deliverables de la directiva sí corresponden al escenario</text:p>
      <text:p text:style-name="Standard"><text:s text:c="4"/>real</text:p>
      <text:p text:style-name="Standard"/>
      <text:p text:style-name="Standard"><text:s text:c="2"/>Riesgos residuales, pero no bloqueantes:</text:p>
      <text:p text:style-name="Standard"/>
      <text:p text:style-name="Standard"><text:s text:c="2"/>- esto valida la mecánica real del runtime con workers deterministas locales,</text:p>
      <text:p text:style-name="Standard"><text:s text:c="4"/>no todavía una corrida larga abierta con Codex autónomo</text:p>
      <text:p text:style-name="Standard"><text:s text:c="2"/>- sigue pendiente una política de retención para runtime/real_runs/, runtime/</text:p>
      <text:p text:style-name="Standard"><text:s text:c="4"/>directives/ y artefactos similares</text:p>
      <text:p text:style-name="Standard"/>
      <text:p text:style-name="Standard"><text:s text:c="2"/>Conclusión: el harness base más la validación real mínima ya quedaron</text:p>
      <text:p text:style-name="Standard"><text:s text:c="2"/>cerrados. El siguiente paso sano es probar un proyecto largo real por muchas</text:p>
      <text:p text:style-name="Standard"><text:s text:c="2"/>tareas y reinicios, no otra capa teórica.</text:p>
      <text:p text:style-name="Standard"/>
      <text:p text:style-name="Standard"/>
      <text:p text:style-name="Standard">› ok hagamolo inicia el servidor <text:s text:c="2"/>y hacemos <text:s text:c="2"/>tareas costicas mas <text:s/>grandes <text:s/>y</text:p>
      <text:p text:style-name="Standard"><text:s text:c="2"/>super largas</text:p>
      <text:p text:style-name="Standard"/>
      <text:p text:style-name="Standard"/>
      <text:p text:style-name="Standard">• Voy a revisar el estado del runtime y levantar una instancia limpia del</text:p>
      <text:p text:style-name="Standard"><text:s text:c="2"/>servidor desde el repo correcto antes de pasar a pruebas largas.</text:p>
      <text:p text:style-name="Standard"/>
      <text:p text:style-name="Standard">• Ran pwd</text:p>
      <text:p text:style-name="Standard"><text:s text:c="2"/>└ /home/neurodriver/BASE _METACOGNICION_COLOMBIA/vista_IA/</text:p>
      <text:p text:style-name="Standard"><text:s text:c="4"/>architecture-react-three-flask-socketio</text:p>
      <text:p text:style-name="Standard"/>
      <text:p text:style-name="Standard">• Explored</text:p>
      <text:p text:style-name="Standard"><text:s text:c="2"/>└ List rg --files -g start.sh -g backend/app.py -g frontend/package.json</text:p>
      <text:p text:style-name="Standard"/>
      <text:p text:style-name="Standard">• Ran ps -ef | rg 'architecture-react-three-flask-socketio/backend/app.py|</text:p>
      <text:p text:style-name="Standard"><text:s text:c="2"/>│ start.sh start|vite|flask'</text:p>
      <text:p text:style-name="Standard"><text:s text:c="2"/>└ neurodr+ <text:s text:c="2"/>78489 <text:s text:c="3"/>2477 <text:s/>0 00:16 ? <text:s text:c="7"/>00:01:25 /home/neurodriver/</text:p>
      <text:p text:style-name="Standard"><text:s text:c="4"/>ferrari_env/bin/python /home/neurodriver/BASE _METACOGNICION_COLOMBIA/</text:p>
      <text:p text:style-name="Standard"><text:s text:c="4"/>… +5 lines</text:p>
      <text:p text:style-name="Standard"><text:s text:c="4"/>architecture-react-three-flask-socketio/backend/app.py|start.sh start|vite|</text:p>
      <text:p text:style-name="Standard"><text:s text:c="4"/>flask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ncontré un backend vivo heredado. Voy a confirmar puertos y usar el launcher</text:p>
      <text:p text:style-name="Standard"><text:s text:c="2"/>del repo para dejarlo en un estado limpio antes de probar las tareas largas.</text:p>
      <text:p text:style-name="Standard"/>
      <text:p text:style-name="Standard">• Ran curl -I --max-time 5 http://127.0.0.1:5000/api/architecture</text:p>
      <text:p text:style-name="Standard"><text:s text:c="2"/>└ /bin/bash: line 1: curl: command not found</text:p>
      <text:p text:style-name="Standard"/>
      <text:p text:style-name="Standard">• Explored</text:p>
      <text:p text:style-name="Standard"><text:s text:c="2"/>└ Read start.sh</text:p>
      <text:p text:style-name="Standard"/>
      <text:p text:style-name="Standard">• Ran curl -I --max-time 5 http://127.0.0.1:5000/</text:p>
      <text:p text:style-name="Standard"><text:s text:c="2"/>└ /bin/bash: line 1: curl: command not found</text:p>
      <text:p text:style-name="Standard"/>
      <text:p text:style-name="Standard"><text:soft-page-break/>• Explored</text:p>
      <text:p text:style-name="Standard"><text:s text:c="2"/>└ Read start.sh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launcher usa PID files; voy a mirar su estado y reiniciar con ese mismo</text:p>
      <text:p text:style-name="Standard"><text:s text:c="2"/>mecanismo para evitar otro backend “huérfano”.</text:p>
      <text:p text:style-name="Standard"/>
      <text:p text:style-name="Standard">• Explored</text:p>
      <text:p text:style-name="Standard"><text:s text:c="2"/>└ List pids</text:p>
      <text:p text:style-name="Standard"/>
      <text:p text:style-name="Standard">• Ran bash start.sh status</text:p>
      <text:p text:style-name="Standard"><text:s text:c="2"/>└</text:p>
      <text:p text:style-name="Standard"><text:s text:c="4"/>Vista IA Launcher</text:p>
      <text:p text:style-name="Standard"><text:s text:c="4"/>… +13 lines</text:p>
      <text:p text:style-name="Standard"><text:s text:c="6"/>- /home/neurodriver/BASE _METACOGNICION_COLOMBIA/vista_IA/</text:p>
      <text:p text:style-name="Standard"><text:s text:c="4"/>architecture-react-three-flask-socketio/.runtime/logs/frontend.log</text:p>
      <text:p text:style-name="Standard"/>
      <text:p text:style-name="Standard">• Ran python3 - &lt;&lt;'PY'</text:p>
      <text:p text:style-name="Standard"><text:s text:c="2"/>│ import urllib.request,sys</text:p>
      <text:p text:style-name="Standard"><text:s text:c="2"/>│ for url in</text:p>
      <text:p text:style-name="Standard"><text:s text:c="2"/>│ … +7 lines</text:p>
      <text:p text:style-name="Standard"><text:s text:c="2"/>└ http://127.0.0.1:5000/ ERROR URLError(PermissionError(1, 'Operation not per</text:p>
      <text:p text:style-name="Standard"><text:s text:c="4"/>mitted'))</text:p>
      <text:p text:style-name="Standard"><text:s text:c="4"/>http://127.0.0.1:5000/api/architecture ERROR URLError(PermissionError(1, 'O</text:p>
      <text:p text:style-name="Standard"><text:s text:c="4"/>peration not permitted')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servidor ya figura activo en 5000, pero lo voy a reiniciar sin abrir</text:p>
      <text:p text:style-name="Standard"><text:s text:c="2"/>navegador para asegurar que tome el estado limpio antes de las pruebas largas.</text:p>
      <text:p text:style-name="Standard"/>
      <text:p text:style-name="Standard">• Waited for background terminal · OPEN_BROWSER=0 bash start.sh restart</text:p>
      <text:p text:style-name="Standard"/>
      <text:p text:style-name="Standard">• Ran OPEN_BROWSER=0 bash start.sh restart</text:p>
      <text:p text:style-name="Standard"><text:s text:c="2"/>└ backend detenido</text:p>
      <text:p text:style-name="Standard"/>
      <text:p text:style-name="Standard"><text:s text:c="4"/>… +8 lines</text:p>
      <text:p text:style-name="Standard"><text:s text:c="4"/>_METACOGNICION_COLOMBIA/vista_IA/</text:p>
      <text:p text:style-name="Standard"><text:s text:c="4"/>architecture-react-three-flask-socketio/.runtime/logs/backend.log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reinicio limpió el proceso viejo, pero el backend no volvió a levantar. Voy</text:p>
      <text:p text:style-name="Standard"><text:s text:c="2"/>a revisar el log y corregir el arranque antes de seguir.</text:p>
      <text:p text:style-name="Standard"/>
      <text:p text:style-name="Standard">• Explored</text:p>
      <text:p text:style-name="Standard"><text:s text:c="2"/>└ Read backend.log, backend.pid</text:p>
      <text:p text:style-name="Standard"/>
      <text:p text:style-name="Standard"><text:soft-page-break/>• Ran ps -ef | rg 'architecture-react-three-flask-socketio/backend/app.py'</text:p>
      <text:p text:style-name="Standard"><text:s text:c="2"/>└ neurodr+ <text:s text:c="2"/>78489 <text:s text:c="3"/>2477 <text:s/>0 00:16 ? <text:s text:c="7"/>00:01:25 /home/neurodriver/</text:p>
      <text:p text:style-name="Standard"><text:s text:c="4"/>ferrari_env/bin/python /home/neurodriver/BASE _METACOGNICION_COLOMBIA/</text:p>
      <text:p text:style-name="Standard"><text:s text:c="4"/>… +3 lines</text:p>
      <text:p text:style-name="Standard"><text:s text:c="4"/>neurodr+ <text:s/>158861 <text:s/>158859 <text:s/>0 19:57 ? <text:s text:c="7"/>00:00:00 rg</text:p>
      <text:p text:style-name="Standard"><text:s text:c="4"/>architecture-react-three-flask-socketio/backend/app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backend viejo quedó fuera del control del sandbox y el nuevo arranque falló</text:p>
      <text:p text:style-name="Standard"><text:s text:c="2"/>por permisos de socket. Voy a reiniciarlo fuera del sandbox para dejar 5000</text:p>
      <text:p text:style-name="Standard"><text:s text:c="2"/>limpio y utilizable.</text:p>
      <text:p text:style-name="Standard"/>
      <text:p text:style-name="Standard">✔ You approved codex to run pkill -f 'architecture-react-three-flask-socketio/</text:p>
      <text:p text:style-name="Standard"><text:s text:c="2"/>backend/app.py' &amp;&amp; OPEN_BRO... this time</text:p>
      <text:p text:style-name="Standard"/>
      <text:p text:style-name="Standard">• Ran pkill -f 'architecture-react-three-flask-socketio/backend/app.py' &amp;&amp;</text:p>
      <text:p text:style-name="Standard"><text:s text:c="2"/>│ OPEN_BROWSER=0 bash start.sh start</text:p>
      <text:p text:style-name="Standard"><text:s text:c="2"/>└ pkill: killing pid 78489 failed: Permission denied</text:p>
      <text:p text:style-name="Standard"/>
      <text:p text:style-name="Standard">• Explored</text:p>
      <text:p text:style-name="Standard"><text:s text:c="2"/>└ Search PORT|socketio.run|host=|app_root|control_plane_sprint_number in</text:p>
      <text:p text:style-name="Standard">app.py</text:p>
      <text:p text:style-name="Standard"><text:s text:c="4"/>Read app.py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proceso viejo sigue vivo; voy a comprobar si realmente está escuchando en</text:p>
      <text:p text:style-name="Standard"><text:s text:c="2"/>5000 para no frenarnos por un reinicio que aquí no puedo terminar de forzar.</text:p>
      <text:p text:style-name="Standard"/>
      <text:p text:style-name="Standard">• Explored</text:p>
      <text:p text:style-name="Standard"><text:s text:c="2"/>└ Read backend.log</text:p>
      <text:p text:style-name="Standard"/>
      <text:p text:style-name="Standard">• Ran bash start.sh status</text:p>
      <text:p text:style-name="Standard"><text:s text:c="2"/>└</text:p>
      <text:p text:style-name="Standard"><text:s text:c="4"/>Vista IA Launcher</text:p>
      <text:p text:style-name="Standard"><text:s text:c="4"/>… +13 lines</text:p>
      <text:p text:style-name="Standard"><text:s text:c="6"/>- /home/neurodriver/BASE _METACOGNICION_COLOMBIA/vista_IA/</text:p>
      <text:p text:style-name="Standard"><text:s text:c="4"/>architecture-react-three-flask-socketio/.runtime/logs/frontend.log</text:p>
      <text:p text:style-name="Standard"/>
      <text:p text:style-name="Standard">✔ You approved codex to run ss -ltnp | grep ':5000\|:5001\|:5173' this time</text:p>
      <text:p text:style-name="Standard"/>
      <text:p text:style-name="Standard">• Ran ss -ltnp | grep ':5000\|:5001\|:5173'</text:p>
      <text:p text:style-name="Standard"><text:s text:c="2"/>└ /bin/bash: line 1: /usr/bin/ss: Permission denie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Voy a intentar el arranque directo con el binario aprobado del backend. Si</text:p>
      <text:p text:style-name="Standard"><text:s text:c="2"/>este camino entra fuera del sandbox, nos deja el servidor arriba sin pelear</text:p>
      <text:p text:style-name="Standard"><text:soft-page-break/><text:s text:c="2"/>con start.sh.</text:p>
      <text:p text:style-name="Standard"/>
      <text:p text:style-name="Standard">• Ran /home/neurodriver/ferrari_env/bin/python backend/app.py</text:p>
      <text:p text:style-name="Standard"><text:s text:c="2"/>└ Werkzeug appears to be used in a production deployment. Consider switching</text:p>
      <text:p text:style-name="Standard"><text:s text:c="4"/>to a production web server instead.</text:p>
      <text:p text:style-name="Standard"><text:s text:c="4"/>… +3 lines</text:p>
      <text:p text:style-name="Standard"><text:s text:c="4"/>Port 5000 is in use by another program. Either identify and stop that</text:p>
      <text:p text:style-name="Standard"><text:s text:c="4"/>program, or start the server with a different port.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backend viejo sí está ocupando 5000. Voy a levantar una segunda instancia</text:p>
      <text:p text:style-name="Standard"><text:s text:c="2"/>limpia en 5001 para que podamos seguir sin depender de ese proceso heredado.</text:p>
      <text:p text:style-name="Standard"/>
      <text:p text:style-name="Standard">• Ran PORT=5001 /home/neurodriver/ferrari_env/bin/python backend/app.py</text:p>
      <text:p text:style-name="Standard"><text:s text:c="2"/>└ <text:s/>* Serving Flask app 'app'</text:p>
      <text:p text:style-name="Standard"><text:s text:c="5"/>* Debug mode: off</text:p>
      <text:p text:style-name="Standard"><text:s text:c="4"/>… +21 lines</text:p>
      <text:p text:style-name="Standard"><text:s text:c="8"/>_socket.socket.__init__(self, family, type, proto, fileno)</text:p>
      <text:p text:style-name="Standard"><text:s text:c="4"/>PermissionError: [Errno 1] Operation not permitte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El estado práctico es este: hay un backend heredado ocupando</text:p>
      <text:p text:style-name="Standard"><text:s text:c="2"/>http://127.0.0.1:5000/. Intenté reiniciarlo limpio desde aquí, pero el sandbox</text:p>
      <text:p text:style-name="Standard"><text:s text:c="2"/>no puede matar ese PID viejo ni abrir otro socket para reemplazarlo. Si tu pe</text:p>
      <text:p text:style-name="Standard"><text:s text:c="2"/>staña abre en 5000, úsala y seguimos sobre esa instancia.</text:p>
      <text:p text:style-name="Standard"/>
      <text:p text:style-name="Standard"><text:s text:c="2"/>Si quieres dejarlo limpio de verdad en tu terminal, corre esto en la raíz del</text:p>
      <text:p text:style-name="Standard"><text:s text:c="2"/>repo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OPEN_BROWSER=0 bash start.sh start</text:p>
      <text:p text:style-name="Standard"/>
      <text:p text:style-name="Standard"><text:s text:c="2"/>Para la primera prueba larga de verdad, usa modo: long-run y lanza esto:</text:p>
      <text:p text:style-name="Standard"/>
      <text:p text:style-name="Standard"><text:s text:c="2"/>Proyecto: longrun-crm-01</text:p>
      <text:p text:style-name="Standard"><text:s text:c="2"/>Modo: long-run</text:p>
      <text:p text:style-name="Standard"/>
      <text:p text:style-name="Standard"><text:s text:c="2"/>Construye una aplicacion web completa de gestion de clientes y oportunidades</text:p>
      <text:p text:style-name="Standard"><text:s text:c="2"/>con HTML, CSS y JavaScript, usando archivos reales en disco y trabajando por</text:p>
      <text:p text:style-name="Standard"><text:s text:c="2"/>tareas pequenas del control plane, no como una sesion monolitica.</text:p>
      <text:p text:style-name="Standard"/>
      <text:p text:style-name="Standard"><text:s text:c="2"/>Objetivo:</text:p>
      <text:p text:style-name="Standard"><text:s text:c="2"/>Crear un mini CRM funcional y bien organizado que permita gestionar contactos,</text:p>
      <text:p text:style-name="Standard"><text:s text:c="2"/>oportunidades y seguimiento comercial.</text:p>
      <text:p text:style-name="Standard"/>
      <text:p text:style-name="Standard"><text:s text:c="2"/>Requisitos obligatorios:</text:p>
      <text:p text:style-name="Standard"><text:soft-page-break/><text:s text:c="2"/>- trabajar desde el estado real actual</text:p>
      <text:p text:style-name="Standard"><text:s text:c="2"/>- usar el repo y workspace reales</text:p>
      <text:p text:style-name="Standard"><text:s text:c="2"/>- ejecutar por tareas y checkpoints</text:p>
      <text:p text:style-name="Standard"><text:s text:c="2"/>- dejar evidencia real en disco</text:p>
      <text:p text:style-name="Standard"><text:s text:c="2"/>- no fingir progreso</text:p>
      <text:p text:style-name="Standard"><text:s text:c="2"/>- si hay fallo, usar retry o split y continuar</text:p>
      <text:p text:style-name="Standard"/>
      <text:p text:style-name="Standard"><text:s text:c="2"/>Funcionalidad minima:</text:p>
      <text:p text:style-name="Standard"><text:s text:c="2"/>- CRUD de clientes</text:p>
      <text:p text:style-name="Standard"><text:s text:c="2"/>- CRUD de oportunidades</text:p>
      <text:p text:style-name="Standard"><text:s text:c="2"/>- estados de oportunidad: nuevo, contacto, propuesta, ganado, perdido</text:p>
      <text:p text:style-name="Standard"><text:s text:c="2"/>- filtros por estado, responsable y texto</text:p>
      <text:p text:style-name="Standard"><text:s text:c="2"/>- busqueda en vivo</text:p>
      <text:p text:style-name="Standard"><text:s text:c="2"/>- resumen visible con metricas</text:p>
      <text:p text:style-name="Standard"><text:s text:c="2"/>- historial basico de actividad por cliente</text:p>
      <text:p text:style-name="Standard"><text:s text:c="2"/>- persistencia local</text:p>
      <text:p text:style-name="Standard"><text:s text:c="2"/>- importacion y exportacion JSON</text:p>
      <text:p text:style-name="Standard"><text:s text:c="2"/>- validaciones claras</text:p>
      <text:p text:style-name="Standard"><text:s text:c="2"/>- estado vacio bien resuelto</text:p>
      <text:p text:style-name="Standard"/>
      <text:p text:style-name="Standard"><text:s text:c="2"/>Arquitectura:</text:p>
      <text:p text:style-name="Standard"><text:s text:c="2"/>- separar UI, dominio, persistencia y utilidades</text:p>
      <text:p text:style-name="Standard"><text:s text:c="2"/>- crear modulos reutilizables</text:p>
      <text:p text:style-name="Standard"><text:s text:c="2"/>- incluir pruebas reales</text:p>
      <text:p text:style-name="Standard"><text:s text:c="2"/>- incluir documentacion de arquitectura y ejecucion</text:p>
      <text:p text:style-name="Standard"><text:s text:c="2"/>- incluir validacion manual de flujos principales</text:p>
      <text:p text:style-name="Standard"/>
      <text:p text:style-name="Standard"><text:s text:c="2"/>Criterio de exito:</text:p>
      <text:p text:style-name="Standard"><text:s text:c="2"/>- debe avanzar por multiples tareas reales</text:p>
      <text:p text:style-name="Standard"><text:s text:c="2"/>- debe generar directivas y checkpoints</text:p>
      <text:p text:style-name="Standard"><text:s text:c="2"/>- debe crear archivos reales de producto</text:p>
      <text:p text:style-name="Standard"><text:s text:c="2"/>- debe soportar una corrida larga sin depender de una sola sesion enorme</text:p>
      <text:p text:style-name="Standard"/>
      <text:p text:style-name="Standard"><text:s text:c="2"/>Cuando lo lances, yo lo monitoreo y te digo si el control plane aguanta una</text:p>
      <text:p text:style-name="Standard"><text:s text:c="2"/>corrida larga real o si aparece otra deuda estructural.</text:p>
      <text:p text:style-name="Standard"/>
      <text:p text:style-name="Standard"/>
      <text:p text:style-name="Standard">› ya lo envie</text:p>
      <text:p text:style-name="Standard"/>
      <text:p text:style-name="Standard"/>
      <text:p text:style-name="Standard">• Voy a revisar en vivo qué sesión abrió, si ya creó proyecto real y si el</text:p>
      <text:p text:style-name="Standard"><text:s text:c="2"/>control plane empezó a producir tareas, directivas y archivos en disco.</text:p>
      <text:p text:style-name="Standard"/>
      <text:p text:style-name="Standard">• Explored</text:p>
      <text:p text:style-name="Standard"><text:s text:c="2"/>└ Read backend.log</text:p>
      <text:p text:style-name="Standard"/>
      <text:p text:style-name="Standard">• Ran ls -1dt workspace/projects/* 2&gt;/dev/null | head -n 5</text:p>
      <text:p text:style-name="Standard"><text:s text:c="2"/>└ workspace/projects/sesion-20260513030126-longrun-crm-01</text:p>
      <text:p text:style-name="Standard"><text:s text:c="4"/>workspace/projects/sesion-2026051207164-9stress-gastos-04</text:p>
      <text:p text:style-name="Standard"><text:s text:c="4"/>workspace/projects/sesion-20260512070849-stress-gastos-03</text:p>
      <text:p text:style-name="Standard"><text:s text:c="4"/>workspace/projects/sesion-20260511212612-stress-gastos-02</text:p>
      <text:p text:style-name="Standard"/>
      <text:p text:style-name="Standard"><text:soft-page-break/>• Explored</text:p>
      <text:p text:style-name="Standard"><text:s text:c="2"/>└ List directives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abrió la sesión longrun-crm-01. Ahora voy a medir si de verdad pasó de</text:p>
      <text:p text:style-name="Standard"><text:s text:c="2"/>arranque a ejecución: archivos reales, directivas nuevas y progreso dentro del</text:p>
      <text:p text:style-name="Standard"><text:s text:c="2"/>proyecto.</text:p>
      <text:p text:style-name="Standard"/>
      <text:p text:style-name="Standard">• Explored</text:p>
      <text:p text:style-name="Standard"><text:s text:c="2"/>└ List sesion-20260513030126-longrun-crm-01</text:p>
      <text:p text:style-name="Standard"><text:s text:c="4"/>List sesion-20260513030126-longrun-crm-01</text:p>
      <text:p text:style-name="Standard"><text:s text:c="4"/>List sesion-20260513030126-longrun-crm-01</text:p>
      <text:p text:style-name="Standard"><text:s text:c="4"/>Search longrun-crm-01|20260513030126 in backend.log</text:p>
      <text:p text:style-name="Standard"><text:s text:c="4"/>List sesion-20260513030126-longrun-crm-01</text:p>
      <text:p text:style-name="Standard"><text:s text:c="4"/>Search .vista in sesion-20260513030126-longrun-crm-01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Por ahora no salió de bootstrap: solo existe la carpeta del proyecto y .agent-</text:p>
      <text:p text:style-name="Standard"><text:s text:c="2"/>project.json. Voy a mirar el estado interno del runtime nuevo para ver si ya</text:p>
      <text:p text:style-name="Standard"><text:s text:c="2"/>encoló tareas o si quedó trabado antes de generar directivas.</text:p>
      <text:p text:style-name="Standard"/>
      <text:p text:style-name="Standard">• Explored</text:p>
      <text:p text:style-name="Standard"><text:s text:c="2"/>└ Read task_queue.json, project_state.json, task_history.jsonl, failures.jsonl</text:p>
      <text:p text:style-name="Standard"><text:s text:c="4"/>List runtime</text:p>
      <text:p text:style-name="Standard"><text:s text:c="4"/>Search 20260513030244|directives|artifacts|checkpoints</text:p>
      <text:p text:style-name="Standard"/>
      <text:p text:style-name="Standard">• Ran find runtime/artifacts -maxdepth 1 -type f -printf '%TY-%Tm-%Td %TH:%TM:</text:p>
      <text:p text:style-name="Standard"><text:s text:c="2"/>│ %TS %p\n' 2&gt;/dev/null | sort | tail -n 20</text:p>
      <text:p text:style-name="Standard"><text:s text:c="2"/>└ (no output)</text:p>
      <text:p text:style-name="Standard"/>
      <text:p text:style-name="Standard">• Explored</text:p>
      <text:p text:style-name="Standard"><text:s text:c="2"/>└ List directives</text:p>
      <text:p text:style-name="Standard"><text:s text:c="4"/>Read RUNTIME-20260513030244-001-20260513T030244Z-f0a170c5d2fe.json, RUNTIME-</text:p>
      <text:p text:style-name="Standard"><text:s text:c="9"/>20260513030244-001-20260513T030244Z-f0a170c5d2fe.md</text:p>
      <text:p text:style-name="Standard"><text:s text:c="4"/>List checkpoints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Ya se movió: apareció el checkpoint propio de la tarea actual. Voy a revisar</text:p>
      <text:p text:style-name="Standard"><text:s text:c="2"/>si produjo el artefacto esperado o si sigue pegado en la primera tarea del</text:p>
      <text:p text:style-name="Standard"><text:s text:c="2"/>control plane.</text:p>
      <text:p text:style-name="Standard"/>
      <text:p text:style-name="Standard">• Explored</text:p>
      <text:p text:style-name="Standard"><text:s text:c="2"/>└ Read task_queue.json, project_state.json</text:p>
      <text:p text:style-name="Standard"/>
      <text:p text:style-name="Standard">• Ran find runtime/artifacts -maxdepth 1 -type f -printf '%TY-%Tm-%Td %TH:%TM:</text:p>
      <text:p text:style-name="Standard"><text:s text:c="2"/>│ %TS %p\n' 2&gt;/dev/null | sort | tail -n 20 &amp;&amp; printf '\n---HISTORY---\n' &amp;&amp;</text:p>
      <text:p text:style-name="Standard"><text:soft-page-break/><text:s text:c="2"/>│ tail -n 40 runtime/task_history.jsonl</text:p>
      <text:p text:style-name="Standard"><text:s text:c="2"/>└ 2026-05-12 20:04:47.0264344650 runtime/artifacts/</text:p>
      <text:p text:style-name="Standard"><text:s text:c="4"/>runtime-20260513030244-001.json</text:p>
      <text:p text:style-name="Standard"><text:s text:c="4"/>… +9 lines</text:p>
      <text:p text:style-name="Standard"><text:s text:c="4"/>p in ['runtime/artifacts/runtime-20260513030244-001.json'] if not</text:p>
      <text:p text:style-name="Standard"><text:s text:c="4"/>Path(p).exists()]; assert not missing, missing\""]}}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primera tarea sí cerró bien: creó su artefacto y su checkpoint. El punto</text:p>
      <text:p text:style-name="Standard"><text:s text:c="2"/>crítico ahora es si el runtime continúa solo con la segunda tarea o si se</text:p>
      <text:p text:style-name="Standard"><text:s text:c="2"/>quedó detenido después del primer paso.</text:p>
      <text:p text:style-name="Standard"/>
      <text:p text:style-name="Standard">• Ran sleep 5; printf '---PROJECT_STATE---\n'; sed -n '1,220p' runtime/</text:p>
      <text:p text:style-name="Standard"><text:s text:c="2"/>│ project_state.json; printf '\n---QUEUE---\n'; sed -n '1,260p' runtime/</text:p>
      <text:p text:style-name="Standard"><text:s text:c="2"/>│ task_queue.json; printf '\n---ARTIFACTS---\n'; find runtime/artifacts</text:p>
      <text:p text:style-name="Standard"><text:s text:c="2"/>│ … +4 lines</text:p>
      <text:p text:style-name="Standard"><text:s text:c="2"/>└ /bin/bash: line 1: printf: --: invalid option</text:p>
      <text:p text:style-name="Standard"><text:s text:c="4"/>printf: usage: printf [-v var] format [arguments]</text:p>
      <text:p text:style-name="Standard"><text:s text:c="4"/>… +64 lines</text:p>
      <text:p text:style-name="Standard"><text:s text:c="4"/>---PROJECT_FILES---</text:p>
      <text:p text:style-name="Standard"><text:s text:c="4"/>.agent-project.json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Quedó detenido tras la primera tarea. Voy a revisar si el runtime dejó un</text:p>
      <text:p text:style-name="Standard"><text:s text:c="2"/>error claro en logs o si simplemente no está encadenando la siguiente tarea</text:p>
      <text:p text:style-name="Standard"><text:s text:c="2"/>automáticamente.</text:p>
      <text:p text:style-name="Standard"/>
      <text:p text:style-name="Standard">• Explored</text:p>
      <text:p text:style-name="Standard"><text:s text:c="2"/>└ Search RUNTIME-20260513030244|control_plane|directive|retry|split|</text:p>
      <text:p text:style-name="Standard">no_ready_task|</text:p>
      <text:p text:style-name="Standard"><text:s text:c="11"/>task_queue|current_task_id in backend.log</text:p>
      <text:p text:style-name="Standard"><text:s text:c="4"/>Read runtime-20260513030244-001.json, runtime-20260513030244-001-</text:p>
      <text:p text:style-name="Standard">checkpoint.json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• La corrida larga no está construyendo el CRM todavía. Voy a confirmar si el</text:p>
      <text:p text:style-name="Standard"><text:s text:c="2"/>proyecto quedó solo como contenedor vacío o si hay alguna sesión paralela</text:p>
      <text:p text:style-name="Standard"><text:s text:c="2"/>escribiendo dentro de esa carpeta.</text:p>
      <text:p text:style-name="Standard"/>
      <text:p text:style-name="Standard">• Explored</text:p>
      <text:p text:style-name="Standard"><text:s text:c="2"/>└ Read .agent-project.json</text:p>
      <text:p text:style-name="Standard"><text:s text:c="4"/>Search .vista in sesion-20260513030126-longrun-crm-01</text:p>
      <text:p text:style-name="Standard"><text:s text:c="4"/>List sesion-20260513030126-longrun-crm-01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><text:soft-page-break/></text:p>
      <text:p text:style-name="Standard">• Estado en vivo:</text:p>
      <text:p text:style-name="Standard"/>
      <text:p text:style-name="Standard"><text:s text:c="2"/>- Sí abrió la sesión sesion-20260513030126-longrun-crm-01.</text:p>
      <text:p text:style-name="Standard"><text:s text:c="2"/>- Pero no está construyendo el CRM todavía.</text:p>
      <text:p text:style-name="Standard"/>
      <text:p text:style-name="Standard"><text:s text:c="2"/>Lo que sí pasó:</text:p>
      <text:p text:style-name="Standard"/>
      <text:p text:style-name="Standard"><text:s text:c="2"/>- el control plane creó 2 tareas internas en runtime/task_queue.json</text:p>
      <text:p text:style-name="Standard"><text:s text:c="2"/>- la primera RUNTIME-20260513030244-001 ya terminó bien</text:p>
      <text:p text:style-name="Standard"><text:s text:c="2"/>- dejó:</text:p>
      <text:p text:style-name="Standard"><text:s text:c="6"/>- runtime/artifacts/runtime-20260513030244-001.json</text:p>
      <text:p text:style-name="Standard"><text:s text:c="6"/>- runtime/checkpoints/runtime-20260513030244-001-checkpoint.json</text:p>
      <text:p text:style-name="Standard"><text:s text:c="6"/>- directiva RUNTIME-20260513030244-001-20260513T030244Z-f0a170c5d2fe.md</text:p>
      <text:p text:style-name="Standard"/>
      <text:p text:style-name="Standard"><text:s text:c="2"/>Lo crítico:</text:p>
      <text:p text:style-name="Standard"/>
      <text:p text:style-name="Standard"><text:s text:c="2"/>- la segunda tarea RUNTIME-20260513030244-002 sigue en pending</text:p>
      <text:p text:style-name="Standard"><text:s text:c="2"/>- project_state.json quedó con current_task_id = null</text:p>
      <text:p text:style-name="Standard"><text:s text:c="2"/>- el proyecto sesion-20260513030126-longrun-crm-01 sigue con 1 solo</text:p>
      <text:p text:style-name="Standard"><text:s text:c="4"/>archivo: .agent-project.json</text:p>
      <text:p text:style-name="Standard"><text:s text:c="2"/>- no existen frontend/, src/, tests/, docs/habla-session.md, .vista, ni</text:p>
      <text:p text:style-name="Standard"><text:s text:c="4"/>archivos reales del CRM dentro de esa sesión</text:p>
      <text:p text:style-name="Standard"/>
      <text:p text:style-name="Standard"><text:s text:c="2"/>Diagnóstico:</text:p>
      <text:p text:style-name="Standard"/>
      <text:p text:style-name="Standard"><text:s text:c="2"/>- no se bloqueó por auth ni por servidor</text:p>
      <text:p text:style-name="Standard"><text:s text:c="2"/>- se frenó por una deuda del runtime:</text:p>
      <text:p text:style-name="Standard"><text:s text:c="6"/>- ejecutó solo la primera tarea del control plane</text:p>
      <text:p text:style-name="Standard"><text:s text:c="6"/>- no encadenó automáticamente la siguiente</text:p>
      <text:p text:style-name="Standard"><text:s text:c="6"/>- y además la directiva está trabajando contra la raíz del repo principal,</text:p>
      <text:p text:style-name="Standard"><text:s text:c="8"/>no contra el proyecto longrun-crm-01</text:p>
      <text:p text:style-name="Standard"/>
      <text:p text:style-name="Standard"><text:s text:c="2"/>Conclusión honesta:</text:p>
      <text:p text:style-name="Standard"/>
      <text:p text:style-name="Standard"><text:s text:c="2"/>- esta corrida larga no arrancó de verdad como proyecto largo</text:p>
      <text:p text:style-name="Standard"><text:s text:c="2"/>- por ahora solo validó el primer paso de orquestación interna</text:p>
      <text:p text:style-name="Standard"><text:s text:c="2"/>- no vale la pena esperar más esta sesión porque no hay señales de que vaya a</text:p>
      <text:p text:style-name="Standard"><text:s text:c="4"/>empezar sola</text:p>
      <text:p text:style-name="Standard"/>
      <text:p text:style-name="Standard"><text:s text:c="2"/>Siguiente paso correcto:</text:p>
      <text:p text:style-name="Standard"/>
      <text:p text:style-name="Standard"><text:s text:c="2"/>1. parar esta corrida</text:p>
      <text:p text:style-name="Standard"><text:s text:c="2"/>2. corregir el runtime para:</text:p>
      <text:p text:style-name="Standard"/>
      <text:p text:style-name="Standard"><text:s text:c="2"/>- continuar automáticamente con la siguiente tarea lista</text:p>
      <text:p text:style-name="Standard"><text:s text:c="2"/>- trabajar contra el projectDir real de la sesión</text:p>
      <text:p text:style-name="Standard"><text:s text:c="2"/>- generar tareas del CRM de verdad, no solo tareas genéricas del runtime</text:p>
      <text:p text:style-name="Standard"/>
      <text:p text:style-name="Standard"><text:s text:c="2"/>Si quieres, te redacto ya el prompt exacto para que el otro agente corrija</text:p>
      <text:p text:style-name="Standard"><text:s text:c="2"/>esos dos bloqueos estructurales.</text:p>
      <text:p text:style-name="Standard"/>
      <text:p text:style-name="Standard"><text:soft-page-break/></text:p>
      <text:p text:style-name="Standard">› si ok haslo</text:p>
      <text:p text:style-name="Standard"/>
      <text:p text:style-name="Standard"/>
      <text:p text:style-name="Standard"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 excepto como target real de las</text:p>
      <text:p text:style-name="Standard"><text:s text:c="2"/>sesiones</text:p>
      <text:p text:style-name="Standard"><text:s text:c="2"/>- no escribir implementacion dentro de proyectos viejos salvo la sesion activa</text:p>
      <text:p text:style-name="Standard"><text:s text:c="2"/>usada para validacion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/>
      <text:p text:style-name="Standard"><text:s text:c="2"/>Corregir unicamente los bloqueos estructurales detectados en la primera prueba</text:p>
      <text:p text:style-name="Standard"><text:s text:c="2"/>larga real.</text:p>
      <text:p text:style-name="Standard"><text:s text:c="2"/>No rehagas la arquitectura completa.</text:p>
      <text:p text:style-name="Standard"><text:s text:c="2"/>No entres en UI nueva.</text:p>
      <text:p text:style-name="Standard"><text:s text:c="2"/>No avances otra fase.</text:p>
      <text:p text:style-name="Standard"/>
      <text:p text:style-name="Standard"><text:s text:c="2"/>CASO REAL OBSERVADO</text:p>
      <text:p text:style-name="Standard"/>
      <text:p text:style-name="Standard"><text:s text:c="2"/>Sesion observada:</text:p>
      <text:p text:style-name="Standard"><text:s text:c="2"/>- `workspace/projects/sesion-20260513030126-longrun-crm-01`</text:p>
      <text:p text:style-name="Standard"/>
      <text:p text:style-name="Standard"><text:s text:c="2"/>Problemas reales detectados:</text:p>
      <text:p text:style-name="Standard"><text:s text:c="2"/>1. La sesion larga no construyo el CRM.</text:p>
      <text:p text:style-name="Standard"><text:s text:c="5"/>- el proyecto quedo con solo `.agent-project.json`</text:p>
      <text:p text:style-name="Standard"><text:s text:c="5"/>- no aparecieron archivos reales de producto</text:p>
      <text:p text:style-name="Standard"/>
      <text:p text:style-name="Standard"><text:s text:c="2"/>2. El control plane ejecuto solo la primera tarea interna y se detuvo.</text:p>
      <text:p text:style-name="Standard"><text:s text:c="5"/>- `RUNTIME-20260513030244-001` quedo `completed`</text:p>
      <text:p text:style-name="Standard"><text:s text:c="5"/>- `RUNTIME-20260513030244-002` quedo `pending`</text:p>
      <text:p text:style-name="Standard"><text:s text:c="5"/>- `project_state.json` quedo con `current_task_id = null`</text:p>
      <text:p text:style-name="Standard"><text:s text:c="5"/>- no continuo automaticamente</text:p>
      <text:p text:style-name="Standard"><text:soft-page-break/></text:p>
      <text:p text:style-name="Standard"><text:s text:c="2"/>3. El trabajo sigue anclado a la raiz del sistema, no al `projectDir` real de</text:p>
      <text:p text:style-name="Standard"><text:s text:c="2"/>la sesion.</text:p>
      <text:p text:style-name="Standard"><text:s text:c="5"/>- directivas, artefactos y validacion nacen en el runtime del repo</text:p>
      <text:p text:style-name="Standard"><text:s text:c="2"/>principal</text:p>
      <text:p text:style-name="Standard"><text:s text:c="5"/>- el CRM no se construye dentro de `workspace/projects/.../longrun-crm-01`</text:p>
      <text:p text:style-name="Standard"/>
      <text:p text:style-name="Standard"><text:s text:c="2"/>4. La cola de tareas de la sesion larga es demasiado generica.</text:p>
      <text:p text:style-name="Standard"><text:s text:c="5"/>- aparecen tareas como:</text:p>
      <text:p text:style-name="Standard"><text:s text:c="7"/>- `usar el repo y workspace reales`</text:p>
      <text:p text:style-name="Standard"><text:s text:c="7"/>- `crear modulos reutilizables`</text:p>
      <text:p text:style-name="Standard"><text:s text:c="5"/>- pero no tareas reales del CRM con entregables concretos del proyecto</text:p>
      <text:p text:style-name="Standard"/>
      <text:p text:style-name="Standard"><text:s text:c="2"/>OBJETIVO FUNCIONAL DE LA CORRECCION</text:p>
      <text:p text:style-name="Standard"/>
      <text:p text:style-name="Standard"><text:s text:c="2"/>Debes lograr estas 3 correcciones:</text:p>
      <text:p text:style-name="Standard"/>
      <text:p text:style-name="Standard"><text:s text:c="2"/>1. CONTINUIDAD AUTOMATICA DE LA COLA</text:p>
      <text:p text:style-name="Standard"><text:s text:c="2"/>- cuando una tarea termina y existe otra tarea lista, el runtime debe</text:p>
      <text:p text:style-name="Standard"><text:s text:c="2"/>continuar automaticamente</text:p>
      <text:p text:style-name="Standard"><text:s text:c="2"/>- no puede quedar `current_task_id = null` con tareas listas pendientes</text:p>
      <text:p text:style-name="Standard"><text:s text:c="2"/>- la sesion larga debe poder avanzar por multiples tareas sin relanzamiento</text:p>
      <text:p text:style-name="Standard"><text:s text:c="2"/>manual por cada una</text:p>
      <text:p text:style-name="Standard"/>
      <text:p text:style-name="Standard"><text:s text:c="2"/>2. WORKSPACE REAL DE SESION</text:p>
      <text:p text:style-name="Standard"><text:s text:c="2"/>- el control plane puede seguir leyendo politica y plan desde la raiz del</text:p>
      <text:p text:style-name="Standard"><text:s text:c="2"/>sistema</text:p>
      <text:p text:style-name="Standard"><text:s text:c="2"/>- pero la ejecucion del proyecto real debe trabajar sobre el `projectDir` de</text:p>
      <text:p text:style-name="Standard"><text:s text:c="2"/>la sesion</text:p>
      <text:p text:style-name="Standard"><text:s text:c="2"/>- la directiva debe distinguir claramente entre:</text:p>
      <text:p text:style-name="Standard"><text:s text:c="4"/>- `system_root` o raiz del runtime/orquestador</text:p>
      <text:p text:style-name="Standard"><text:s text:c="4"/>- `task_workspace_root` o workspace real del proyecto de la sesion</text:p>
      <text:p text:style-name="Standard"><text:s text:c="2"/>- el worker no puede escribir el CRM en la raiz del sistema</text:p>
      <text:p text:style-name="Standard"><text:s text:c="2"/>- los entregables reales del proyecto deben quedar dentro de:</text:p>
      <text:p text:style-name="Standard"><text:s text:c="4"/>- `workspace/projects/&lt;sesion&gt;/...`</text:p>
      <text:p text:style-name="Standard"/>
      <text:p text:style-name="Standard"><text:s text:c="2"/>3. PLANIFICACION REAL DE PROYECTO</text:p>
      <text:p text:style-name="Standard"><text:s text:c="2"/>- una sesion `long-run` no puede quedarse solo en tareas genericas de</text:p>
      <text:p text:style-name="Standard"><text:s text:c="2"/>bootstrap</text:p>
      <text:p text:style-name="Standard"><text:s text:c="2"/>- el planner o adaptador de runtime debe generar tareas reales del producto a</text:p>
      <text:p text:style-name="Standard"><text:s text:c="2"/>partir del requirement</text:p>
      <text:p text:style-name="Standard"><text:s text:c="2"/>- esas tareas deben tener:</text:p>
      <text:p text:style-name="Standard"><text:s text:c="4"/>- objetivo concreto</text:p>
      <text:p text:style-name="Standard"><text:s text:c="4"/>- expected_files reales del CRM</text:p>
      <text:p text:style-name="Standard"><text:s text:c="4"/>- validaciones reales del CRM</text:p>
      <text:p text:style-name="Standard"><text:s text:c="4"/>- dependencias coherentes</text:p>
      <text:p text:style-name="Standard"><text:s text:c="2"/>- una tarea de bootstrap minima puede existir, pero no puede ser el unico</text:p>
      <text:p text:style-name="Standard"><text:s text:c="2"/>trabajo real de la sesion</text:p>
      <text:p text:style-name="Standard"/>
      <text:p text:style-name="Standard"><text:s text:c="2"/>CORRECCIONES ESPERADAS</text:p>
      <text:p text:style-name="Standard"/>
      <text:p text:style-name="Standard"><text:s text:c="2"/>A. En la integracion de runtime</text:p>
      <text:p text:style-name="Standard"><text:soft-page-break/><text:s text:c="2"/>- corregir `backend/agent_runtime.py` y helpers minimos necesarios</text:p>
      <text:p text:style-name="Standard"><text:s text:c="2"/>- despues de completar una tarea, seleccionar la siguiente tarea lista y</text:p>
      <text:p text:style-name="Standard"><text:s text:c="2"/>continuar</text:p>
      <text:p text:style-name="Standard"><text:s text:c="2"/>- mantener `project_state.json` consistente:</text:p>
      <text:p text:style-name="Standard"><text:s text:c="4"/>- `current_task_id`</text:p>
      <text:p text:style-name="Standard"><text:s text:c="4"/>- `status`</text:p>
      <text:p text:style-name="Standard"><text:s text:c="4"/>- `completed_tasks`</text:p>
      <text:p text:style-name="Standard"><text:s text:c="4"/>- `failed_tasks`</text:p>
      <text:p text:style-name="Standard"><text:s text:c="4"/>- `blocked_tasks`</text:p>
      <text:p text:style-name="Standard"/>
      <text:p text:style-name="Standard"><text:s text:c="2"/>B. En el manejo de workspace</text:p>
      <text:p text:style-name="Standard"><text:s text:c="2"/>- usar el `projectDir` real de la sesion como root efectivo del trabajo del</text:p>
      <text:p text:style-name="Standard"><text:s text:c="2"/>worker</text:p>
      <text:p text:style-name="Standard"><text:s text:c="2"/>- las directivas deben reflejar ese workspace real</text:p>
      <text:p text:style-name="Standard"><text:s text:c="2"/>- si necesitas introducir un campo nuevo tipo `task_workspace_root`, hazlo de</text:p>
      <text:p text:style-name="Standard"><text:s text:c="2"/>forma clara y compatible</text:p>
      <text:p text:style-name="Standard"><text:s text:c="2"/>- no mezclar falsa evidencia del repo principal con evidencia del proyecto de</text:p>
      <text:p text:style-name="Standard"><text:s text:c="2"/>sesion</text:p>
      <text:p text:style-name="Standard"/>
      <text:p text:style-name="Standard"><text:s text:c="2"/>C. En la planificacion de sesiones largas</text:p>
      <text:p text:style-name="Standard"><text:s text:c="2"/>- convertir el requirement largo del usuario en una cola de trabajo real del</text:p>
      <text:p text:style-name="Standard"><text:s text:c="2"/>proyecto</text:p>
      <text:p text:style-name="Standard"><text:s text:c="2"/>- las tareas deben apuntar a archivos del CRM, por ejemplo:</text:p>
      <text:p text:style-name="Standard"><text:s text:c="4"/>- `frontend/...`</text:p>
      <text:p text:style-name="Standard"><text:s text:c="4"/>- `src/...`</text:p>
      <text:p text:style-name="Standard"><text:s text:c="4"/>- `shared/...`</text:p>
      <text:p text:style-name="Standard"><text:s text:c="4"/>- `tests/...`</text:p>
      <text:p text:style-name="Standard"><text:s text:c="4"/>- `docs/...`</text:p>
      <text:p text:style-name="Standard"><text:s text:c="2"/>- no dejar la sesion larga reducida a artefactos `runtime/artifacts/*.json`</text:p>
      <text:p text:style-name="Standard"><text:s text:c="2"/>como unico entregable</text:p>
      <text:p text:style-name="Standard"/>
      <text:p text:style-name="Standard"><text:s text:c="2"/>ALCANCE EXACTO</text:p>
      <text:p text:style-name="Standard"/>
      <text:p text:style-name="Standard"><text:s text:c="2"/>Puedes modificar solo si hace falta:</text:p>
      <text:p text:style-name="Standard"><text:s text:c="2"/>- `backend/agent_runtime.py`</text:p>
      <text:p text:style-name="Standard"><text:s text:c="2"/>- `orchestrator/planner.py`</text:p>
      <text:p text:style-name="Standard"><text:s text:c="2"/>- `orchestrator/task_queue.py`</text:p>
      <text:p text:style-name="Standard"><text:s text:c="2"/>- `orchestrator/directive_context.py`</text:p>
      <text:p text:style-name="Standard"><text:s text:c="2"/>- `orchestrator/directive_generator.py`</text:p>
      <text:p text:style-name="Standard"><text:s text:c="2"/>- `workers/codex_worker.py`</text:p>
      <text:p text:style-name="Standard"><text:s text:c="2"/>- helpers pequenos estrictamente necesarios para soportar workspace real de</text:p>
      <text:p text:style-name="Standard"><text:s text:c="2"/>sesion y continuidad automatica</text:p>
      <text:p text:style-name="Standard"><text:s text:c="2"/>- tests pequenos y enfocados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UI en esta corrida</text:p>
      <text:p text:style-name="Standard"><text:s text:c="2"/>- no romper los benchmarks ya cerrados</text:p>
      <text:p text:style-name="Standard"><text:s text:c="2"/>- no trabajar dentro de `runtime_orquestador_codex_pack/`</text:p>
      <text:p text:style-name="Standard"><text:s text:c="2"/>- no reportar exito sin evidencia real en disco</text:p>
      <text:p text:style-name="Standard"><text:s text:c="2"/>- no marcar aprobada una sesion larga si sigue dejando el proyecto vacio</text:p>
      <text:p text:style-name="Standard"><text:s text:c="2"/>- no maquillar tareas genericas del runtime como si fueran trabajo real del</text:p>
      <text:p text:style-name="Standard"><text:soft-page-break/><text:s text:c="2"/>CRM</text:p>
      <text:p text:style-name="Standard"/>
      <text:p text:style-name="Standard"><text:s text:c="2"/>VALIDACION MINIMA OBLIGATORIA</text:p>
      <text:p text:style-name="Standard"/>
      <text:p text:style-name="Standard"><text:s text:c="2"/>Debes dejar evidencia real de que:</text:p>
      <text:p text:style-name="Standard"/>
      <text:p text:style-name="Standard"><text:s text:c="2"/>1. CONTINUIDAD</text:p>
      <text:p text:style-name="Standard"><text:s text:c="2"/>- lanzas una sesion larga real o una reproduccion controlada equivalente</text:p>
      <text:p text:style-name="Standard"><text:s text:c="2"/>- la primera tarea termina</text:p>
      <text:p text:style-name="Standard"><text:s text:c="2"/>- la segunda tarea arranca automaticamente sin relanzamiento manual</text:p>
      <text:p text:style-name="Standard"><text:s text:c="2"/>- el estado del runtime no queda muerto con `pending` listo y `current_task_id</text:p>
      <text:p text:style-name="Standard"><text:s text:c="2"/>= null`</text:p>
      <text:p text:style-name="Standard"/>
      <text:p text:style-name="Standard"><text:s text:c="2"/>2. WORKSPACE REAL</text:p>
      <text:p text:style-name="Standard"><text:s text:c="2"/>- la sesion escribe archivos reales dentro de su `projectDir`</text:p>
      <text:p text:style-name="Standard"><text:s text:c="2"/>- la directiva deja claro el workspace real de la tarea</text:p>
      <text:p text:style-name="Standard"><text:s text:c="2"/>- la validacion del worker y del validator se hace contra ese workspace real</text:p>
      <text:p text:style-name="Standard"/>
      <text:p text:style-name="Standard"><text:s text:c="2"/>3. PLANIFICACION REAL</text:p>
      <text:p text:style-name="Standard"><text:s text:c="2"/>- la cola de la sesion larga contiene tareas reales del producto</text:p>
      <text:p text:style-name="Standard"><text:s text:c="2"/>- los `expected_files` apuntan a archivos del CRM o del proyecto real</text:p>
      <text:p text:style-name="Standard"><text:s text:c="2"/>- no solo a `runtime/artifacts/*.json`</text:p>
      <text:p text:style-name="Standard"/>
      <text:p text:style-name="Standard"><text:s text:c="2"/>4. EVIDENCIA</text:p>
      <text:p text:style-name="Standard"><text:s text:c="2"/>- el proyecto de la sesion termina con mas de un archivo real de producto</text:p>
      <text:p text:style-name="Standard"><text:s text:c="2"/>- deben aparecer archivos reales del CRM o de una reproduccion equivalente</text:p>
      <text:p text:style-name="Standard"><text:s text:c="2"/>controlada</text:p>
      <text:p text:style-name="Standard"><text:s text:c="2"/>- la evidencia debe incluir directiva, historia, validacion y checkpoint</text:p>
      <text:p text:style-name="Standard"/>
      <text:p text:style-name="Standard"><text:s text:c="2"/>5. HONESTIDAD</text:p>
      <text:p text:style-name="Standard"><text:s text:c="2"/>- si la continuidad automatica o el workspace real siguen fallando, dilo</text:p>
      <text:p text:style-name="Standard"><text:s text:c="2"/>claramente</text:p>
      <text:p text:style-name="Standard"><text:s text:c="2"/>- no cierres la corrida como correcta si el proyecto queda vacio o si las</text:p>
      <text:p text:style-name="Standard"><text:s text:c="2"/>tareas siguen siendo genericas</text:p>
      <text:p text:style-name="Standard"/>
      <text:p text:style-name="Standard"><text:s text:c="2"/>SI AGREGAS TESTS</text:p>
      <text:p text:style-name="Standard"><text:s text:c="2"/>Mantenlos pequenos y enfocados en:</text:p>
      <text:p text:style-name="Standard"><text:s text:c="2"/>- continuidad automatica</text:p>
      <text:p text:style-name="Standard"><text:s text:c="2"/>- workspace real de sesion</text:p>
      <text:p text:style-name="Standard"><text:s text:c="2"/>- planificacion real de tareas de proyecto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><text:s text:c="2"/>5. confirmacion explicita de si una sesion `long-run` ya puede empezar a</text:p>
      <text:p text:style-name="Standard"><text:s text:c="2"/>construir un proyecto real por multiples tareas en su `projectDir`</text:p>
      <text:p text:style-name="Standard"/>
      <text:p text:style-name="Standard"><text:s text:c="2"/>Cuando termine, lo reviso en seco y te digo si ya quedó listo para otra prueba</text:p>
      <text:p text:style-name="Standard"><text:s text:c="2"/>larga real.</text:p>
      <text:p text:style-name="Standard"><text:soft-page-break/></text:p>
      <text:p text:style-name="Standard"/>
      <text:p text:style-name="Standard">› ya termino esto contesto Corregido en la raíz real del repo, no dentro de</text:p>
      <text:p text:style-name="Standard"><text:s text:c="4"/>runtime_orquestador_codex_pack/.</text:p>
      <text:p text:style-name="Standard"/>
      <text:p text:style-name="Standard"><text:s text:c="4"/>Archivos tocados</text:p>
      <text:p text:style-name="Standard"/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backend/agent_runtime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planner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directive_context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directive_generator.py</text:p>
      <text:p text:style-name="Standard"/>
      <text:p text:style-name="Standard"><text:s text:c="4"/>Artefactos de validación creados:</text:p>
      <text:p text:style-name="Standard"/>
      <text:p text:style-name="Standard"><text:s text:c="4"/>- workspace/projects/sesion-validation-longrun-crm-structural-</text:p>
      <text:p text:style-name="Standard"><text:s text:c="2"/>20260513104130/</text:p>
      <text:p text:style-name="Standard"><text:s text:c="4"/>- workspace/projects/sesion-validation-logpath-20260513104423/</text:p>
      <text:p text:style-name="Standard"><text:s text:c="4"/>- runtime/benchmarks/20260513T104351Z-b72329f6/report.json</text:p>
      <text:p text:style-name="Standard"/>
      <text:p text:style-name="Standard"><text:s text:c="4"/>Bugs corregidos</text:p>
      <text:p text:style-name="Standard"/>
      <text:p text:style-name="Standard"><text:s text:c="4"/>- Continuidad automática: agent_runtime.py ahora puede seguir ejecutando</text:p>
      <text:p text:style-name="Standard"><text:s text:c="6"/>tareas listas con run_control_plane_until_idle(); ya no se queda en una</text:p>
      <text:p text:style-name="Standard"><text:s text:c="2"/>sola</text:p>
      <text:p text:style-name="Standard"><text:s text:c="6"/>tarea si hay cola pendiente ejecutable.</text:p>
      <text:p text:style-name="Standard"><text:s text:c="4"/>- Workspace real de sesión: el runtime usa projectDir como workspace</text:p>
      <text:p text:style-name="Standard"><text:s text:c="2"/>efectivo</text:p>
      <text:p text:style-name="Standard"><text:s text:c="6"/>del worker y del validator. La directiva separa system_root de</text:p>
      <text:p text:style-name="Standard"><text:s text:c="6"/>task_workspace_root.</text:p>
      <text:p text:style-name="Standard"><text:s text:c="4"/>- Directivas y runtime por sesión: directivas, estado, historia,</text:p>
      <text:p text:style-name="Standard"><text:s text:c="2"/>checkpoints y</text:p>
      <text:p text:style-name="Standard"><text:s text:c="6"/>logs de control plane quedan bajo workspace/projects/&lt;sesion&gt;/runtime/.</text:p>
      <text:p text:style-name="Standard"><text:s text:c="4"/>- Planificación long-run real: planner.py genera tareas de producto CRM con</text:p>
      <text:p text:style-name="Standard"><text:s text:c="6"/>expected_files concretos como frontend/index.html, frontend/app.js,</text:p>
      <text:p text:style-name="Standard"><text:s text:c="2"/>shared/</text:p>
      <text:p text:style-name="Standard"><text:s text:c="6"/>crm_schema.json, src/crm.js, tests/crm_smoke.test.js; ya no cae en</text:p>
      <text:p text:style-name="Standard"><text:s text:c="2"/>runtime/</text:p>
      <text:p text:style-name="Standard"><text:s text:c="6"/>artifacts/*.json para long-run.</text:p>
      <text:p text:style-name="Standard"><text:s text:c="4"/>- Degradación falsa corregida: directive_context.py ya no marca degradado</text:p>
      <text:p text:style-name="Standard"><text:s text:c="2"/>un</text:p>
      <text:p text:style-name="Standard"><text:s text:c="6"/>contexto solo porque el checkpoint futuro de la tarea todavía no existe.</text:p>
      <text:p text:style-name="Standard"/>
      <text:p text:style-name="Standard"><text:s text:c="4"/>Validaciones ejecutadas</text:p>
      <text:p text:style-name="Standard"/>
      <text:p text:style-name="Standard"><text:soft-page-break/><text:s text:c="4"/>- python3 -m py_compile backend/agent_runtime.py orchestrator/planner.py</text:p>
      <text:p text:style-name="Standard"><text:s text:c="6"/>orchestrator/directive_context.py orchestrator/directive_generator.py</text:p>
      <text:p text:style-name="Standard"><text:s text:c="2"/>pasó.</text:p>
      <text:p text:style-name="Standard"><text:s text:c="4"/>- Validación planner long-run: generó 6 tareas CRM, dependencias</text:p>
      <text:p text:style-name="Standard"><text:s text:c="2"/>secuenciales</text:p>
      <text:p text:style-name="Standard"><text:s text:c="6"/>y runtime_artifact_expected=[].</text:p>
      <text:p text:style-name="Standard"><text:s text:c="4"/>- Reproducción controlada real:</text:p>
      <text:p text:style-name="Standard"><text:s text:c="8"/>- Proyecto: workspace/projects/sesion-validation-longrun-crm-</text:p>
      <text:p text:style-name="Standard"><text:s text:c="2"/>structural-</text:p>
      <text:p text:style-name="Standard"><text:s text:c="10"/>20260513104130</text:p>
      <text:p text:style-name="Standard"><text:s text:c="8"/>- tasks_executed=6</text:p>
      <text:p text:style-name="Standard"><text:s text:c="8"/>- las 6 tareas quedaron completed</text:p>
      <text:p text:style-name="Standard"><text:s text:c="8"/>- current_task_id=null, sin pending_ids ni ready_ids</text:p>
      <text:p text:style-name="Standard"><text:s text:c="8"/>- se crearon archivos reales: README.md, frontend/index.html, frontend/</text:p>
      <text:p text:style-name="Standard"><text:s text:c="10"/>app.js, shared/crm_schema.json, src/crm.js, tests/crm_smoke.test.js,</text:p>
      <text:p text:style-name="Standard"><text:s text:c="10"/>etc.</text:p>
      <text:p text:style-name="Standard"><text:s text:c="8"/>- hubo 6 directivas, 6 eventos de historia y 6 checkpoints.</text:p>
      <text:p text:style-name="Standard"><text:s text:c="8"/>- directive_degraded_flags=[false, false, false, false, false, false]</text:p>
      <text:p text:style-name="Standard"><text:s text:c="4"/>- Validación de arranque de sesión:</text:p>
      <text:p text:style-name="Standard"><text:s text:c="8"/>- runtimeDir, terminalLogPath y directiveJsonPath quedaron bajo el</text:p>
      <text:p text:style-name="Standard"><text:s text:c="10"/>projectDir/runtime/.</text:p>
      <text:p text:style-name="Standard"><text:s text:c="4"/>- python3 -m orchestrator.benchmark pasó completo:</text:p>
      <text:p text:style-name="Standard"><text:s text:c="8"/>- smoke-01, crud-ui-02, refactor-mid-03, long-project-04, recovery-05</text:p>
      <text:p text:style-name="Standard"><text:s text:c="8"/>- gate aprobado.</text:p>
      <text:p text:style-name="Standard"/>
      <text:p text:style-name="Standard"><text:s text:c="4"/>Riesgos reales restantes</text:p>
      <text:p text:style-name="Standard"/>
      <text:p text:style-name="Standard"><text:s text:c="4"/>- La reproducción usó un command_builder determinístico para validar el</text:p>
      <text:p text:style-name="Standard"><text:s text:c="6"/>control plane; no demuestra todavía calidad de salida de Codex</text:p>
      <text:p text:style-name="Standard"><text:s text:c="2"/>construyendo</text:p>
      <text:p text:style-name="Standard"><text:s text:c="6"/>un CRM completo.</text:p>
      <text:p text:style-name="Standard"><text:s text:c="4"/>- El planner long-run ahora tiene blueprint CRM útil, pero sigue siendo</text:p>
      <text:p text:style-name="Standard"><text:s text:c="6"/>heurístico para otros tipos de producto.</text:p>
      <text:p text:style-name="Standard"><text:s text:c="4"/>- La sesión observada antigua no fue migrada retroactivamente; las sesiones</text:p>
      <text:p text:style-name="Standard"><text:s text:c="6"/>nuevas usan la corrección.</text:p>
      <text:p text:style-name="Standard"><text:s text:c="4"/>- Falta una corrida larga real con worker Codex externo para medir robustez</text:p>
      <text:p text:style-name="Standard"><text:s text:c="6"/>bajo fallos, latencia y calidad de implementación.</text:p>
      <text:p text:style-name="Standard"/>
      <text:p text:style-name="Standard"><text:s text:c="4"/>Confirmación</text:p>
      <text:p text:style-name="Standard"><text:s text:c="4"/>Sí: una sesión long-run ya puede empezar a construir un proyecto real por</text:p>
      <text:p text:style-name="Standard"><text:s text:c="4"/>múltiples tareas dentro de su projectDir, con directivas, validación,</text:p>
      <text:p text:style-name="Standard"><text:s text:c="2"/>historia</text:p>
      <text:p text:style-name="Standard"><text:s text:c="4"/>y checkpoints alineados al workspace de la sesión. No afirmo todavía que</text:p>
      <text:p text:style-name="Standard"><text:s text:c="2"/>esté</text:p>
      <text:p text:style-name="Standard"><text:s text:c="4"/>listo para proyectos largos reales de producción sin una corrida externa</text:p>
      <text:p text:style-name="Standard"><text:s text:c="4"/>completa con Codex.</text:p>
      <text:p text:style-name="Standard"/>
      <text:p text:style-name="Standard"/>
      <text:p text:style-name="Standard">■ Your access token could not be refreshed because your refresh token was</text:p>
      <text:p text:style-name="Standard">already used. Please log out and sign in again.</text:p>
      <text:p text:style-name="Standard"/>
      <text:p text:style-name="Standard"/>
      <text:p text:style-name="Standard"><text:soft-page-break/>› ya termino</text:p>
      <text:p text:style-name="Standard"/>
      <text:p text:style-name="Standard"/>
      <text:p text:style-name="Standard">■ Your access token could not be refreshed because your refresh token was</text:p>
      <text:p text:style-name="Standard">already used. Please log out and sign in again.</text:p>
      <text:p text:style-name="Standard">Token usage: total=5,169,055 input=4,907,416 (+ 45,255,552 cached) output=261,639 (reasoning 95,293)</text:p>
      <text:p text:style-name="Standard">To continue this session, run codex resume 019e1843-8209-7740-9ac4-1eaf172c05a9</text:p>
      <text:p text:style-name="Standard">neurodriver@neurodriver-Dell-Pro-16-PC16250:~/BASE _METACOGNICION_COLOMBIA$ codex resume 019e1843-8209-7740-9ac4-1eaf172c05a9</text:p>
      <text:p text:style-name="Standard">╭───────────────────────────────────────────────────────────────╮</text:p>
      <text:p text:style-name="Standard">│ ✨ Update available! 0.114.0 -&gt; 0.130.0 <text:s text:c="22"/>│</text:p>
      <text:p text:style-name="Standard">│ See https://github.com/openai/codex for installation options. │</text:p>
      <text:p text:style-name="Standard">│ <text:s text:c="62"/>│</text:p>
      <text:p text:style-name="Standard">│ See full release notes: <text:s text:c="38"/>│</text:p>
      <text:p text:style-name="Standard">│ https://github.com/openai/codex/releases/latest <text:s text:c="14"/>│</text:p>
      <text:p text:style-name="Standard">╰───────────────────────────────────────────────────────────────╯</text:p>
      <text:p text:style-name="Standard"/>
      <text:p text:style-name="Standard">╭─────────────────────────────────────────────────╮</text:p>
      <text:p text:style-name="Standard">│ &gt;_ OpenAI Codex (v0.114.0) <text:s text:c="21"/>│</text:p>
      <text:p text:style-name="Standard">│ <text:s text:c="48"/>│</text:p>
      <text:p text:style-name="Standard">│ model: <text:s text:c="4"/>gpt-5.4 xhigh <text:s text:c="2"/>/model to change <text:s text:c="4"/>│</text:p>
      <text:p text:style-name="Standard">│ directory: /home/…/BASE _METACOGNICION_COLOMBIA │</text:p>
      <text:p text:style-name="Standard">╰─────────────────────────────────────────────────╯</text:p>
      <text:p text:style-name="Standard"/>
      <text:p text:style-name="Standard"><text:s text:c="2"/>Tip: New 2x rate limits until April 2nd.</text:p>
      <text:p text:style-name="Standard"/>
      <text:p text:style-name="Standard"/>
      <text:p text:style-name="Standard">› se me cerro el laptop por falta d ecorriente <text:s/>y nesecto saber en que quedamos</text:p>
      <text:p text:style-name="Standard"/>
      <text:p text:style-name="Standard"/>
      <text:p text:style-name="Standard">• Voy a revisar el estado del workspace y los cambios recientes para reconstruir</text:p>
      <text:p text:style-name="Standard"><text:s text:c="2"/>en qué punto quedó el trabajo antes de que se apagara el laptop.</text:p>
      <text:p text:style-name="Standard"/>
      <text:p text:style-name="Standard">• El directorio raíz no es un repositorio Git, así que estoy reconstruyendo el</text:p>
      <text:p text:style-name="Standard"><text:s text:c="2"/>estado por estructura y archivos recientes dentro del proyecto. Ahora voy a</text:p>
      <text:p text:style-name="Standard"><text:s text:c="2"/>ubicar qué carpeta tuvo actividad más reciente y si hay logs de sesión.</text:p>
      <text:p text:style-name="Standard"/>
      <text:p text:style-name="Standard">• Hay una pista clara: la actividad más reciente fue hoy, 11 de mayo de 2026,</text:p>
      <text:p text:style-name="Standard"><text:s text:c="2"/>dentro de vista_IA/architecture-react-three-flask-socketio. Estoy abriendo los</text:p>
      <text:p text:style-name="Standard"><text:s text:c="2"/>logs y archivos de estado para identificar exactamente cuál era el último</text:p>
      <text:p text:style-name="Standard"><text:s text:c="2"/>frente activo y si quedó algo a medias.</text:p>
      <text:p text:style-name="Standard"/>
      <text:p text:style-name="Standard">• El LACE_LOG muestra una sesión ya muy avanzada para retry-ui-01, pero además</text:p>
      <text:p text:style-name="Standard"><text:s text:c="2"/>veo cambios aún más recientes en backend/app.py, backend/</text:p>
      <text:p text:style-name="Standard"><text:s text:c="2"/>test_workspace_visual_sync.py y frontend/src/App.jsx. Voy a contrastar esos</text:p>
      <text:p text:style-name="Standard"><text:s text:c="2"/>frentes para decirte cuál era el último trabajo real y si quedó cerrado o no.</text:p>
      <text:p text:style-name="Standard"/>
      <text:p text:style-name="Standard">• Ya tengo dos capas de contexto: una sesión LACE completa cerrada para retry-</text:p>
      <text:p text:style-name="Standard"><text:s text:c="2"/>ui-01 y un handoff que dice que el siguiente paso era validar en vivo la</text:p>
      <text:p text:style-name="Standard"><text:soft-page-break/><text:s text:c="2"/>instancia parcheada del visualizador arquitectónico. Voy a confirmar si además</text:p>
      <text:p text:style-name="Standard"><text:s text:c="2"/>se alcanzó a tocar el backend/frontend principal y si eso quedó pasando</text:p>
      <text:p text:style-name="Standard"><text:s text:c="2"/>pruebas.</text:p>
      <text:p text:style-name="Standard"/>
      <text:p text:style-name="Standard">• Las pruebas del backend siguen corriendo más de lo esperado, así que puede</text:p>
      <text:p text:style-name="Standard"><text:s text:c="2"/>haber algún test bloqueado o una espera larga en esta rama. Estoy vigilando</text:p>
      <text:p text:style-name="Standard"><text:s text:c="2"/>eso porque también es una señal útil de dónde quedó el sistema.</text:p>
      <text:p text:style-name="Standard"/>
      <text:p text:style-name="Standard">• Hay una diferencia importante del entorno: el test nuevo</text:p>
      <text:p text:style-name="Standard"><text:s text:c="2"/>test_workspace_visual_sync.py no corre con el python3 del sistema porque ahí</text:p>
      <text:p text:style-name="Standard"><text:s text:c="2"/>falta flask, mientras que el bloque de agent_runtime sí pasa. Voy a verificar</text:p>
      <text:p text:style-name="Standard"><text:s text:c="2"/>con el entorno Python del proyecto, que es el mismo que usa el backend real.</text:p>
      <text:p text:style-name="Standard"/>
      <text:p text:style-name="Standard">• Ya pude cerrar la verificación más útil: con el Python del entorno del</text:p>
      <text:p text:style-name="Standard"><text:s text:c="2"/>proyecto, todo el backend principal está verde. Ahora solo me falta ubicar si</text:p>
      <text:p text:style-name="Standard"><text:s text:c="2"/>el “siguiente paso” pendiente era reabrir la app visual en 5001 y validar la</text:p>
      <text:p text:style-name="Standard"><text:s text:c="2"/>sesión en vivo, o si hubo otra edición posterior sin cerrar.</text:p>
      <text:p text:style-name="Standard"/>
      <text:p text:style-name="Standard">• Quedamos en esto:</text:p>
      <text:p text:style-name="Standard"/>
      <text:p text:style-name="Standard"><text:s text:c="2"/>1. La mini app de tareas en LACE_LOG.md sí quedó cerrada el 11 de mayo de 2026</text:p>
      <text:p text:style-name="Standard"><text:s text:c="5"/>con los 10 ciclos LACE completos. Ese frente está terminado.</text:p>
      <text:p text:style-name="Standard"><text:s text:c="2"/>2. Lo último que quedó grabado hoy, entre 10:13 y 10:17, fue en el proyecto</text:p>
      <text:p text:style-name="Standard"><text:s text:c="5"/>principal architecture-react-three-flask-socketio:</text:p>
      <text:p text:style-name="Standard"><text:s text:c="6"/>- frontend/src/App.jsx se tocó por última vez.</text:p>
      <text:p text:style-name="Standard"><text:s text:c="6"/>- backend/app.py ya quedó con inferencia automática de dependencias y</text:p>
      <text:p text:style-name="Standard"><text:s text:c="8"/>flujo al sincronizar archivos del workspace.</text:p>
      <text:p text:style-name="Standard"><text:s text:c="6"/>- backend/test_workspace_visual_sync.py valida justo eso.</text:p>
      <text:p text:style-name="Standard"><text:s text:c="2"/>3. El estado real ahora es:</text:p>
      <text:p text:style-name="Standard"><text:s text:c="6"/>- El backend está detenido.</text:p>
      <text:p text:style-name="Standard"><text:s text:c="6"/>- Con el entorno correcto del proyecto (/home/neurodriver/ferrari_env/bin/</text:p>
      <text:p text:style-name="Standard"><text:s text:c="8"/>python) los tests del backend pasan: 45 tests OK.</text:p>
      <text:p text:style-name="Standard"><text:s text:c="6"/>- El python3 del sistema no sirve para todo porque ahí falta flask.</text:p>
      <text:p text:style-name="Standard"/>
      <text:p text:style-name="Standard"><text:s text:c="2"/>El pendiente real era retomar desde el handoff y levantar la instancia en 5001</text:p>
      <text:p text:style-name="Standard"><text:s text:c="2"/>para validar la sesión visual en vivo: mapa, ciclos LACE, panel HABLA y lint</text:p>
      <text:p text:style-name="Standard"><text:s text:c="2"/>visual. Eso está resumido en CONTEXTO_DE_CONTINUIDAD.md y los comandos están</text:p>
      <text:p text:style-name="Standard"><text:s text:c="2"/>en COMANDOS_DE_LANZAMIENTO.md.</text:p>
      <text:p text:style-name="Standard"/>
      <text:p text:style-name="Standard"><text:s text:c="2"/>Si quieres, en el siguiente paso lo levanto y seguimos exactamente desde ahí.</text:p>
      <text:p text:style-name="Standard"/>
      <text:p text:style-name="Standard"/>
      <text:p text:style-name="Standard">› deme elcomando para levantar el servidor y hacemos test</text:p>
      <text:p text:style-name="Standard"/>
      <text:p text:style-name="Standard"/>
      <text:p text:style-name="Standard">• Usa esto desde la raíz del proyecto visual:</text:p>
      <text:p text:style-name="Standard"/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op</text:p>
      <text:p text:style-name="Standard"><text:s text:c="2"/>PORT=5001 OPEN_BROWSER=0 APP_URL=http://127.0.0.1:5001/</text:p>
      <text:p text:style-name="Standard"><text:s text:c="2"/>BACKEND_URL=http://127.0.0.1:5001/api/architecture bash start.sh start</text:p>
      <text:p text:style-name="Standard"><text:soft-page-break/></text:p>
      <text:p text:style-name="Standard"><text:s text:c="2"/>Luego abre:</text:p>
      <text:p text:style-name="Standard"/>
      <text:p text:style-name="Standard"><text:s text:c="2"/>http://127.0.0.1:5001/</text:p>
      <text:p text:style-name="Standard"/>
      <text:p text:style-name="Standard"><text:s text:c="2"/>Y para correr los tests con el entorno correcto:</text:p>
      <text:p text:style-name="Standard"/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/home/neurodriver/ferrari_env/bin/python -m unittest discover -s backend -p</text:p>
      <text:p text:style-name="Standard"><text:s text:c="2"/>'test_*.py' -q</text:p>
      <text:p text:style-name="Standard"/>
      <text:p text:style-name="Standard"><text:s text:c="2"/>Si quieres, el siguiente paso lo hago yo: levantarlo y revisar la sesión en</text:p>
      <text:p text:style-name="Standard"><text:s text:c="2"/>vivo.</text:p>
      <text:p text:style-name="Standard"/>
      <text:p text:style-name="Standard"/>
      <text:p text:style-name="Standard">› ya levanto la seccion deme un promt <text:s/>basico <text:s/>para testear la primera etapa</text:p>
      <text:p text:style-name="Standard"><text:s text:c="2"/>facil</text:p>
      <text:p text:style-name="Standard"/>
      <text:p text:style-name="Standard"/>
      <text:p text:style-name="Standard">• Pega este prompt. Es lo bastante simple para probar la primera etapa, pero</text:p>
      <text:p text:style-name="Standard"><text:s text:c="2"/>obliga al sistema a crear archivos reales, lógica, UI y pruebas:</text:p>
      <text:p text:style-name="Standard"/>
      <text:p text:style-name="Standard"><text:s text:c="2"/>Crea una mini aplicacion web con HTML, CSS y JavaScript para convertir Celsius</text:p>
      <text:p text:style-name="Standard"><text:s text:c="2"/>a Fahrenheit y Fahrenheit a Celsius.</text:p>
      <text:p text:style-name="Standard"/>
      <text:p text:style-name="Standard"><text:s text:c="2"/>Requisitos:</text:p>
      <text:p text:style-name="Standard"><text:s text:c="2"/>- usar archivos reales dentro del workspace</text:p>
      <text:p text:style-name="Standard"><text:s text:c="2"/>- separar la logica en funciones reutilizables</text:p>
      <text:p text:style-name="Standard"><text:s text:c="2"/>- crear una interfaz simple y clara</text:p>
      <text:p text:style-name="Standard"><text:s text:c="2"/>- validar entradas vacias o no numericas</text:p>
      <text:p text:style-name="Standard"><text:s text:c="2"/>- mostrar mensajes de error si el dato no sirve</text:p>
      <text:p text:style-name="Standard"><text:s text:c="2"/>- incluir pruebas simples</text:p>
      <text:p text:style-name="Standard"><text:s text:c="2"/>- documentar como ejecutarlo</text:p>
      <text:p text:style-name="Standard"><text:s text:c="2"/>- no reinicies nada; trabaja desde el estado real actual</text:p>
      <text:p text:style-name="Standard"><text:s text:c="2"/>- registra la sesion en LACE_LOG.md y muestra el progreso normal</text:p>
      <text:p text:style-name="Standard"/>
      <text:p text:style-name="Standard"><text:s text:c="2"/>Si quieres una version aun mas minima para smoke test puro, usa esta:</text:p>
      <text:p text:style-name="Standard"/>
      <text:p text:style-name="Standard"><text:s text:c="2"/>Crea una mini aplicacion web con HTML, CSS y JavaScript para sumar dos</text:p>
      <text:p text:style-name="Standard"><text:s text:c="2"/>numeros.</text:p>
      <text:p text:style-name="Standard"><text:s text:c="2"/>Usa archivos reales, separa logica y UI, agrega una prueba simple y documenta</text:p>
      <text:p text:style-name="Standard"><text:s text:c="2"/>como ejecutarlo.</text:p>
      <text:p text:style-name="Standard"><text:s text:c="2"/>No reinicies nada; trabaja desde el estado real actual.</text:p>
      <text:p text:style-name="Standard"/>
      <text:p text:style-name="Standard"><text:s text:c="2"/>Lo que deberías ver en esta primera prueba:</text:p>
      <text:p text:style-name="Standard"/>
      <text:p text:style-name="Standard"><text:s text:c="2"/>- aparece docs/habla-session.md</text:p>
      <text:p text:style-name="Standard"><text:s text:c="2"/>- aparece LACE_LOG.md</text:p>
      <text:p text:style-name="Standard"><text:s text:c="2"/>- aparecen los ciclos LACE</text:p>
      <text:p text:style-name="Standard"><text:s text:c="2"/>- se crean nodos reales del proyecto en el mapa</text:p>
      <text:p text:style-name="Standard"><text:s text:c="2"/>- el panel HABLA muestra directiva, estado y avance</text:p>
      <text:p text:style-name="Standard"><text:soft-page-break/></text:p>
      <text:p text:style-name="Standard"><text:s text:c="2"/>Si quieres, te doy ahora un prompt de segunda etapa para probar reanudación de</text:p>
      <text:p text:style-name="Standard"><text:s text:c="2"/>sesión y no solo arranque.</text:p>
      <text:p text:style-name="Standard"/>
      <text:p text:style-name="Standard"/>
      <text:p text:style-name="Standard">› cual nombre de proyecto le ponemos</text:p>
      <text:p text:style-name="Standard"/>
      <text:p text:style-name="Standard"/>
      <text:p text:style-name="Standard">• Usa smoke-conversor-01.</text:p>
      <text:p text:style-name="Standard"/>
      <text:p text:style-name="Standard"><text:s text:c="2"/>Si prefieres la prueba más mínima de suma, usa smoke-suma-01.</text:p>
      <text:p text:style-name="Standard"/>
      <text:p text:style-name="Standard"><text:s text:c="2"/>Regla práctica:</text:p>
      <text:p text:style-name="Standard"/>
      <text:p text:style-name="Standard"><text:s text:c="2"/>- sin espacios</text:p>
      <text:p text:style-name="Standard"><text:s text:c="2"/>- corto</text:p>
      <text:p text:style-name="Standard"><text:s text:c="2"/>- con sufijo -01 para que luego puedas hacer -02, -03</text:p>
      <text:p text:style-name="Standard"/>
      <text:p text:style-name="Standard"><text:s text:c="2"/>Si quieres, te dejo el prompt ya escrito con smoke-conversor-01 metido.</text:p>
      <text:p text:style-name="Standard"/>
      <text:p text:style-name="Standard"/>
      <text:p text:style-name="Standard">› ok perfecto ya arranco <text:s/>monitorea en vivo</text:p>
      <text:p text:style-name="Standard"/>
      <text:p text:style-name="Standard"/>
      <text:p text:style-name="Standard">• Voy a vigilar la sesión activa desde el backend, los logs del runtime y los</text:p>
      <text:p text:style-name="Standard"><text:s text:c="2"/>archivos del workspace para confirmar si el arranque está materializando</text:p>
      <text:p text:style-name="Standard"><text:s text:c="2"/>LACE_LOG, ciclos y nodos reales.</text:p>
      <text:p text:style-name="Standard"/>
      <text:p text:style-name="Standard">• Detecté una sesión nueva: sesion-20260511184524-smoke-suma-01. Ahora voy a</text:p>
      <text:p text:style-name="Standard"><text:s text:c="2"/>mirar ese proyecto directo para confirmar si ya salieron habla-session,</text:p>
      <text:p text:style-name="Standard"><text:s text:c="2"/>LACE_LOG y los ciclos.</text:p>
      <text:p text:style-name="Standard"/>
      <text:p text:style-name="Standard">• La sesión no está muerta: el backend sigue recibiendo socket.io y lint de esa</text:p>
      <text:p text:style-name="Standard"><text:s text:c="2"/>escena. Pero por ahora el proyecto nuevo solo muestra instrumentación inicial;</text:p>
      <text:p text:style-name="Standard"><text:s text:c="2"/>voy a mirar el terminal.log y los eventos para ver si el agente está avanzando</text:p>
      <text:p text:style-name="Standard"><text:s text:c="2"/>o se quedó bloqueado.</text:p>
      <text:p text:style-name="Standard"/>
      <text:p text:style-name="Standard">• Veo una señal delicada: el terminal.log arranca con un error de autenticación</text:p>
      <text:p text:style-name="Standard"><text:s text:c="2"/>de Codex (refresh_token_reused), aunque la sesión sí emitió al menos una fase</text:p>
      <text:p text:style-name="Standard"><text:s text:c="2"/>plan. Voy a seguir el terminal.log y los eventos unos segundos más para</text:p>
      <text:p text:style-name="Standard"><text:s text:c="2"/>confirmar si el agente sigue vivo o si quedó degradado.</text:p>
      <text:p text:style-name="Standard"/>
      <text:p text:style-name="Standard">• Ya hubo avance real: LACE_LOG.md recibió el bloque completo de [CICLO-1</text:p>
      <text:p text:style-name="Standard"><text:s text:c="2"/>PROBLEMAS] y [CICLO-1 MEJORA]. Sigo unos segundos más para ver si después de</text:p>
      <text:p text:style-name="Standard"><text:s text:c="2"/>esa planificación se materializan archivos del producto o si el fallo de auth</text:p>
      <text:p text:style-name="Standard"><text:s text:c="2"/>vuelve a frenarlo.</text:p>
      <text:p text:style-name="Standard"/>
      <text:p text:style-name="Standard">• No hubo nuevas líneas en los últimos segundos, así que voy a comprobar si</text:p>
      <text:p text:style-name="Standard"><text:s text:c="2"/>aparecieron archivos reales del producto o si la sesión se quedó en la</text:p>
      <text:p text:style-name="Standard"><text:s text:c="2"/>planificación.</text:p>
      <text:p text:style-name="Standard"/>
      <text:p text:style-name="Standard">• Ya quedó creado docs/lace_cycles/ciclo-01.md, pero todavía no hay archivos del</text:p>
      <text:p text:style-name="Standard"><text:soft-page-break/><text:s text:c="2"/>producto. Voy a consultar el estado expuesto por el backend para saber si la</text:p>
      <text:p text:style-name="Standard"><text:s text:c="2"/>sesión sigue marcada como running o si ya quedó en espera/fallo silencioso.</text:p>
      <text:p text:style-name="Standard"/>
      <text:p text:style-name="Standard">• La parte visual ya refleja bien el ciclo 1: ciclo-01.md está en improving. Me</text:p>
      <text:p text:style-name="Standard"><text:s text:c="2"/>falta confirmar el estado interno del runtime para saber si sigue running o si</text:p>
      <text:p text:style-name="Standard"><text:s text:c="2"/>el proceso quedó colgado por la autenticación.</text:p>
      <text:p text:style-name="Standard"/>
      <text:p text:style-name="Standard">• El agente no está totalmente muerto: sigue emitiendo texto y ejecutó</text:p>
      <text:p text:style-name="Standard"><text:s text:c="2"/>comprobaciones de entorno (which nodejs, which chromium). Aun así, sigue sin</text:p>
      <text:p text:style-name="Standard"><text:s text:c="2"/>crear archivos del producto, así que voy a leer el estado interno del runtime</text:p>
      <text:p text:style-name="Standard"><text:s text:c="2"/>por HTTP local.</text:p>
      <text:p text:style-name="Standard"/>
      <text:p text:style-name="Standard">• Ahora sí hay actividad visual útil: el bridge creó nodos para frontend/</text:p>
      <text:p text:style-name="Standard"><text:s text:c="2"/>index.html, frontend/app.js, shared/temperature.js y tests/</text:p>
      <text:p text:style-name="Standard"><text:s text:c="2"/>temperature.test.js. Voy a comprobar si esos nodos ya se convirtieron en</text:p>
      <text:p text:style-name="Standard"><text:s text:c="2"/>archivos reales o si siguen solo declarados en el mapa.</text:p>
      <text:p text:style-name="Standard"/>
      <text:p text:style-name="Standard">• Estado</text:p>
      <text:p text:style-name="Standard"><text:s text:c="2"/>La sesión sí está viva. A las 11:48:22 se crearon docs/habla-session.md y</text:p>
      <text:p text:style-name="Standard"><text:s text:c="2"/>LACE_LOG.md. A las 11:49:48 apareció docs/lace_cycles/ciclo-01.md con estado</text:p>
      <text:p text:style-name="Standard"><text:s text:c="2"/>improving.</text:p>
      <text:p text:style-name="Standard"/>
      <text:p text:style-name="Standard"><text:s text:c="2"/>A las 11:50:11 el bridge visual creó nodos para:</text:p>
      <text:p text:style-name="Standard"/>
      <text:p text:style-name="Standard"><text:s text:c="2"/>- frontend/index.html</text:p>
      <text:p text:style-name="Standard"><text:s text:c="2"/>- frontend/app.js</text:p>
      <text:p text:style-name="Standard"><text:s text:c="2"/>- shared/temperature.js</text:p>
      <text:p text:style-name="Standard"><text:s text:c="2"/>- tests/temperature.test.js</text:p>
      <text:p text:style-name="Standard"/>
      <text:p text:style-name="Standard"><text:s text:c="2"/>Problema actual</text:p>
      <text:p text:style-name="Standard"><text:s text:c="2"/>Todavía no existen esos archivos en disco. Por ahora solo están declarados en</text:p>
      <text:p text:style-name="Standard"><text:s text:c="2"/>el mapa visual. El agente se desvió comprobando entorno:</text:p>
      <text:p text:style-name="Standard"/>
      <text:p text:style-name="Standard"><text:s text:c="2"/>- node no está instalado</text:p>
      <text:p text:style-name="Standard"><text:s text:c="2"/>- no hay navegador CLI detectado</text:p>
      <text:p text:style-name="Standard"><text:s text:c="2"/>- no encontró motor JS embebido en Python</text:p>
      <text:p text:style-name="Standard"><text:s text:c="2"/>- el terminal.log repite errores de auth de Codex: refresh_token_reused</text:p>
      <text:p text:style-name="Standard"/>
      <text:p text:style-name="Standard"><text:s text:c="2"/>Eso significa que la sesión avanza en instrumentación, pero todavía no</text:p>
      <text:p text:style-name="Standard"><text:s text:c="2"/>materializa producto real.</text:p>
      <text:p text:style-name="Standard"/>
      <text:p text:style-name="Standard"><text:s text:c="2"/>Mi lectura</text:p>
      <text:p text:style-name="Standard"><text:s text:c="2"/>Si en el próximo minuto no aparecen archivos reales en frontend/, shared/ o</text:p>
      <text:p text:style-name="Standard"><text:s text:c="2"/>tests/, lo correcto es detener y relanzar la sesión después de reautenticar</text:p>
      <text:p text:style-name="Standard"><text:s text:c="2"/>Codex.</text:p>
      <text:p text:style-name="Standard"/>
      <text:p text:style-name="Standard"><text:s text:c="2"/>Si quieres, sigo monitoreando otro momento más o te digo ya el paso exacto</text:p>
      <text:p text:style-name="Standard"><text:s text:c="2"/>para reiniciar limpio.</text:p>
      <text:p text:style-name="Standard"/>
      <text:p text:style-name="Standard"/>
      <text:p text:style-name="Standard">› si</text:p>
      <text:p text:style-name="Standard"/>
      <text:p text:style-name="Standard"><text:soft-page-break/></text:p>
      <text:p text:style-name="Standard">• Sigo monitoreando unos segundos más para ver si el agente pasa de la fase</text:p>
      <text:p text:style-name="Standard"><text:s text:c="2"/>visual a archivos reales del producto.</text:p>
      <text:p text:style-name="Standard"/>
      <text:p text:style-name="Standard">• Ahora sí está avanzando de verdad.</text:p>
      <text:p text:style-name="Standard"/>
      <text:p text:style-name="Standard"><text:s text:c="2"/>Entre 11:52 y 12:02 del 11 de mayo de 2026 el agente materializó archivos</text:p>
      <text:p text:style-name="Standard"><text:s text:c="2"/>reales en sesion-20260511184524-smoke-suma-01:</text:p>
      <text:p text:style-name="Standard"/>
      <text:p text:style-name="Standard"><text:s text:c="2"/>- frontend/index.html</text:p>
      <text:p text:style-name="Standard"><text:s text:c="2"/>- frontend/app.js</text:p>
      <text:p text:style-name="Standard"><text:s text:c="2"/>- frontend/styles.css</text:p>
      <text:p text:style-name="Standard"><text:s text:c="2"/>- shared/temperature.js</text:p>
      <text:p text:style-name="Standard"><text:s text:c="2"/>- tests/temperature.test.js</text:p>
      <text:p text:style-name="Standard"><text:s text:c="2"/>- tests/smoke_test.py</text:p>
      <text:p text:style-name="Standard"><text:s text:c="2"/>- docs/ejecucion.md</text:p>
      <text:p text:style-name="Standard"><text:s text:c="2"/>- docs/arquitectura.md</text:p>
      <text:p text:style-name="Standard"><text:s text:c="2"/>- README.md</text:p>
      <text:p text:style-name="Standard"/>
      <text:p text:style-name="Standard"><text:s text:c="2"/>También ya avanzó LACE:</text:p>
      <text:p text:style-name="Standard"/>
      <text:p text:style-name="Standard"><text:s text:c="2"/>- LACE_LOG.md siguió actualizándose.</text:p>
      <text:p text:style-name="Standard"><text:s text:c="2"/>- ya existen ciclo-01.md hasta ciclo-08.md.</text:p>
      <text:p text:style-name="Standard"/>
      <text:p text:style-name="Standard"><text:s text:c="2"/>Hay errores repetidos de auth (refresh_token_reused) en el terminal, pero en</text:p>
      <text:p text:style-name="Standard"><text:s text:c="2"/>esta corrida no bloquearon la materialización del producto.</text:p>
      <text:p text:style-name="Standard"/>
      <text:p text:style-name="Standard"><text:s text:c="2"/>Conclusión: la sesión pasó de instrumentación a ejecución real y ahora va por</text:p>
      <text:p text:style-name="Standard"><text:s text:c="2"/>el ciclo 8, no está cerrada todavía. Si quieres, sigo vigilando hasta ver si</text:p>
      <text:p text:style-name="Standard"><text:s text:c="2"/>llega a ciclo 10 o si se cae.</text:p>
      <text:p text:style-name="Standard"/>
      <text:p text:style-name="Standard"/>
      <text:p text:style-name="Standard">› revisa nuevamente y saca un inventario de todo</text:p>
      <text:p text:style-name="Standard"/>
      <text:p text:style-name="Standard"/>
      <text:p text:style-name="Standard">• Voy a releer el proyecto smoke-suma-01 completo desde disco y el log LACE para</text:p>
      <text:p text:style-name="Standard"><text:s text:c="2"/>sacar un inventario actualizado, no una foto parcial.</text:p>
      <text:p text:style-name="Standard"/>
      <text:p text:style-name="Standard">• Ya quedó cerrado en LACE. Voy a sacar la parte que falta para el inventario:</text:p>
      <text:p text:style-name="Standard"><text:s text:c="2"/>qué valida, qué módulos tiene y qué evidencia de pruebas dejó.</text:p>
      <text:p text:style-name="Standard"/>
      <text:p text:style-name="Standard">• Ya tengo el cierre LACE y la evidencia documental. Voy a ejecutar la</text:p>
      <text:p text:style-name="Standard"><text:s text:c="2"/>validación estructural una vez más desde esta shell para que el inventario</text:p>
      <text:p text:style-name="Standard"><text:s text:c="2"/>incluya estado actual, no solo lo que dijo el agente.</text:p>
      <text:p text:style-name="Standard"/>
      <text:p text:style-name="Standard">• Me falta una sola capa para que el inventario quede claro: conteo por área y</text:p>
      <text:p text:style-name="Standard"><text:s text:c="2"/>qué carpetas existen pero siguen vacías.</text:p>
      <text:p text:style-name="Standard"/>
      <text:p text:style-name="Standard">• Estado actual</text:p>
      <text:p text:style-name="Standard"><text:s text:c="2"/>El proyecto sesion-20260511184524-smoke-suma-01 quedó cerrado en LACE el 11 de</text:p>
      <text:p text:style-name="Standard"><text:s text:c="2"/>mayo de 2026. Ahora mismo el inventario real en disco es de 28 archivos.</text:p>
      <text:p text:style-name="Standard"/>
      <text:p text:style-name="Standard"><text:soft-page-break/><text:s text:c="2"/>Producto funcional</text:p>
      <text:p text:style-name="Standard"><text:s text:c="2"/>Archivos de app:</text:p>
      <text:p text:style-name="Standard"/>
      <text:p text:style-name="Standard"><text:s text:c="2"/>- frontend/index.html</text:p>
      <text:p text:style-name="Standard"><text:s text:c="2"/>- frontend/app.js</text:p>
      <text:p text:style-name="Standard"><text:s text:c="2"/>- frontend/styles.css</text:p>
      <text:p text:style-name="Standard"/>
      <text:p text:style-name="Standard"><text:s text:c="2"/>Lógica compartida:</text:p>
      <text:p text:style-name="Standard"/>
      <text:p text:style-name="Standard"><text:s text:c="2"/>- shared/temperature.js</text:p>
      <text:p text:style-name="Standard"><text:s text:c="2"/>- shared/history.js</text:p>
      <text:p text:style-name="Standard"/>
      <text:p text:style-name="Standard"><text:s text:c="2"/>Pruebas:</text:p>
      <text:p text:style-name="Standard"/>
      <text:p text:style-name="Standard"><text:s text:c="2"/>- tests/index.html</text:p>
      <text:p text:style-name="Standard"><text:s text:c="2"/>- tests/temperature.test.js</text:p>
      <text:p text:style-name="Standard"><text:s text:c="2"/>- tests/smoke_test.py</text:p>
      <text:p text:style-name="Standard"><text:s text:c="2"/>- tests/__pycache__/smoke_test.cpython-312.pyc</text:p>
      <text:p text:style-name="Standard"/>
      <text:p text:style-name="Standard"><text:s text:c="2"/>Documentación del producto:</text:p>
      <text:p text:style-name="Standard"/>
      <text:p text:style-name="Standard"><text:s text:c="2"/>- README.md</text:p>
      <text:p text:style-name="Standard"><text:s text:c="2"/>- docs/ejecucion.md</text:p>
      <text:p text:style-name="Standard"><text:s text:c="2"/>- docs/arquitectura.md</text:p>
      <text:p text:style-name="Standard"/>
      <text:p text:style-name="Standard"><text:s text:c="2"/>Qué hace hoy:</text:p>
      <text:p text:style-name="Standard"/>
      <text:p text:style-name="Standard"><text:s text:c="2"/>- conversión Celsius/Fahrenheit en ambos sentidos</text:p>
      <text:p text:style-name="Standard"><text:s text:c="2"/>- validación de vacío, formato y longitud</text:p>
      <text:p text:style-name="Standard"><text:s text:c="2"/>- vista previa en vivo con debounce</text:p>
      <text:p text:style-name="Standard"><text:s text:c="2"/>- historial reciente persistido</text:p>
      <text:p text:style-name="Standard"><text:s text:c="2"/>- botones rápidos de intercambiar y limpiar</text:p>
      <text:p text:style-name="Standard"><text:s text:c="2"/>- fallback en memoria si falla localStorage</text:p>
      <text:p text:style-name="Standard"><text:s text:c="2"/>- CSP básica en la página principal</text:p>
      <text:p text:style-name="Standard"/>
      <text:p text:style-name="Standard"><text:s text:c="2"/>Instrumentación y sesión</text:p>
      <text:p text:style-name="Standard"><text:s text:c="2"/>Archivos de sesión:</text:p>
      <text:p text:style-name="Standard"/>
      <text:p text:style-name="Standard"><text:s text:c="2"/>- LACE.md</text:p>
      <text:p text:style-name="Standard"><text:s text:c="2"/>- LACE_LOG.md</text:p>
      <text:p text:style-name="Standard"><text:s text:c="2"/>- docs/habla-session.md</text:p>
      <text:p text:style-name="Standard"><text:s text:c="2"/>- docs/lace_cycles/ciclo-01.md a ciclo-10.md</text:p>
      <text:p text:style-name="Standard"><text:s text:c="2"/>- .vista/1d7cc52d2156416ebad8388054a76844-terminal.log</text:p>
      <text:p text:style-name="Standard"><text:s text:c="2"/>- .vista/3400c3c20ca74356ae9eaf95afe34565-events.jsonl</text:p>
      <text:p text:style-name="Standard"><text:s text:c="2"/>- .agent-project.json</text:p>
      <text:p text:style-name="Standard"/>
      <text:p text:style-name="Standard"><text:s text:c="2"/>Estado LACE:</text:p>
      <text:p text:style-name="Standard"/>
      <text:p text:style-name="Standard"><text:s text:c="2"/>- 10 ciclos presentes</text:p>
      <text:p text:style-name="Standard"><text:s text:c="2"/>- [CICLO-10 COMPLETADO] presente</text:p>
      <text:p text:style-name="Standard"><text:s text:c="2"/>- [PUERTA DE CIERRE] marcada como aprobada</text:p>
      <text:p text:style-name="Standard"/>
      <text:p text:style-name="Standard"><text:soft-page-break/><text:s text:c="2"/>Carpetas existentes sin archivos reales</text:p>
      <text:p text:style-name="Standard"><text:s text:c="2"/>Estas carpetas existen pero están vacías:</text:p>
      <text:p text:style-name="Standard"/>
      <text:p text:style-name="Standard"><text:s text:c="2"/>- algorithms/</text:p>
      <text:p text:style-name="Standard"><text:s text:c="2"/>- assets/</text:p>
      <text:p text:style-name="Standard"><text:s text:c="2"/>- backend/</text:p>
      <text:p text:style-name="Standard"><text:s text:c="2"/>- src/</text:p>
      <text:p text:style-name="Standard"/>
      <text:p text:style-name="Standard"><text:s text:c="2"/>Conteo por área</text:p>
      <text:p text:style-name="Standard"/>
      <text:p text:style-name="Standard"><text:s text:c="2"/>- frontend: 3 archivos</text:p>
      <text:p text:style-name="Standard"><text:s text:c="2"/>- shared: 2 archivos</text:p>
      <text:p text:style-name="Standard"><text:s text:c="2"/>- tests: 4 archivos</text:p>
      <text:p text:style-name="Standard"><text:s text:c="2"/>- docs: 13 archivos</text:p>
      <text:p text:style-name="Standard"><text:s text:c="2"/>- .vista: 2 archivos</text:p>
      <text:p text:style-name="Standard"/>
      <text:p text:style-name="Standard"><text:s text:c="2"/>Validación actual</text:p>
      <text:p text:style-name="Standard"><text:s text:c="2"/>La reejecuté ahora mismo:</text:p>
      <text:p text:style-name="Standard"/>
      <text:p text:style-name="Standard"><text:s text:c="2"/>- python3 tests/smoke_test.py -&gt; 20/20 checks ok</text:p>
      <text:p text:style-name="Standard"><text:s text:c="2"/>- python3 -m py_compile tests/smoke_test.py -&gt; pasó</text:p>
      <text:p text:style-name="Standard"/>
      <text:p text:style-name="Standard"><text:s text:c="2"/>Límite pendiente:</text:p>
      <text:p text:style-name="Standard"/>
      <text:p text:style-name="Standard"><text:s text:c="2"/>- no validé la UI corriendo en navegador desde esta shell, porque este sandbox</text:p>
      <text:p text:style-name="Standard"><text:s text:c="4"/>no permite abrir servidor local ni tiene runtime JS de consola.</text:p>
      <text:p text:style-name="Standard"/>
      <text:p text:style-name="Standard"><text:s text:c="2"/>Si quieres, el siguiente paso te lo doy como inventario técnico más fino por</text:p>
      <text:p text:style-name="Standard"><text:s text:c="2"/>archivo y responsabilidades.</text:p>
      <text:p text:style-name="Standard"/>
      <text:p text:style-name="Standard"/>
      <text:p text:style-name="Standard">› eso quiere desir que si esta ya funcionando el sistema como queriamos</text:p>
      <text:p text:style-name="Standard"/>
      <text:p text:style-name="Standard"/>
      <text:p text:style-name="Standard">• Sí, para esta prueba del 11 de mayo de 2026, diría que sí funcionó en lo</text:p>
      <text:p text:style-name="Standard"><text:s text:c="2"/>esencial.</text:p>
      <text:p text:style-name="Standard"/>
      <text:p text:style-name="Standard"><text:s text:c="2"/>Se comprobó que el sistema:</text:p>
      <text:p text:style-name="Standard"/>
      <text:p text:style-name="Standard"><text:s text:c="2"/>- recibió un prompt humano normal,</text:p>
      <text:p text:style-name="Standard"><text:s text:c="2"/>- generó docs/habla-session.md,</text:p>
      <text:p text:style-name="Standard"><text:s text:c="2"/>- abrió y mantuvo LACE_LOG.md,</text:p>
      <text:p text:style-name="Standard"><text:s text:c="2"/>- recorrió los 10 ciclos LACE,</text:p>
      <text:p text:style-name="Standard"><text:s text:c="2"/>- creó archivos reales del producto,</text:p>
      <text:p text:style-name="Standard"><text:s text:c="2"/>- sincronizó nodos y archivos en el mapa,</text:p>
      <text:p text:style-name="Standard"><text:s text:c="2"/>- y cerró con validación documental y técnica mínima.</text:p>
      <text:p text:style-name="Standard"/>
      <text:p text:style-name="Standard"><text:s text:c="2"/>Además, el proyecto generado quedó con evidencia real:</text:p>
      <text:p text:style-name="Standard"/>
      <text:p text:style-name="Standard"><text:s text:c="2"/>- app frontend,</text:p>
      <text:p text:style-name="Standard"><text:s text:c="2"/>- lógica compartida,</text:p>
      <text:p text:style-name="Standard"><text:s text:c="2"/>- historial,</text:p>
      <text:p text:style-name="Standard"><text:soft-page-break/><text:s text:c="2"/>- documentación,</text:p>
      <text:p text:style-name="Standard"><text:s text:c="2"/>- smoke_test.py pasando con 20/20 checks ok.</text:p>
      <text:p text:style-name="Standard"/>
      <text:p text:style-name="Standard"><text:s text:c="2"/>Pero no lo llamaría todavía un “100% perfecto como queríamos” por 3 reservas:</text:p>
      <text:p text:style-name="Standard"/>
      <text:p text:style-name="Standard"><text:s text:c="2"/>- en el terminal.log aparecieron errores de autenticación</text:p>
      <text:p text:style-name="Standard"><text:s text:c="4"/>refresh_token_reused,</text:p>
      <text:p text:style-name="Standard"><text:s text:c="2"/>- desde esta shell no pude validar la UI en navegador de punta a punta,</text:p>
      <text:p text:style-name="Standard"><text:s text:c="2"/>- la prueba automática fuerte fue estructural, no una ejecución visual</text:p>
      <text:p text:style-name="Standard"><text:s text:c="4"/>completa desde aquí.</text:p>
      <text:p text:style-name="Standard"/>
      <text:p text:style-name="Standard"><text:s text:c="2"/>La conclusión correcta es: sí, el sistema ya demostró que la arquitectura</text:p>
      <text:p text:style-name="Standard"><text:s text:c="2"/>central funciona y que puede completar una sesión real como queríamos; lo que</text:p>
      <text:p text:style-name="Standard"><text:s text:c="2"/>falta es una validación final manual de UX en navegador y limpiar el tema de</text:p>
      <text:p text:style-name="Standard"><text:s text:c="2"/>auth.</text:p>
      <text:p text:style-name="Standard"/>
      <text:p text:style-name="Standard"><text:s text:c="2"/>Si quieres, te doy ahora un checklist de 2 minutos para confirmar visualmente</text:p>
      <text:p text:style-name="Standard"><text:s text:c="2"/>que quedó completamente bien.</text:p>
      <text:p text:style-name="Standard"/>
      <text:p text:style-name="Standard"/>
      <text:p text:style-name="Standard">› ok segundo test <text:s/>mas fuerte <text:s/>hagamolo que se force <text:s text:c="2"/>pero lo mas critico lo</text:p>
      <text:p text:style-name="Standard"><text:s text:c="2"/>dejamos para el tercer test para que <text:s/>sea algo <text:s text:c="2"/>que <text:s/>le tome mucho trabajo</text:p>
      <text:p text:style-name="Standard"><text:s text:c="2"/>hacer <text:s text:c="3"/>en el tercer test <text:s text:c="3"/>dame el promt para el segundo test</text:p>
      <text:p text:style-name="Standard"/>
      <text:p text:style-name="Standard"/>
      <text:p text:style-name="Standard">• Usa este. Es bastante más fuerte que el primero, pero todavía deja el test más</text:p>
      <text:p text:style-name="Standard"><text:s text:c="2"/>duro para el tercero.</text:p>
      <text:p text:style-name="Standard"/>
      <text:p text:style-name="Standard"><text:s text:c="2"/>Nombre recomendado: stress-gastos-02</text:p>
      <text:p text:style-name="Standard"/>
      <text:p text:style-name="Standard"><text:s text:c="2"/>Crea una mini aplicacion web completa con HTML, CSS y JavaScript para</text:p>
      <text:p text:style-name="Standard"><text:s text:c="2"/>gestionar gastos personales.</text:p>
      <text:p text:style-name="Standard"/>
      <text:p text:style-name="Standard"><text:s text:c="2"/>Objetivo:</text:p>
      <text:p text:style-name="Standard"><text:s text:c="2"/>La app debe permitir registrar movimientos de dinero y consultar un resumen</text:p>
      <text:p text:style-name="Standard"><text:s text:c="2"/>claro por categoria y por estado.</text:p>
      <text:p text:style-name="Standard"/>
      <text:p text:style-name="Standard"><text:s text:c="2"/>Requisitos obligatorios:</text:p>
      <text:p text:style-name="Standard"><text:s text:c="2"/>- usar archivos reales dentro del workspace</text:p>
      <text:p text:style-name="Standard"><text:s text:c="2"/>- no reinicies nada; trabaja desde el estado real actual</text:p>
      <text:p text:style-name="Standard"><text:s text:c="2"/>- registrar toda la sesion en LACE_LOG.md y mostrar el progreso normal</text:p>
      <text:p text:style-name="Standard"><text:s text:c="2"/>- separar la logica en modulos reutilizables</text:p>
      <text:p text:style-name="Standard"><text:s text:c="2"/>- mantener una arquitectura limpia entre UI, logica y persistencia</text:p>
      <text:p text:style-name="Standard"><text:s text:c="2"/>- incluir documentacion de ejecucion y arquitectura</text:p>
      <text:p text:style-name="Standard"><text:s text:c="2"/>- incluir pruebas simples reales</text:p>
      <text:p text:style-name="Standard"/>
      <text:p text:style-name="Standard"><text:s text:c="2"/>Funcionalidad minima:</text:p>
      <text:p text:style-name="Standard"><text:s text:c="2"/>- agregar un gasto con:</text:p>
      <text:p text:style-name="Standard"><text:s text:c="4"/>- descripcion</text:p>
      <text:p text:style-name="Standard"><text:s text:c="4"/>- monto</text:p>
      <text:p text:style-name="Standard"><text:s text:c="4"/>- categoria</text:p>
      <text:p text:style-name="Standard"><text:s text:c="4"/>- fecha</text:p>
      <text:p text:style-name="Standard"><text:soft-page-break/><text:s text:c="2"/>- editar un gasto existente</text:p>
      <text:p text:style-name="Standard"><text:s text:c="2"/>- eliminar un gasto</text:p>
      <text:p text:style-name="Standard"><text:s text:c="2"/>- marcar un gasto como pagado o pendiente</text:p>
      <text:p text:style-name="Standard"><text:s text:c="2"/>- filtrar por:</text:p>
      <text:p text:style-name="Standard"><text:s text:c="4"/>- categoria</text:p>
      <text:p text:style-name="Standard"><text:s text:c="4"/>- estado</text:p>
      <text:p text:style-name="Standard"><text:s text:c="4"/>- texto de busqueda</text:p>
      <text:p text:style-name="Standard"><text:s text:c="2"/>- mostrar resumen visible con:</text:p>
      <text:p text:style-name="Standard"><text:s text:c="4"/>- total general</text:p>
      <text:p text:style-name="Standard"><text:s text:c="4"/>- total pagado</text:p>
      <text:p text:style-name="Standard"><text:s text:c="4"/>- total pendiente</text:p>
      <text:p text:style-name="Standard"><text:s text:c="4"/>- total por categoria</text:p>
      <text:p text:style-name="Standard"><text:s text:c="2"/>- persistir datos en localStorage</text:p>
      <text:p text:style-name="Standard"><text:s text:c="2"/>- validar entradas vacias, montos no numericos, montos negativos y categorias</text:p>
      <text:p text:style-name="Standard"><text:s text:c="2"/>invalidas</text:p>
      <text:p text:style-name="Standard"><text:s text:c="2"/>- mostrar errores claros al usuario</text:p>
      <text:p text:style-name="Standard"/>
      <text:p text:style-name="Standard"><text:s text:c="2"/>Requisitos de experiencia de usuario:</text:p>
      <text:p text:style-name="Standard"><text:s text:c="2"/>- interfaz clara y usable sin explicacion</text:p>
      <text:p text:style-name="Standard"><text:s text:c="2"/>- respuesta en vivo cuando cambian filtros o busqueda</text:p>
      <text:p text:style-name="Standard"><text:s text:c="2"/>- estado vacio bien comunicado</text:p>
      <text:p text:style-name="Standard"><text:s text:c="2"/>- acciones rapidas para limpiar filtros</text:p>
      <text:p text:style-name="Standard"><text:s text:c="2"/>- algun detalle extra de valor real si encaja sin romper simplicidad</text:p>
      <text:p text:style-name="Standard"/>
      <text:p text:style-name="Standard"><text:s text:c="2"/>Pruebas y validacion:</text:p>
      <text:p text:style-name="Standard"><text:s text:c="2"/>- agregar pruebas simples para la logica principal</text:p>
      <text:p text:style-name="Standard"><text:s text:c="2"/>- documentar como correr la app</text:p>
      <text:p text:style-name="Standard"><text:s text:c="2"/>- documentar como validar manualmente los flujos principales</text:p>
      <text:p text:style-name="Standard"><text:s text:c="2"/>- si el entorno no permite correr algo ideal, adapta la estrategia y deja</text:p>
      <text:p text:style-name="Standard"><text:s text:c="2"/>evidencia real de validacion</text:p>
      <text:p text:style-name="Standard"/>
      <text:p text:style-name="Standard"><text:s text:c="2"/>Restricciones:</text:p>
      <text:p text:style-name="Standard"><text:s text:c="2"/>- no lo trates como una respuesta teorica</text:p>
      <text:p text:style-name="Standard"><text:s text:c="2"/>- construyelo de verdad en disco</text:p>
      <text:p text:style-name="Standard"><text:s text:c="2"/>- no cierres la tarea sin completar los 10 ciclos LACE</text:p>
      <text:p text:style-name="Standard"/>
      <text:p text:style-name="Standard"><text:s text:c="2"/>Por qué sirve bien como segundo test:</text:p>
      <text:p text:style-name="Standard"/>
      <text:p text:style-name="Standard"><text:s text:c="2"/>- obliga CRUD real</text:p>
      <text:p text:style-name="Standard"><text:s text:c="2"/>- obliga estado derivado y filtros</text:p>
      <text:p text:style-name="Standard"><text:s text:c="2"/>- obliga persistencia</text:p>
      <text:p text:style-name="Standard"><text:s text:c="2"/>- obliga más módulos y más UI</text:p>
      <text:p text:style-name="Standard"><text:s text:c="2"/>- obliga pruebas y documentación</text:p>
      <text:p text:style-name="Standard"><text:s text:c="2"/>- pero todavía evita backend real, sockets y multi-servicio</text:p>
      <text:p text:style-name="Standard"/>
      <text:p text:style-name="Standard"><text:s text:c="2"/>Si quieres, también te dejo el prompt del tercer test ya diseñado para que sea</text:p>
      <text:p text:style-name="Standard"><text:s text:c="2"/>el “pesado de verdad”.</text:p>
      <text:p text:style-name="Standard"/>
      <text:p text:style-name="Standard"/>
      <text:p text:style-name="Standard">› reinicia el server</text:p>
      <text:p text:style-name="Standard"/>
      <text:p text:style-name="Standard"/>
      <text:p text:style-name="Standard"><text:soft-page-break/>• Voy a reiniciar la instancia del proyecto visual y luego confirmo el estado</text:p>
      <text:p text:style-name="Standard"><text:s text:c="2"/>del launcher.</text:p>
      <text:p text:style-name="Standard"/>
      <text:p text:style-name="Standard">• El frontend ya estaba abajo; ahora confirmo que el backend quedó detenido y</text:p>
      <text:p text:style-name="Standard"><text:s text:c="2"/>levanto de nuevo la instancia.</text:p>
      <text:p text:style-name="Standard"/>
      <text:p text:style-name="Standard">• La compilación del frontend ya salió; estoy esperando la confirmación del</text:p>
      <text:p text:style-name="Standard"><text:s text:c="2"/>backend para cerrar el reinicio.</text:p>
      <text:p text:style-name="Standard"/>
      <text:p text:style-name="Standard">• El backend no levantó. Voy a leer el log para ver si es un puerto ocupado, un</text:p>
      <text:p text:style-name="Standard"><text:s text:c="2"/>error de importación o algo del runtime, y lo arreglo si es local al arranque.</text:p>
      <text:p text:style-name="Standard"/>
      <text:p text:style-name="Standard">• El arranque falló por restricción del sandbox al abrir el socket local</text:p>
      <text:p text:style-name="Standard"><text:s text:c="2"/>(PermissionError: [Errno 1] Operation not permitted). Voy a relanzarlo fuera</text:p>
      <text:p text:style-name="Standard"><text:s text:c="2"/>del sandbox para completar el reinicio.</text:p>
      <text:p text:style-name="Standard"/>
      <text:p text:style-name="Standard">• El relanzamiento ya recompiló el frontend; estoy esperando la confirmación</text:p>
      <text:p text:style-name="Standard"><text:s text:c="2"/>final del backend activo.</text:p>
      <text:p text:style-name="Standard"/>
      <text:p text:style-name="Standard">• Sigue fallando incluso fuera del sandbox. Voy a releer el log inmediato porque</text:p>
      <text:p text:style-name="Standard"><text:s text:c="2"/>ahora ya no parece un problema de permisos del sandbox.</text:p>
      <text:p text:style-name="Standard"/>
      <text:p text:style-name="Standard">• El problema ahora es claro: 5000 ya está ocupado por otro proceso. Voy a</text:p>
      <text:p text:style-name="Standard"><text:s text:c="2"/>identificarlo y dejarte dos salidas: matar ese proceso o levantar limpio en</text:p>
      <text:p text:style-name="Standard"><text:s text:c="2"/>5001.</text:p>
      <text:p text:style-name="Standard"/>
      <text:p text:style-name="Standard">• Voy a inspeccionar el puerto 5000 fuera del sandbox para ver si el proceso que</text:p>
      <text:p text:style-name="Standard"><text:s text:c="2"/>lo ocupa es la instancia vieja y poder reiniciarla bien.</text:p>
      <text:p text:style-name="Standard"/>
      <text:p text:style-name="Standard">• 5000 está tomado. Para no bloquearte más, voy a levantar una instancia limpia</text:p>
      <text:p text:style-name="Standard"><text:s text:c="2"/>en 5001 y te dejo esa URL lista.</text:p>
      <text:p text:style-name="Standard"/>
      <text:p text:style-name="Standard">• La nueva instancia ya recompiló; estoy esperando la confirmación del backend</text:p>
      <text:p text:style-name="Standard"><text:s text:c="2"/>en 5001.</text:p>
      <text:p text:style-name="Standard"/>
      <text:p text:style-name="Standard">• Listo. El server quedó reiniciado en una instancia limpia sobre 5001 porque</text:p>
      <text:p text:style-name="Standard"><text:s text:c="2"/>5000 ya estaba ocupado.</text:p>
      <text:p text:style-name="Standard"/>
      <text:p text:style-name="Standard"><text:s text:c="2"/>Abre:</text:p>
      <text:p text:style-name="Standard"/>
      <text:p text:style-name="Standard"><text:s text:c="2"/>- http://127.0.0.1:5001/</text:p>
      <text:p text:style-name="Standard"><text:s text:c="2"/>- http://127.0.0.1:5001/api/architecture</text:p>
      <text:p text:style-name="Standard"/>
      <text:p text:style-name="Standard"><text:s text:c="2"/>Estado:</text:p>
      <text:p text:style-name="Standard"/>
      <text:p text:style-name="Standard"><text:s text:c="2"/>- backend activo con PID 40882</text:p>
      <text:p text:style-name="Standard"><text:s text:c="2"/>- frontend compilado y servido por backend</text:p>
      <text:p text:style-name="Standard"/>
      <text:p text:style-name="Standard"><text:s text:c="2"/>Si quieres, ahora seguimos con el segundo test sobre esa URL.</text:p>
      <text:p text:style-name="Standard"/>
      <text:p text:style-name="Standard"/>
      <text:p text:style-name="Standard">› no habre</text:p>
      <text:p text:style-name="Standard"><text:soft-page-break/></text:p>
      <text:p text:style-name="Standard"/>
      <text:p text:style-name="Standard">• Voy a comprobar si la instancia en 5001 realmente quedó sirviendo y qué dejó</text:p>
      <text:p text:style-name="Standard"><text:s text:c="2"/>en logs, porque si no abre hay que distinguir entre URL equivocada, backend</text:p>
      <text:p text:style-name="Standard"><text:s text:c="2"/>caído o frontend no servido.</text:p>
      <text:p text:style-name="Standard"/>
      <text:p text:style-name="Standard">• El log sí dice que Flask arrancó en http://127.0.0.1:5001, pero el status del</text:p>
      <text:p text:style-name="Standard"><text:s text:c="2"/>launcher no lo está reconociendo bien. Voy a probar la URL directamente y te</text:p>
      <text:p text:style-name="Standard"><text:s text:c="2"/>digo cuál sirve de verdad.</text:p>
      <text:p text:style-name="Standard"/>
      <text:p text:style-name="Standard">• Encontré el problema: la instancia que sí está viva es una vieja en 5000 con</text:p>
      <text:p text:style-name="Standard"><text:s text:c="2"/>PID 4729; la de 5001 no quedó levantada. Voy a matar esa vieja y dejar una</text:p>
      <text:p text:style-name="Standard"><text:s text:c="2"/>sola instancia limpia arriba para que no sigamos mezclando puertos.</text:p>
      <text:p text:style-name="Standard"/>
      <text:p text:style-name="Standard">• El proceso viejo no se puede matar dentro del sandbox. Lo voy a detener fuera</text:p>
      <text:p text:style-name="Standard"><text:s text:c="2"/>del sandbox y luego levanto una sola instancia limpia.</text:p>
      <text:p text:style-name="Standard"/>
      <text:p text:style-name="Standard">• No pude matar ese proceso viejo con los permisos actuales. Voy a intentar una</text:p>
      <text:p text:style-name="Standard"><text:s text:c="2"/>instancia nueva en otro puerto limpio, sin depender del PID roto del launcher.</text:p>
      <text:p text:style-name="Standard"/>
      <text:p text:style-name="Standard">• La nueva salida compiló bien; ahora confirmo si esta vez sí quedó escuchando</text:p>
      <text:p text:style-name="Standard"><text:s text:c="2"/>en 5001.</text:p>
      <text:p text:style-name="Standard"/>
      <text:p text:style-name="Standard">• Ahora verifico la URL directamente para asegurar que responde antes de</text:p>
      <text:p text:style-name="Standard"><text:s text:c="2"/>devolvértela.</text:p>
      <text:p text:style-name="Standard"/>
      <text:p text:style-name="Standard">• La instancia en 5001 volvió a caerse justo después del arranque. Voy a ver el</text:p>
      <text:p text:style-name="Standard"><text:s text:c="2"/>log final, porque ahí está el motivo real.</text:p>
      <text:p text:style-name="Standard"/>
      <text:p text:style-name="Standard">• No quedó bien reiniciado en 5001.</text:p>
      <text:p text:style-name="Standard"/>
      <text:p text:style-name="Standard"><text:s text:c="2"/>Estado real ahora:</text:p>
      <text:p text:style-name="Standard"/>
      <text:p text:style-name="Standard"><text:s text:c="2"/>- http://127.0.0.1:5001/ no responde.</text:p>
      <text:p text:style-name="Standard"><text:s text:c="2"/>- http://127.0.0.1:5000/ sí responde con 200 y está sirviendo la app.</text:p>
      <text:p text:style-name="Standard"><text:s text:c="2"/>- Hay un proceso viejo de backend vivo en 5000 con PID 4729.</text:p>
      <text:p text:style-name="Standard"><text:s text:c="2"/>- Desde esta shell no pude matarlo por permisos, y las nuevas instancias en</text:p>
      <text:p text:style-name="Standard"><text:s text:c="4"/>5001 arrancan y se caen enseguida.</text:p>
      <text:p text:style-name="Standard"/>
      <text:p text:style-name="Standard"><text:s text:c="2"/>Para seguir ya mismo, usa:</text:p>
      <text:p text:style-name="Standard"/>
      <text:p text:style-name="Standard"><text:s text:c="2"/>- http://127.0.0.1:5000/</text:p>
      <text:p text:style-name="Standard"/>
      <text:p text:style-name="Standard"><text:s text:c="2"/>Si quieres dejarlo limpio de verdad, corre tú esto en tu terminal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PORT=5001 OPEN_BROWSER=0 APP_URL=http://127.0.0.1:5001/</text:p>
      <text:p text:style-name="Standard"><text:s text:c="2"/>BACKEND_URL=http://127.0.0.1:5001/api/architecture bash start.sh start</text:p>
      <text:p text:style-name="Standard"/>
      <text:p text:style-name="Standard"><text:s text:c="2"/>Y luego abre:</text:p>
      <text:p text:style-name="Standard"><text:soft-page-break/></text:p>
      <text:p text:style-name="Standard"><text:s text:c="2"/>- http://127.0.0.1:5001/</text:p>
      <text:p text:style-name="Standard"/>
      <text:p text:style-name="Standard"><text:s text:c="2"/>Si quieres, seguimos de una vez usando 5000 para lanzar el segundo test.</text:p>
      <text:p text:style-name="Standard"/>
      <text:p text:style-name="Standard"/>
      <text:p text:style-name="Standard">› olle ya no pedo iniciar proyecto nuevo <text:s/>quedaron <text:s/>los botones de sabilitados</text:p>
      <text:p text:style-name="Standard"/>
      <text:p text:style-name="Standard"/>
      <text:p text:style-name="Standard">• Voy a revisar cómo la UI decide deshabilitar esos botones y si quedó una</text:p>
      <text:p text:style-name="Standard"><text:s text:c="2"/>sesión fantasma marcada como activa.</text:p>
      <text:p text:style-name="Standard"/>
      <text:p text:style-name="Standard">• Ya localicé el área del problema. Ahora estoy leyendo la parte de AgentStudio</text:p>
      <text:p text:style-name="Standard"><text:s text:c="2"/>donde decide si deja crear/arrancar proyectos para ver por qué se queda</text:p>
      <text:p text:style-name="Standard"><text:s text:c="2"/>“pegado” aunque la sesión real ya no exista.</text:p>
      <text:p text:style-name="Standard"/>
      <text:p text:style-name="Standard">• Voy a confirmar la referencia exacta en código para decirte por qué se</text:p>
      <text:p text:style-name="Standard"><text:s text:c="2"/>deshabilitan y cuál es la salida más corta.</text:p>
      <text:p text:style-name="Standard"/>
      <text:p text:style-name="Standard">• Sí, ya vi la causa. No es que el flujo de “proyecto nuevo” se haya roto: la UI</text:p>
      <text:p text:style-name="Standard"><text:s text:c="2"/>deshabilita esos botones cuando el worker no está conectado. Eso está en</text:p>
      <text:p text:style-name="Standard"><text:s text:c="2"/>AgentStudio.jsx:464 y AgentStudio.jsx:531, donde ambos usan !connected.</text:p>
      <text:p text:style-name="Standard"/>
      <text:p text:style-name="Standard"><text:s text:c="2"/>La instancia que sí está viva ahora mismo es http://127.0.0.1:5000/. Verifiqué</text:p>
      <text:p text:style-name="Standard"><text:s text:c="2"/>además que http://127.0.0.1:5000/api/architecture responde 200. La de 5001 fue</text:p>
      <text:p text:style-name="Standard"><text:s text:c="2"/>la que quedó mal, y por eso si abriste esa pestaña el panel queda en “Worker</text:p>
      <text:p text:style-name="Standard"><text:s text:c="2"/>desconectado” y los botones salen deshabilitados.</text:p>
      <text:p text:style-name="Standard"/>
      <text:p text:style-name="Standard"><text:s text:c="2"/>Haz esto:</text:p>
      <text:p text:style-name="Standard"/>
      <text:p text:style-name="Standard"><text:s text:c="2"/>1. Cierra la pestaña de 5001.</text:p>
      <text:p text:style-name="Standard"><text:s text:c="2"/>2. Abre http://127.0.0.1:5000/.</text:p>
      <text:p text:style-name="Standard"><text:s text:c="2"/>3. Haz recarga fuerte del navegador.</text:p>
      <text:p text:style-name="Standard"><text:s text:c="2"/>4. Confirma que arriba diga Worker conectado.</text:p>
      <text:p text:style-name="Standard"/>
      <text:p text:style-name="Standard"><text:s text:c="2"/>Si quieres dejarlo limpio de verdad para que no vuelva a confundirse el</text:p>
      <text:p text:style-name="Standard"><text:s text:c="2"/>puerto, corre tú esto en tu terminal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Si abres 5000 y todavía ves los botones grises, te guío en 30 segundos para</text:p>
      <text:p text:style-name="Standard"><text:s text:c="2"/>limpiar la sesión del navegador.</text:p>
      <text:p text:style-name="Standard"/>
      <text:p text:style-name="Standard"/>
      <text:p text:style-name="Standard">› por que paso eso <text:s/>osea que siempre me va <text:s/>apasar eso</text:p>
      <text:p text:style-name="Standard"/>
      <text:p text:style-name="Standard"/>
      <text:p text:style-name="Standard">• Voy a revisar el launcher start.sh y el criterio de conexión del panel para</text:p>
      <text:p text:style-name="Standard"><text:s text:c="2"/>darte la causa exacta y si esto es algo estructural o solo un estado sucio de</text:p>
      <text:p text:style-name="Standard"><text:soft-page-break/><text:s text:c="2"/>esta corrida.</text:p>
      <text:p text:style-name="Standard"/>
      <text:p text:style-name="Standard">• No, no debería pasarte siempre.</text:p>
      <text:p text:style-name="Standard"/>
      <text:p text:style-name="Standard"><text:s text:c="2"/>Pasó por una combinación de 2 problemas concretos de esta corrida:</text:p>
      <text:p text:style-name="Standard"/>
      <text:p text:style-name="Standard"><text:s text:c="2"/>1. Quedó un backend viejo vivo en 5000.</text:p>
      <text:p text:style-name="Standard"><text:s text:c="5"/>Ese proceso seguía respondiendo, pero el launcher ya no lo tenía bien</text:p>
      <text:p text:style-name="Standard"><text:s text:c="5"/>controlado por PID.</text:p>
      <text:p text:style-name="Standard"><text:s text:c="2"/>2. Intentamos levantar otra instancia en 5001.</text:p>
      <text:p text:style-name="Standard"><text:s text:c="5"/>Entonces quedó un estado mezclado:</text:p>
      <text:p text:style-name="Standard"/>
      <text:p text:style-name="Standard"><text:s text:c="2"/>- una app vieja viva en 5000</text:p>
      <text:p text:style-name="Standard"><text:s text:c="2"/>- otra intentando arrancar en 5001</text:p>
      <text:p text:style-name="Standard"><text:s text:c="2"/>- tú abriste una URL donde el worker ya no estaba conectado</text:p>
      <text:p text:style-name="Standard"/>
      <text:p text:style-name="Standard"><text:s text:c="2"/>Cuando eso pasa, la UI del panel agente hace esto:</text:p>
      <text:p text:style-name="Standard"/>
      <text:p text:style-name="Standard"><text:s text:c="2"/>- si el socket no está conectado, pone connected = false</text:p>
      <text:p text:style-name="Standard"><text:s text:c="2"/>- y con eso deshabilita botones como “Preparar carpeta nueva” e “Iniciar</text:p>
      <text:p text:style-name="Standard"><text:s text:c="4"/>proyecto nuevo”</text:p>
      <text:p text:style-name="Standard"/>
      <text:p text:style-name="Standard"><text:s text:c="2"/>Eso está explícito en AgentStudio.jsx:464 y AgentStudio.jsx:531: usan</text:p>
      <text:p text:style-name="Standard"><text:s text:c="2"/>disabled={... || !connected}.</text:p>
      <text:p text:style-name="Standard"/>
      <text:p text:style-name="Standard"><text:s text:c="2"/>La causa de fondo del launcher es que start.sh:46 decide si el backend “ya</text:p>
      <text:p text:style-name="Standard"><text:s text:c="2"/>corre” mirando el PID file, no verificando bien si hay otro proceso ocupando</text:p>
      <text:p text:style-name="Standard"><text:s text:c="2"/>el puerto. Si el PID file queda desalineado, aparece este estado sucio.</text:p>
      <text:p text:style-name="Standard"/>
      <text:p text:style-name="Standard"><text:s text:c="2"/>Conclusión:</text:p>
      <text:p text:style-name="Standard"/>
      <text:p text:style-name="Standard"><text:s text:c="2"/>- no es “normal” del sistema</text:p>
      <text:p text:style-name="Standard"><text:s text:c="2"/>- no te va a pasar siempre</text:p>
      <text:p text:style-name="Standard"><text:s text:c="2"/>- te pasó por una mezcla de proceso viejo + puerto cambiado + launcher poco</text:p>
      <text:p text:style-name="Standard"><text:s text:c="4"/>robusto</text:p>
      <text:p text:style-name="Standard"/>
      <text:p text:style-name="Standard"><text:s text:c="2"/>La solución real es endurecer el launcher para que:</text:p>
      <text:p text:style-name="Standard"/>
      <text:p text:style-name="Standard"><text:s text:c="2"/>- detecte procesos viejos aunque el PID file esté mal</text:p>
      <text:p text:style-name="Standard"><text:s text:c="2"/>- detecte puertos ocupados antes de arrancar</text:p>
      <text:p text:style-name="Standard"><text:s text:c="2"/>- no te deje con 5000 y 5001 mezclados</text:p>
      <text:p text:style-name="Standard"><text:s text:c="2"/>- muestre mejor el error en UI</text:p>
      <text:p text:style-name="Standard"/>
      <text:p text:style-name="Standard"><text:s text:c="2"/>Si quieres, lo siguiente que hago es arreglar eso en código para que no vuelva</text:p>
      <text:p text:style-name="Standard"><text:s text:c="2"/>a dejarte los botones deshabilitados por este caso.</text:p>
      <text:p text:style-name="Standard"/>
      <text:p text:style-name="Standard"/>
      <text:p text:style-name="Standard">› delicado eso <text:s/>es mejor crear un boton <text:s text:c="2"/>y disparrar este comando de</text:p>
      <text:p text:style-name="Standard"><text:s text:c="2"/>restablecimiento cuando esto pase <text:s text:c="3"/>crea el boton <text:s text:c="2"/>y que lanc e este</text:p>
      <text:p text:style-name="Standard"><text:s text:c="2"/>comando internamnete en <text:s/>runtime <text:s/>neurodriver@neurodriver-Dell-Pro-16-</text:p>
      <text:p text:style-name="Standard"><text:s text:c="2"/>PC16250:~/BASE _METACOGNICION_COLOMBIA/vista_IA/architecture-react-three-</text:p>
      <text:p text:style-name="Standard"><text:s text:c="2"/>flask-socketio$ <text:s/>Si quieres dejarlo limpio de verdad, corre tú esto en tu</text:p>
      <text:p text:style-name="Standard"><text:soft-page-break/><text:s text:c="2"/>terminal:</text:p>
      <text:p text:style-name="Standard"/>
      <text:p text:style-name="Standard"><text:s text:c="4"/>pkill -f 'architecture-react-three-flask-socketio/backend/app.py'</text:p>
      <text:p text:style-name="Standard"><text:s text:c="4"/>cd "/home/neurodriver/BASE _METACOGNICION_COLOMBIA/vista_IA/architecture-</text:p>
      <text:p text:style-name="Standard"><text:s text:c="4"/>react-three-flask-socketio"</text:p>
      <text:p text:style-name="Standard"><text:s text:c="4"/>PORT=5001 OPEN_BROWSER=0 APP_URL=http://127.0.0.1:5001/</text:p>
      <text:p text:style-name="Standard"><text:s text:c="4"/>BACKEND_URL=http://127.0.0.1:5001/api/architecture bash start.sh start</text:p>
      <text:p text:style-name="Standard"><text:s text:c="2"/>Si: command not found</text:p>
      <text:p text:style-name="Standard"><text:s text:c="2"/>bash: cd: $'/home/neurodriver/BASE _METACOGNICION_COLOMBIA/vista_IA/</text:p>
      <text:p text:style-name="Standard"><text:s text:c="2"/>architecture-\n <text:s/>react-three-flask-socketio': No such file or directory</text:p>
      <text:p text:style-name="Standard"/>
      <text:p text:style-name="Standard"><text:s text:c="2"/>Vista IA Launcher</text:p>
      <text:p text:style-name="Standard"><text:s text:c="2"/>root: /home/neurodriver/BASE _METACOGNICION_COLOMBIA/vista_IA/architecture-</text:p>
      <text:p text:style-name="Standard"><text:s text:c="2"/>react-three-flask-socketio</text:p>
      <text:p text:style-name="Standard"/>
      <text:p text:style-name="Standard"><text:s text:c="2"/>frontend ya estaba detenido</text:p>
      <text:p text:style-name="Standard"><text:s text:c="2"/>frontend compilado en /home/neurodriver/BASE _METACOGNICION_COLOMBIA/</text:p>
      <text:p text:style-name="Standard"><text:s text:c="2"/>vista_IA/architecture-react-three-flask-socketio/frontend/dist</text:p>
      <text:p text:style-name="Standard"><text:s text:c="2"/>backend iniciado con PID 41870</text:p>
      <text:p text:style-name="Standard"><text:s text:c="2"/>abriendo navegador en http://127.0.0.1:5000/</text:p>
      <text:p text:style-name="Standard"/>
      <text:p text:style-name="Standard"><text:s text:c="2"/>sistema listo</text:p>
      <text:p text:style-name="Standard"><text:s text:c="2"/>backend: activo (PID 41870)</text:p>
      <text:p text:style-name="Standard"><text:s text:c="2"/>frontend: compilado y servido por backend</text:p>
      <text:p text:style-name="Standard"/>
      <text:p text:style-name="Standard"><text:s text:c="2"/>urls:</text:p>
      <text:p text:style-name="Standard"><text:s text:c="4"/>- http://127.0.0.1:5000/</text:p>
      <text:p text:style-name="Standard"><text:s text:c="4"/>- http://127.0.0.1:5001/api/architecture</text:p>
      <text:p text:style-name="Standard"/>
      <text:p text:style-name="Standard"><text:s text:c="2"/>logs:</text:p>
      <text:p text:style-name="Standard"><text:s text:c="4"/>- /home/neurodriver/BASE _METACOGNICION_COLOMBIA/vista_IA/architecture-</text:p>
      <text:p text:style-name="Standard"><text:s text:c="2"/>react-three-flask-socketio/.runtime/logs/backend.log</text:p>
      <text:p text:style-name="Standard"><text:s text:c="4"/>- /home/neurodriver/BASE _METACOGNICION_COLOMBIA/vista_IA/architecture-</text:p>
      <text:p text:style-name="Standard"><text:s text:c="2"/>react-three-flask-socketio/.runtime/logs/frontend.log</text:p>
      <text:p text:style-name="Standard"><text:s text:c="2"/>neurodriver@neurodriver-Dell-Pro-16-PC16250:~/BASE _METACOGNICION_COLOMBIA/</text:p>
      <text:p text:style-name="Standard"><text:s text:c="2"/>vista_IA/architecture-react-three-flask-socketio$</text:p>
      <text:p text:style-name="Standard"/>
      <text:p text:style-name="Standard"/>
      <text:p text:style-name="Standard">• Ya identifiqué la causa técnica: los botones quedan amarrados a connected, así</text:p>
      <text:p text:style-name="Standard"><text:s text:c="2"/>que cuando el socket cae no hay salida desde la propia UI. Voy a agregar un</text:p>
      <text:p text:style-name="Standard"><text:s text:c="2"/>botón de “restablecer runtime” que use un endpoint HTTP y reprograme el</text:p>
      <text:p text:style-name="Standard"><text:s text:c="2"/>relanzamiento limpio sin depender del socket.</text:p>
      <text:p text:style-name="Standard"/>
      <text:p text:style-name="Standard">• Voy a tocar primero el backend para que exista una orden segura de</text:p>
      <text:p text:style-name="Standard"><text:s text:c="2"/>“restablecer runtime” que mate el backend viejo y relance una instancia limpia</text:p>
      <text:p text:style-name="Standard"><text:s text:c="2"/>en segundo plano.</text:p>
      <text:p text:style-name="Standard"/>
      <text:p text:style-name="Standard">• Ya está el backend. Ahora agrego el botón visible en la UI del agente para que</text:p>
      <text:p text:style-name="Standard"><text:s text:c="2"/>lance el restablecimiento sin depender de que el socket siga sano.</text:p>
      <text:p text:style-name="Standard"/>
      <text:p text:style-name="Standard">• Ya está cableado. Voy a validar sintaxis backend, tests backend y build del</text:p>
      <text:p text:style-name="Standard"><text:s text:c="2"/>frontend para asegurar que el botón nuevo no dejó nada roto.</text:p>
      <text:p text:style-name="Standard"><text:soft-page-break/></text:p>
      <text:p text:style-name="Standard">• La validación cerró limpia: backend compila, 45 tests pasan y el frontend</text:p>
      <text:p text:style-name="Standard"><text:s text:c="2"/>vuelve a construir. Estoy actualizando el plan y te resumo el comportamiento</text:p>
      <text:p text:style-name="Standard"><text:s text:c="2"/>exacto del nuevo botón.</text:p>
      <text:p text:style-name="Standard"/>
      <text:p text:style-name="Standard">• Quedó hecho.</text:p>
      <text:p text:style-name="Standard"/>
      <text:p text:style-name="Standard"><text:s text:c="2"/>Cambios:</text:p>
      <text:p text:style-name="Standard"/>
      <text:p text:style-name="Standard"><text:s text:c="2"/>- En backend/app.py agregué POST /api/runtime/reset.</text:p>
      <text:p text:style-name="Standard"><text:s text:c="2"/>- En frontend/src/components/AgentStudio.jsx agregué el botón Restablecer</text:p>
      <text:p text:style-name="Standard"><text:s text:c="4"/>runtime.</text:p>
      <text:p text:style-name="Standard"/>
      <text:p text:style-name="Standard"><text:s text:c="2"/>Qué hace el botón:</text:p>
      <text:p text:style-name="Standard"/>
      <text:p text:style-name="Standard"><text:s text:c="2"/>- no depende del socket del worker</text:p>
      <text:p text:style-name="Standard"><text:s text:c="2"/>- llama por HTTP a /api/runtime/reset</text:p>
      <text:p text:style-name="Standard"><text:s text:c="2"/>- programa internamente un reinicio limpio</text:p>
      <text:p text:style-name="Standard"><text:s text:c="2"/>- mata procesos viejos de backend/app.py</text:p>
      <text:p text:style-name="Standard"><text:s text:c="2"/>- limpia PID files</text:p>
      <text:p text:style-name="Standard"><text:s text:c="2"/>- relanza start.sh start en 5001</text:p>
      <text:p text:style-name="Standard"><text:s text:c="2"/>- redirige automáticamente a http://127.0.0.1:5001/</text:p>
      <text:p text:style-name="Standard"/>
      <text:p text:style-name="Standard"><text:s text:c="2"/>Esto ataca justo el caso delicado que viste: UI cargada pero worker/socket en</text:p>
      <text:p text:style-name="Standard"><text:s text:c="2"/>estado roto.</text:p>
      <text:p text:style-name="Standard"/>
      <text:p text:style-name="Standard"><text:s text:c="2"/>Validación:</text:p>
      <text:p text:style-name="Standard"/>
      <text:p text:style-name="Standard"><text:s text:c="2"/>- python3 -m py_compile backend/app.py OK</text:p>
      <text:p text:style-name="Standard"><text:s text:c="2"/>- 45 tests backend OK</text:p>
      <text:p text:style-name="Standard"><text:s text:c="2"/>- npm run build OK</text:p>
      <text:p text:style-name="Standard"/>
      <text:p text:style-name="Standard"><text:s text:c="2"/>Importante:</text:p>
      <text:p text:style-name="Standard"/>
      <text:p text:style-name="Standard"><text:s text:c="2"/>- para que el endpoint nuevo exista en memoria, necesitas un reinicio del</text:p>
      <text:p text:style-name="Standard"><text:s text:c="4"/>backend una sola vez después de este cambio.</text:p>
      <text:p text:style-name="Standard"><text:s text:c="2"/>- después de ese reinicio, el botón ya te queda como mecanismo de rescate para</text:p>
      <text:p text:style-name="Standard"><text:s text:c="4"/>futuras veces.</text:p>
      <text:p text:style-name="Standard"/>
      <text:p text:style-name="Standard"><text:s text:c="2"/>Archivos tocados:</text:p>
      <text:p text:style-name="Standard"/>
      <text:p text:style-name="Standard"><text:s text:c="2"/>- backend/app.py</text:p>
      <text:p text:style-name="Standard"><text:s text:c="2"/>- frontend/src/components/AgentStudio.jsx</text:p>
      <text:p text:style-name="Standard"/>
      <text:p text:style-name="Standard"><text:s text:c="2"/>Si quieres, el siguiente paso lo hago contigo: te digo el reinicio mínimo para</text:p>
      <text:p text:style-name="Standard"><text:s text:c="2"/>cargar este cambio y probamos el botón en vivo.</text:p>
      <text:p text:style-name="Standard"/>
      <text:p text:style-name="Standard"/>
      <text:p text:style-name="Standard">› ya te dije programa el boton se nesecita si o asi <text:s text:c="4"/>pongale el nombre al</text:p>
      <text:p text:style-name="Standard"><text:s text:c="2"/>boton = restablecer seccion</text:p>
      <text:p text:style-name="Standard"/>
      <text:p text:style-name="Standard"/>
      <text:p text:style-name="Standard"><text:soft-page-break/>• Voy a cambiar solo la etiqueta del botón en la UI para que se llame</text:p>
      <text:p text:style-name="Standard"><text:s text:c="2"/>exactamente Restablecer seccion.</text:p>
      <text:p text:style-name="Standard"/>
      <text:p text:style-name="Standard">• Ya quedó con ese nombre en AgentStudio.jsx.</text:p>
      <text:p text:style-name="Standard"/>
      <text:p text:style-name="Standard"><text:s text:c="2"/>Texto del botón:</text:p>
      <text:p text:style-name="Standard"/>
      <text:p text:style-name="Standard"><text:s text:c="2"/>- Restablecer seccion</text:p>
      <text:p text:style-name="Standard"><text:s text:c="2"/>- mientras corre: Restableciendo seccion...</text:p>
      <text:p text:style-name="Standard"/>
      <text:p text:style-name="Standard"><text:s text:c="2"/>Si quieres, también cambio los mensajes internos para que digan seccion en vez</text:p>
      <text:p text:style-name="Standard"><text:s text:c="2"/>de runtime.</text:p>
      <text:p text:style-name="Standard"/>
      <text:p text:style-name="Standard"/>
      <text:p text:style-name="Standard">› ok ya esta cooriendo monitorea por favor</text:p>
      <text:p text:style-name="Standard"/>
      <text:p text:style-name="Standard"/>
      <text:p text:style-name="Standard">• Voy a vigilar el runtime activo, los eventos de sesión y la carpeta workspace/</text:p>
      <text:p text:style-name="Standard"><text:s text:c="2"/>projects para detectar en qué proyecto cayó el nuevo arranque y si está</text:p>
      <text:p text:style-name="Standard"><text:s text:c="2"/>materializando ciclos y archivos reales.</text:p>
      <text:p text:style-name="Standard"/>
      <text:p text:style-name="Standard">• Ya apareció el nuevo proyecto del segundo test: sesion-20260511193613-stress-</text:p>
      <text:p text:style-name="Standard"><text:s text:c="2"/>gastos-02. El backend está vivo y la escena nueva está emitiendo socket.io y</text:p>
      <text:p text:style-name="Standard"><text:s text:c="2"/>lint continuamente; ahora abro su terminal.log, events.jsonl y LACE_LOG para</text:p>
      <text:p text:style-name="Standard"><text:s text:c="2"/>decirte si ya pasó de instrumentación a producto real.</text:p>
      <text:p text:style-name="Standard"/>
      <text:p text:style-name="Standard">• Context compacted</text:p>
      <text:p text:style-name="Standard"/>
      <text:p text:style-name="Standard">• Voy a revisar la sesión activa en disco y los logs del runtime para decirte si</text:p>
      <text:p text:style-name="Standard"><text:s text:c="2"/>realmente está avanzando o si se quedó solo en instrumentación.</text:p>
      <text:p text:style-name="Standard"/>
      <text:p text:style-name="Standard">• El backend sigue vivo y la sesión está generando tráfico constante al mapa.</text:p>
      <text:p text:style-name="Standard"><text:s text:c="2"/>Ahora voy a revisar si ya empezó a escribir producto real o si todavía está</text:p>
      <text:p text:style-name="Standard"><text:s text:c="2"/>solo declarando nodos.</text:p>
      <text:p text:style-name="Standard"/>
      <text:p text:style-name="Standard">• Sigue corriendo, pero todavía no hay archivos reales del producto. Voy a</text:p>
      <text:p text:style-name="Standard"><text:s text:c="2"/>esperar un poco y volver a medir si pasa de plan a escritura efectiva en</text:p>
      <text:p text:style-name="Standard"><text:s text:c="2"/>disco.</text:p>
      <text:p text:style-name="Standard"/>
      <text:p text:style-name="Standard">• La sesión no ha pasado de planeación a escritura. Voy a confirmar con tiempos</text:p>
      <text:p text:style-name="Standard"><text:s text:c="2"/>de modificación para distinguir entre actividad visual normal y bloqueo real</text:p>
      <text:p text:style-name="Standard"><text:s text:c="2"/>del agente.</text:p>
      <text:p text:style-name="Standard"/>
      <text:p text:style-name="Standard">• Estado</text:p>
      <text:p text:style-name="Standard"><text:s text:c="2"/>La sesión activa es sesion-20260511193613-stress-gastos-02. El backend sigue</text:p>
      <text:p text:style-name="Standard"><text:s text:c="2"/>vivo en http://127.0.0.1:5000/ y hubo tráfico normal de socket y lint hasta l</text:p>
      <text:p text:style-name="Standard"><text:s text:c="2"/>as 12:47:16 del 11 de mayo de 2026.</text:p>
      <text:p text:style-name="Standard"/>
      <text:p text:style-name="Standard"><text:s text:c="2"/>Lo crítico</text:p>
      <text:p text:style-name="Standard"><text:s text:c="2"/>No está construyendo producto real todavía. En disco solo existen:</text:p>
      <text:p text:style-name="Standard"/>
      <text:p text:style-name="Standard"><text:s text:c="2"/>- .agent-project.json</text:p>
      <text:p text:style-name="Standard"><text:soft-page-break/><text:s text:c="2"/>- docs/habla-session.md</text:p>
      <text:p text:style-name="Standard"><text:s text:c="2"/>- .vista/2595909424aa478985e6ebf51f2db980-terminal.log</text:p>
      <text:p text:style-name="Standard"><text:s text:c="2"/>- .vista/f33aa45006b8451ebd266dc1eccd423d-events.jsonl</text:p>
      <text:p text:style-name="Standard"/>
      <text:p text:style-name="Standard"><text:s text:c="2"/>El events.jsonl tiene solo 5 eventos y se quedó en 12:45:37 después de</text:p>
      <text:p text:style-name="Standard"><text:s text:c="2"/>declarar visualmente frontend/index.html y src/app/main.js. Desde ahí no hubo</text:p>
      <text:p text:style-name="Standard"><text:s text:c="2"/>más escritura de archivos. El terminal.log siguió actualizándose hasta</text:p>
      <text:p text:style-name="Standard"><text:s text:c="2"/>12:46:23, pero con errores repetidos de auth: refresh_token_reused.</text:p>
      <text:p text:style-name="Standard"/>
      <text:p text:style-name="Standard"><text:s text:c="2"/>Conclusión</text:p>
      <text:p text:style-name="Standard"><text:s text:c="2"/>La plataforma está corriendo, pero esta sesión del agente está atascada en</text:p>
      <text:p text:style-name="Standard"><text:s text:c="2"/>planeación/instrumentación, no en ejecución real. Si en este punto no ves</text:p>
      <text:p text:style-name="Standard"><text:s text:c="2"/>nuevos archivos aparecer en frontend/, src/ o tests/, lo correcto es usar</text:p>
      <text:p text:style-name="Standard"><text:s text:c="2"/>Restablecer seccion; si vuelve a pasar igual, toca reautenticar Codex antes de</text:p>
      <text:p text:style-name="Standard"><text:s text:c="2"/>relanzar.</text:p>
      <text:p text:style-name="Standard"/>
      <text:p text:style-name="Standard"><text:s text:c="2"/>Si quieres, sigo vigilando un minuto más y te digo en seco si revive o si ya</text:p>
      <text:p text:style-name="Standard"><text:s text:c="2"/>la damos por bloqueada.</text:p>
      <text:p text:style-name="Standard"/>
      <text:p text:style-name="Standard"/>
      <text:p text:style-name="Standard">› parece que se bloqueo pero no funciono el reintento algo paso</text:p>
      <text:p text:style-name="Standard"/>
      <text:p text:style-name="Standard"/>
      <text:p text:style-name="Standard">• Voy a revisar si el botón realmente disparó /api/runtime/reset, si el backend</text:p>
      <text:p text:style-name="Standard"><text:s text:c="2"/>cargó ese endpoint y si el reinicio falló en el script o ni siquiera llegó a</text:p>
      <text:p text:style-name="Standard"><text:s text:c="2"/>ejecutarse.</text:p>
      <text:p text:style-name="Standard"/>
      <text:p text:style-name="Standard">• Todavía no veo evidencia de que el backend haya recibido POST /api/runtime/</text:p>
      <text:p text:style-name="Standard"><text:s text:c="2"/>reset. Voy a buscar esa llamada y revisar el código del endpoint para ver si</text:p>
      <text:p text:style-name="Standard"><text:s text:c="2"/>quedó un fallo de implementación.</text:p>
      <text:p text:style-name="Standard"/>
      <text:p text:style-name="Standard">• Voy a comprobar dos cosas concretas: si el dist servido realmente contiene el</text:p>
      <text:p text:style-name="Standard"><text:s text:c="2"/>botón nuevo y si la app cargada en 5000 sigue siendo una compilación vieja.</text:p>
      <text:p text:style-name="Standard"/>
      <text:p text:style-name="Standard">• Encontré una inconsistencia real: el dist servido todavía tiene Restablecer</text:p>
      <text:p text:style-name="Standard"><text:s text:c="2"/>runtime, no Restablecer seccion. Eso indica que la UI activa no estaba</text:p>
      <text:p text:style-name="Standard"><text:s text:c="2"/>sincronizada con el cambio final del texto o no se recompiló después de ese</text:p>
      <text:p text:style-name="Standard"><text:s text:c="2"/>ajuste. Voy a comparar el source actual con lo que quedó compilado.</text:p>
      <text:p text:style-name="Standard"/>
      <text:p text:style-name="Standard">• Ahora voy a comparar los tiempos del backend, del app.py y del build para ver</text:p>
      <text:p text:style-name="Standard"><text:s text:c="2"/>si el proceso vivo siquiera alcanzó a cargar el endpoint nuevo.</text:p>
      <text:p text:style-name="Standard"/>
      <text:p text:style-name="Standard">• Además del build/arranque viejo, necesito confirmar si start.sh de verdad</text:p>
      <text:p text:style-name="Standard"><text:s text:c="2"/>respeta PORT=5001, porque antes ya mostró síntomas de mezclar 5000 y 5001.</text:p>
      <text:p text:style-name="Standard"/>
      <text:p text:style-name="Standard">• Ya confirmé otro fallo de fondo: start.sh no pasa ningún puerto al backend;</text:p>
      <text:p text:style-name="Standard"><text:s text:c="2"/>solo cambia URLs impresas. Voy a revisar el arranque de Flask para ver cómo</text:p>
      <text:p text:style-name="Standard"><text:s text:c="2"/>corregir el puerto real del reinicio.</text:p>
      <text:p text:style-name="Standard"/>
      <text:p text:style-name="Standard">• Voy a revisar si existe runtime-reset.log. Si no existe, el botón nunca llegó</text:p>
      <text:p text:style-name="Standard"><text:s text:c="2"/>a programar el reinicio; si existe, podremos ver en qué paso falló.</text:p>
      <text:p text:style-name="Standard"/>
      <text:p text:style-name="Standard"><text:soft-page-break/>• La causa ya está bastante clara: el backend vivo arrancó a las 12:36, pero</text:p>
      <text:p text:style-name="Standard"><text:s text:c="2"/>backend/app.py con el endpoint nuevo se guardó a las 12:41; además el dist</text:p>
      <text:p text:style-name="Standard"><text:s text:c="2"/>activo se compiló a las 12:41 y todavía no incluía el texto final del botón.</text:p>
      <text:p text:style-name="Standard"><text:s text:c="2"/>Voy a dejar el código consistente y con mejor error para este caso, luego</text:p>
      <text:p text:style-name="Standard"><text:s text:c="2"/>recompilo y reinicio para que el botón quede operativo de verdad.</text:p>
      <text:p text:style-name="Standard"/>
      <text:p text:style-name="Standard">• Voy a ajustar el manejo del botón para que el error sea explícito cuando el</text:p>
      <text:p text:style-name="Standard"><text:s text:c="2"/>backend todavía no cargó el endpoint, y voy a unificar todos los textos a</text:p>
      <text:p text:style-name="Standard"><text:s text:c="2"/>seccion.</text:p>
      <text:p text:style-name="Standard"/>
      <text:p text:style-name="Standard">• Ya dejé corregido el source del botón. Ahora voy a recompilar el frontend y</text:p>
      <text:p text:style-name="Standard"><text:s text:c="2"/>reiniciar el backend para que la instancia viva cargue tanto el texto correcto</text:p>
      <text:p text:style-name="Standard"><text:s text:c="2"/>como el endpoint /api/runtime/reset.</text:p>
      <text:p text:style-name="Standard"/>
      <text:p text:style-name="Standard">• npm no está en el PATH normal de esta shell, así que voy a usar el binario que</text:p>
      <text:p text:style-name="Standard"><text:s text:c="2"/>ya usa el launcher y luego haré el reinicio con start.sh.</text:p>
      <text:p text:style-name="Standard"/>
      <text:p text:style-name="Standard">• El rebuild sí pasó, pero el backend no levantó al reiniciar. Voy a leer el</text:p>
      <text:p text:style-name="Standard"><text:s text:c="2"/>backend.log para corregir el arranque antes de dejarte la app arriba otra vez.</text:p>
      <text:p text:style-name="Standard"/>
      <text:p text:style-name="Standard">• El backend cayó por permisos del sandbox al abrir el puerto. Voy a relanzarlo</text:p>
      <text:p text:style-name="Standard"><text:s text:c="2"/>fuera del sandbox para dejar cargado el endpoint nuevo y la compilación nueva.</text:p>
      <text:p text:style-name="Standard"/>
      <text:p text:style-name="Standard">• El arranque fuera del sandbox también falló. Voy directo al backend.log y al</text:p>
      <text:p text:style-name="Standard"><text:s text:c="2"/>proceso/puerto para ver si ya es un problema de puerto ocupado o de entorno.</text:p>
      <text:p text:style-name="Standard"/>
      <text:p text:style-name="Standard">• Ya encontré el bloqueo real: quedó un backend viejo vivo en 5000 con PID</text:p>
      <text:p text:style-name="Standard"><text:s text:c="2"/>41870, pero fuera del control del PID file. Voy a tumbar solo ese proceso y</text:p>
      <text:p text:style-name="Standard"><text:s text:c="2"/>relanzar limpio.</text:p>
      <text:p text:style-name="Standard"/>
      <text:p text:style-name="Standard">• No pude matar ese proceso viejo desde esta sesión. Voy a levantar una</text:p>
      <text:p text:style-name="Standard"><text:s text:c="2"/>instancia nueva y limpia en 5001 con el código actualizado, para que puedas</text:p>
      <text:p text:style-name="Standard"><text:s text:c="2"/>seguir de inmediato sin depender del proceso atascado en 5000.</text:p>
      <text:p text:style-name="Standard"/>
      <text:p text:style-name="Standard"/>
      <text:p text:style-name="Standard">› \</text:p>
      <text:p text:style-name="Standard"/>
      <text:p text:style-name="Standard"/>
      <text:p text:style-name="Standard"/>
      <text:p text:style-name="Standard">› \</text:p>
      <text:p text:style-name="Standard"/>
      <text:p text:style-name="Standard"/>
      <text:p text:style-name="Standard">• La instancia limpia en 5001 no quedó viva. Voy a hacer una verificación final</text:p>
      <text:p text:style-name="Standard"><text:s text:c="2"/>del log nuevo y del proceso para cerrar el diagnóstico exacto.</text:p>
      <text:p text:style-name="Standard"/>
      <text:p text:style-name="Standard">• Voy a arrancarlo una vez en primer plano sobre 5001 solo para capturar el</text:p>
      <text:p text:style-name="Standard"><text:s text:c="2"/>error real de esa instancia nueva.</text:p>
      <text:p text:style-name="Standard"/>
      <text:p text:style-name="Standard">• La instancia actualizada sí levantó bien en 5001; la dejé corriendo en primer</text:p>
      <text:p text:style-name="Standard"><text:s text:c="2"/>plano. Voy a verificar que responda el API y luego te doy la instrucción</text:p>
      <text:p text:style-name="Standard"><text:s text:c="2"/>exacta para seguir.</text:p>
      <text:p text:style-name="Standard"/>
      <text:p text:style-name="Standard"><text:soft-page-break/>• Sí. Pasaron dos cosas distintas.</text:p>
      <text:p text:style-name="Standard"/>
      <text:p text:style-name="Standard"><text:s text:c="2"/>1. El agente del test fuerte sí se bloqueó por auth.</text:p>
      <text:p text:style-name="Standard"><text:s text:c="5"/>En el terminal.log de la sesión sesion-20260511193613-stress-gastos-02 se</text:p>
      <text:p text:style-name="Standard"><text:s text:c="5"/>repite refresh_token_reused, y por eso se quedó en planeación visual sin</text:p>
      <text:p text:style-name="Standard"><text:s text:c="5"/>escribir producto real.</text:p>
      <text:p text:style-name="Standard"><text:s text:c="2"/>2. El botón de rescate no estaba corriendo sobre la app actualizada.</text:p>
      <text:p text:style-name="Standard"><text:s text:c="5"/>El backend vivo en 5000 arrancó a las 12:36, pero el endpoint nuevo en</text:p>
      <text:p text:style-name="Standard"><text:s text:c="5"/>backend/app.py:2528 se guardó a las 12:41, y el ajuste final del botón en</text:p>
      <text:p text:style-name="Standard"><text:s text:c="5"/>AgentStudio.jsx:25 / AgentStudio.jsx:409 quedó después. O sea: estabas</text:p>
      <text:p text:style-name="Standard"><text:s text:c="5"/>usando un proceso viejo en 5000, no la versión nueva.</text:p>
      <text:p text:style-name="Standard"/>
      <text:p text:style-name="Standard"><text:s text:c="2"/>Lo que ya hice:</text:p>
      <text:p text:style-name="Standard"/>
      <text:p text:style-name="Standard"><text:s text:c="2"/>- corregí el texto y el manejo de error del botón para Restablecer seccion</text:p>
      <text:p text:style-name="Standard"><text:s text:c="2"/>- recompilé el frontend</text:p>
      <text:p text:style-name="Standard"><text:s text:c="2"/>- levanté la versión actualizada en http://127.0.0.1:5001/</text:p>
      <text:p text:style-name="Standard"/>
      <text:p text:style-name="Standard"><text:s text:c="2"/>Usa ahora:</text:p>
      <text:p text:style-name="Standard"/>
      <text:p text:style-name="Standard"><text:s text:c="2"/>- http://127.0.0.1:5001/</text:p>
      <text:p text:style-name="Standard"/>
      <text:p text:style-name="Standard"><text:s text:c="2"/>Importante:</text:p>
      <text:p text:style-name="Standard"/>
      <text:p text:style-name="Standard"><text:s text:c="2"/>- en 5000 sigue vivo un proceso viejo backend/app.py con PID 41870</text:p>
      <text:p text:style-name="Standard"><text:s text:c="2"/>- no lo pude matar desde esta sesión por permisos</text:p>
      <text:p text:style-name="Standard"><text:s text:c="2"/>- por eso 5000 quedó contaminado y 5001 es la instancia limpia con el fix</text:p>
      <text:p text:style-name="Standard"/>
      <text:p text:style-name="Standard"><text:s text:c="2"/>Si quieres dejar todo limpio de verdad desde tu terminal, corre esto y ya</text:p>
      <text:p text:style-name="Standard"><text:s text:c="2"/>quedas bien en una sola URL:</text:p>
      <text:p text:style-name="Standard"/>
      <text:p text:style-name="Standard"><text:s text:c="2"/>kill 41870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Si kill 41870 no basta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Después de eso, el fix del botón ya queda cargado. Si abres 5001 ahora, sigo</text:p>
      <text:p text:style-name="Standard"><text:s text:c="2"/>monitoreando desde ahí.</text:p>
      <text:p text:style-name="Standard"/>
      <text:p text:style-name="Standard"/>
      <text:p text:style-name="Standard">› ok ya lo reinicie <text:s/>elimina todo slos proyectos dejemolo en blanco <text:s text:c="2"/>no puede</text:p>
      <text:p text:style-name="Standard"><text:s text:c="2"/>quesadar nada y trabajamos en limpio este test</text:p>
      <text:p text:style-name="Standard"/>
      <text:p text:style-name="Standard"/>
      <text:p text:style-name="Standard">• Voy a vaciar los proyectos del workspace y revisar si además hay estado</text:p>
      <text:p text:style-name="Standard"><text:soft-page-break/><text:s text:c="2"/>persistido del runtime para que la UI también quede limpia, no solo el disco.</text:p>
      <text:p text:style-name="Standard"/>
      <text:p text:style-name="Standard">• Además de borrar carpetas, voy a limpiar el estado visual persistido que</text:p>
      <text:p text:style-name="Standard"><text:s text:c="2"/>todavía referencia esos proyectos para que el panel realmente arranque en</text:p>
      <text:p text:style-name="Standard"><text:s text:c="2"/>blanco.</text:p>
      <text:p text:style-name="Standard"/>
      <text:p text:style-name="Standard">• Ya confirmé que las sesiones del agente no son persistentes; lo que sí queda</text:p>
      <text:p text:style-name="Standard"><text:s text:c="2"/>pegado es el grafo guardado y el estado de análisis. Voy a limpiar también eso</text:p>
      <text:p text:style-name="Standard"><text:s text:c="2"/>para que no reaparezcan escenas viejas.</text:p>
      <text:p text:style-name="Standard"/>
      <text:p text:style-name="Standard">• No voy a vaciar editor_state.json completo porque eso también borraría el</text:p>
      <text:p text:style-name="Standard"><text:s text:c="2"/>layout del sistema base. Voy a quitar solo las referencias a workspace/</text:p>
      <text:p text:style-name="Standard"><text:s text:c="2"/>projects/* y los análisis persistidos, que es lo que ensucia esta prueba.</text:p>
      <text:p text:style-name="Standard"/>
      <text:p text:style-name="Standard">• Voy a hacer la limpieza en dos capas: borrar las carpetas físicas y podar las</text:p>
      <text:p text:style-name="Standard"><text:s text:c="2"/>entradas workspace/projects/* del estado visual guardado. Luego verifico que</text:p>
      <text:p text:style-name="Standard"><text:s text:c="2"/>el directorio quede vacío.</text:p>
      <text:p text:style-name="Standard"/>
      <text:p text:style-name="Standard">• Existe un endpoint de limpieza visual, pero no lo voy a usar a ciegas porque</text:p>
      <text:p text:style-name="Standard"><text:s text:c="2"/>deja el grafo completo en blanco, no solo el workspace. Prefiero podar solo</text:p>
      <text:p text:style-name="Standard"><text:s text:c="2"/>los proyectos del agente y conservar el resto del sistema intacto.</text:p>
      <text:p text:style-name="Standard"/>
      <text:p text:style-name="Standard">• La limpieza en disco ya quedó hecha. Voy a intentar empujar un rescan al</text:p>
      <text:p text:style-name="Standard"><text:s text:c="2"/>backend local para que la UI también se actualice sin arrastrar escenas viejas</text:p>
      <text:p text:style-name="Standard"><text:s text:c="2"/>al refrescar.</text:p>
      <text:p text:style-name="Standard"/>
      <text:p text:style-name="Standard">• El rescan ya respondió en ambos backends con vista vacía, así que la UI</text:p>
      <text:p text:style-name="Standard"><text:s text:c="2"/>debería abrir completamente limpia. Voy a hacer una verificación final del</text:p>
      <text:p text:style-name="Standard"><text:s text:c="2"/>estado en disco y del estado guardado.</text:p>
      <text:p text:style-name="Standard"/>
      <text:p text:style-name="Standard">• Ya quedó limpio.</text:p>
      <text:p text:style-name="Standard"/>
      <text:p text:style-name="Standard"><text:s text:c="2"/>Eliminé los 6 proyectos de workspace/projects, dejé ese directorio vacío,</text:p>
      <text:p text:style-name="Standard"><text:s text:c="2"/>limpié el estado visual persistido y borré las sesiones de análisis guardadas.</text:p>
      <text:p text:style-name="Standard"><text:s text:c="2"/>El estado final quedó así:</text:p>
      <text:p text:style-name="Standard"/>
      <text:p text:style-name="Standard"><text:s text:c="2"/>- workspace/projects: vacío</text:p>
      <text:p text:style-name="Standard"><text:s text:c="2"/>- editor_state.json: 0 nodos, 0 edges</text:p>
      <text:p text:style-name="Standard"><text:s text:c="2"/>- reverse_engineering_state.json: 0 análisis</text:p>
      <text:p text:style-name="Standard"/>
      <text:p text:style-name="Standard"><text:s text:c="2"/>Además disparé un rescan al backend, así que la UI debería quedar en blanco</text:p>
      <text:p text:style-name="Standard"><text:s text:c="2"/>también. Haz un refresh de la página; si ves algo viejo, haz recarga fuerte</text:p>
      <text:p text:style-name="Standard"><text:s text:c="2"/>una vez.</text:p>
      <text:p text:style-name="Standard"/>
      <text:p text:style-name="Standard"><text:s text:c="2"/>Estamos listos para arrancar este test desde cero. Si quieres, te doy ya el</text:p>
      <text:p text:style-name="Standard"><text:s text:c="2"/>prompt exacto para el nuevo arranque limpio.</text:p>
      <text:p text:style-name="Standard"/>
      <text:p text:style-name="Standard"/>
      <text:p text:style-name="Standard">› ya inicio monitorea en tiempo real</text:p>
      <text:p text:style-name="Standard"/>
      <text:p text:style-name="Standard"/>
      <text:p text:style-name="Standard">• Voy a seguir la sesión nueva desde el workspace y los logs del runtime para</text:p>
      <text:p text:style-name="Standard"><text:soft-page-break/><text:s text:c="2"/>ver si ya pasó de arranque a escritura real en disco.</text:p>
      <text:p text:style-name="Standard"/>
      <text:p text:style-name="Standard">• La sesión nueva ya existe y el backend está activo; ahora voy a mirar el</text:p>
      <text:p text:style-name="Standard"><text:s text:c="2"/>proyecto por dentro para ver si ya materializó archivos o si sigue solo en</text:p>
      <text:p text:style-name="Standard"><text:s text:c="2"/>tráfico visual.</text:p>
      <text:p text:style-name="Standard"/>
      <text:p text:style-name="Standard">• Por ahora solo existe la preapertura del proyecto y el log visual. Voy a leer</text:p>
      <text:p text:style-name="Standard"><text:s text:c="2"/>el terminal del agente y los eventos para ver si ya pasó de plan a creación</text:p>
      <text:p text:style-name="Standard"><text:s text:c="2"/>real.</text:p>
      <text:p text:style-name="Standard"/>
      <text:p text:style-name="Standard">• La sesión sí avanzó un poco más que la anterior: ya declaró nodos para</text:p>
      <text:p text:style-name="Standard"><text:s text:c="2"/>frontend/index.html y src/app.js. Voy a esperar unos segundos y medir si eso</text:p>
      <text:p text:style-name="Standard"><text:s text:c="2"/>se convierte en archivos reales o si vuelve a atascarse en visual puro.</text:p>
      <text:p text:style-name="Standard"/>
      <text:p text:style-name="Standard">• Todavía no escribió nada en disco. El agente sigue hablando de “voy a</text:p>
      <text:p text:style-name="Standard"><text:s text:c="2"/>escribir”, así que le doy una última ventana corta para confirmar si arranca o</text:p>
      <text:p text:style-name="Standard"><text:s text:c="2"/>si quedó otra vez bloqueado por auth.</text:p>
      <text:p text:style-name="Standard"/>
      <text:p text:style-name="Standard">• Estado actual</text:p>
      <text:p text:style-name="Standard"/>
      <text:p text:style-name="Standard"><text:s text:c="2"/>La sesión nueva es sesion-20260511202619-stress-gastos-02. El backend sigue v</text:p>
      <text:p text:style-name="Standard"><text:s text:c="2"/>ivo en http://127.0.0.1:5000/ con PID 52061.</text:p>
      <text:p text:style-name="Standard"/>
      <text:p text:style-name="Standard"><text:s text:c="2"/>Lo que pasó en vivo</text:p>
      <text:p text:style-name="Standard"/>
      <text:p text:style-name="Standard"><text:s text:c="2"/>- A las 13:27:56 del 11 de mayo de 2026 se creó el proyecto y docs/habla-</text:p>
      <text:p text:style-name="Standard"><text:s text:c="4"/>session.md.</text:p>
      <text:p text:style-name="Standard"><text:s text:c="2"/>- A las 13:28:49 el agente declaró en el mapa frontend/index.html y src/app.js</text:p>
      <text:p text:style-name="Standard"><text:s text:c="4"/>desde .vista/0e6d3608ba7e474c9989872c22d80b90-events.jsonl.</text:p>
      <text:p text:style-name="Standard"><text:s text:c="2"/>- El backend.log muestra tráfico constante de socket y lint, o sea la</text:p>
      <text:p text:style-name="Standard"><text:s text:c="4"/>plataforma no se cayó.</text:p>
      <text:p text:style-name="Standard"/>
      <text:p text:style-name="Standard"><text:s text:c="2"/>Problema real</text:p>
      <text:p text:style-name="Standard"/>
      <text:p text:style-name="Standard"><text:s text:c="2"/>- En disco todavía no existen archivos del producto en frontend/, src/,</text:p>
      <text:p text:style-name="Standard"><text:s text:c="4"/>shared/ o tests/.</text:p>
      <text:p text:style-name="Standard"><text:s text:c="2"/>- El events.jsonl sigue en solo 4 eventos.</text:p>
      <text:p text:style-name="Standard"><text:s text:c="2"/>- El terminal.log repite refresh_token_reused varias veces en .vista/</text:p>
      <text:p text:style-name="Standard"><text:s text:c="4"/>cb3465b4c00f421dab434abbc778a21a-terminal.log.</text:p>
      <text:p text:style-name="Standard"><text:s text:c="2"/>- Además arrancó otra vez en smoke mode: “LACE desactivado para esta prueba”,</text:p>
      <text:p text:style-name="Standard"><text:s text:c="4"/>aunque este test debía exigir más.</text:p>
      <text:p text:style-name="Standard"/>
      <text:p text:style-name="Standard"><text:s text:c="2"/>Conclusión</text:p>
      <text:p text:style-name="Standard"><text:s text:c="2"/>Está bloqueado otra vez antes de escribir código real. Esta vez no es caída</text:p>
      <text:p text:style-name="Standard"><text:s text:c="2"/>del servidor; es el agente quedándose en planeación visual con problema de</text:p>
      <text:p text:style-name="Standard"><text:s text:c="2"/>auth.</text:p>
      <text:p text:style-name="Standard"/>
      <text:p text:style-name="Standard"><text:s text:c="2"/>Lo correcto ahora es:</text:p>
      <text:p text:style-name="Standard"/>
      <text:p text:style-name="Standard"><text:s text:c="2"/>1. detener esta sesión,</text:p>
      <text:p text:style-name="Standard"><text:s text:c="2"/>2. reautenticar Codex,</text:p>
      <text:p text:style-name="Standard"><text:s text:c="2"/>3. relanzar el test.</text:p>
      <text:p text:style-name="Standard"><text:soft-page-break/></text:p>
      <text:p text:style-name="Standard"><text:s text:c="2"/>Si quieres, te doy el paso exacto para relanzarlo limpio sin perder este</text:p>
      <text:p text:style-name="Standard"><text:s text:c="2"/>diagnóstico.</text:p>
      <text:p text:style-name="Standard"/>
      <text:p text:style-name="Standard"/>
      <text:p text:style-name="Standard">› como reautentico codex</text:p>
      <text:p text:style-name="Standard"/>
      <text:p text:style-name="Standard"/>
      <text:p text:style-name="Standard">• Voy a revisar el CLI local de codex para darte el comando exacto de</text:p>
      <text:p text:style-name="Standard"><text:s text:c="2"/>reautenticación que corresponde a esta instalación.</text:p>
      <text:p text:style-name="Standard"/>
      <text:p text:style-name="Standard">• Ya confirmé que esta instalación usa codex login y codex logout. Voy a mirar</text:p>
      <text:p text:style-name="Standard"><text:s text:c="2"/>sus flags para darte la secuencia exacta, sin adivinar.</text:p>
      <text:p text:style-name="Standard"/>
      <text:p text:style-name="Standard">• Con esta instalación de codex, reautenticas así:</text:p>
      <text:p text:style-name="Standard"/>
      <text:p text:style-name="Standard"><text:s text:c="2"/>codex logout</text:p>
      <text:p text:style-name="Standard"><text:s text:c="2"/>codex login</text:p>
      <text:p text:style-name="Standard"><text:s text:c="2"/>codex login status</text:p>
      <text:p text:style-name="Standard"/>
      <text:p text:style-name="Standard"><text:s text:c="2"/>Eso es lo correcto para el error refresh_token_reused.</text:p>
      <text:p text:style-name="Standard"/>
      <text:p text:style-name="Standard"><text:s text:c="2"/>Si el login normal no abre bien el navegador, usa el flujo por dispositivo:</text:p>
      <text:p text:style-name="Standard"/>
      <text:p text:style-name="Standard"><text:s text:c="2"/>codex logout</text:p>
      <text:p text:style-name="Standard"><text:s text:c="2"/>codex login --device-auth</text:p>
      <text:p text:style-name="Standard"><text:s text:c="2"/>codex login status</text:p>
      <text:p text:style-name="Standard"/>
      <text:p text:style-name="Standard"><text:s text:c="2"/>Si tú lo manejas con API key, usa esto:</text:p>
      <text:p text:style-name="Standard"/>
      <text:p text:style-name="Standard"><text:s text:c="2"/>codex logout</text:p>
      <text:p text:style-name="Standard"><text:s text:c="2"/>printenv OPENAI_API_KEY | codex login --with-api-key</text:p>
      <text:p text:style-name="Standard"><text:s text:c="2"/>codex login status</text:p>
      <text:p text:style-name="Standard"/>
      <text:p text:style-name="Standard"><text:s text:c="2"/>Cuando codex login status ya salga bien, vuelve a lanzar el test. Si quieres,</text:p>
      <text:p text:style-name="Standard"><text:s text:c="2"/>apenas lo hagas yo retomo el monitoreo en vivo.</text:p>
      <text:p text:style-name="Standard"/>
      <text:p text:style-name="Standard"/>
      <text:p text:style-name="Standard">› creo que es por la version por que yo me estoy autenticando <text:s/>por terminal</text:p>
      <text:p text:style-name="Standard"><text:s text:c="2"/>sin problemas <text:s/>creo que toca reprogramar de nuevo la nueva version de codex</text:p>
      <text:p text:style-name="Standard"><text:s text:c="2"/>neurodriver@neurodriver-Dell-Pro-16-PC16250:~$ npm i -g @openai/codex</text:p>
      <text:p text:style-name="Standard"/>
      <text:p text:style-name="Standard"><text:s text:c="2"/>added 2 packages in 8s</text:p>
      <text:p text:style-name="Standard"><text:s text:c="2"/>neurodriver@neurodriver-Dell-Pro-16-PC16250:~$ codex</text:p>
      <text:p text:style-name="Standard"/>
      <text:p text:style-name="Standard"><text:s text:c="2"/>⚠ Codex's Linux sandbox uses bubblewrap and needs access to create user</text:p>
      <text:p text:style-name="Standard"><text:s text:c="4"/>namespaces.</text:p>
      <text:p text:style-name="Standard"/>
      <text:p text:style-name="Standard"><text:s text:c="2"/>╭──────────────────────────────────────────────╮</text:p>
      <text:p text:style-name="Standard"><text:s text:c="2"/>│ &gt;_ OpenAI Codex (v0.130.0) <text:s text:c="18"/>│</text:p>
      <text:p text:style-name="Standard"><text:s text:c="2"/>│ <text:s text:c="45"/>│</text:p>
      <text:p text:style-name="Standard"><text:s text:c="2"/>│ model: <text:s text:c="4"/>gpt-5.5 medium <text:s text:c="2"/>/model to change │</text:p>
      <text:p text:style-name="Standard"><text:soft-page-break/><text:s text:c="2"/>│ directory: ~ <text:s text:c="32"/>│</text:p>
      <text:p text:style-name="Standard"><text:s text:c="2"/>╰──────────────────────────────────────────────╯</text:p>
      <text:p text:style-name="Standard"/>
      <text:p text:style-name="Standard"><text:s text:c="4"/>Tip: GPT-5.5 is now available in Codex. It's our strongest agentic coding</text:p>
      <text:p text:style-name="Standard"><text:s text:c="4"/>model yet, built to reason through large codebases, check assumptions with</text:p>
      <text:p text:style-name="Standard"><text:s text:c="4"/>tools, and keep going until the work is done.</text:p>
      <text:p text:style-name="Standard"/>
      <text:p text:style-name="Standard"><text:s text:c="4"/>Learn more: https://openai.com/index/introducing-gpt-5-5/</text:p>
      <text:p text:style-name="Standard"/>
      <text:p text:style-name="Standard"><text:s text:c="2"/>• Model changed to gpt-5.5 xhigh</text:p>
      <text:p text:style-name="Standard"/>
      <text:p text:style-name="Standard"/>
      <text:p text:style-name="Standard"><text:s text:c="2"/>› Find and fix a bug in @filename</text:p>
      <text:p text:style-name="Standard"/>
      <text:p text:style-name="Standard"><text:s text:c="4"/>gpt-5.5 xhigh · ~</text:p>
      <text:p text:style-name="Standard"/>
      <text:p text:style-name="Standard"/>
      <text:p text:style-name="Standard">• Voy a revisar cómo el runtime elige el binario codex, porque ahora mismo el</text:p>
      <text:p text:style-name="Standard"><text:s text:c="2"/>síntoma apunta a que el sistema está lanzando una versión vieja distinta de la</text:p>
      <text:p text:style-name="Standard"><text:s text:c="2"/>que tú acabas de instalar por npm.</text:p>
      <text:p text:style-name="Standard"/>
      <text:p text:style-name="Standard">• Ya encontré la raíz: el backend está resolviendo codex como /snap/codex/34/</text:p>
      <text:p text:style-name="Standard"><text:s text:c="2"/>bin/codex, que aquí es 0.114.0, no la 0.130.0 que tú acabas de instalar. Voy a</text:p>
      <text:p text:style-name="Standard"><text:s text:c="2"/>localizar el binario nuevo y luego dejo el runtime programado para preferir la</text:p>
      <text:p text:style-name="Standard"><text:s text:c="2"/>versión moderna.</text:p>
      <text:p text:style-name="Standard"/>
      <text:p text:style-name="Standard">• No apareció un segundo binario simple por find, así que voy a revisar el PATH</text:p>
      <text:p text:style-name="Standard"><text:s text:c="2"/>y la resolución del comando tal como la ve el backend. Ahí seguramente está la</text:p>
      <text:p text:style-name="Standard"><text:s text:c="2"/>diferencia entre tu terminal interactiva y este proceso del servidor.</text:p>
      <text:p text:style-name="Standard"/>
      <text:p text:style-name="Standard">• El proceso del servidor arranca dentro del entorno snap, y ese PATH pone</text:p>
      <text:p text:style-name="Standard"><text:s text:c="2"/>primero la versión vieja. Voy a localizar dónde quedó la instalación nueva de</text:p>
      <text:p text:style-name="Standard"><text:s text:c="2"/>@openai/codex para fijarla explícitamente.</text:p>
      <text:p text:style-name="Standard"/>
      <text:p text:style-name="Standard">• No salió una ruta clara en ese barrido, así que voy a revisar las ubicaciones</text:p>
      <text:p text:style-name="Standard"><text:s text:c="2"/>típicas de global bin de Node en este usuario para detectar dónde quedó el</text:p>
      <text:p text:style-name="Standard"><text:s text:c="2"/>codex nuevo.</text:p>
      <text:p text:style-name="Standard"/>
      <text:p text:style-name="Standard">• Voy a consultar un bash -lc real del usuario para ver qué codex resuelve fuera</text:p>
      <text:p text:style-name="Standard"><text:s text:c="2"/>del PATH contaminado por snap. Si ahí aparece la 0.130.0, ya sé exactamente</text:p>
      <text:p text:style-name="Standard"><text:s text:c="2"/>qué programar.</text:p>
      <text:p text:style-name="Standard"/>
      <text:p text:style-name="Standard">• En este proceso, incluso bash -lc sigue heredando el PATH del snap, así que no</text:p>
      <text:p text:style-name="Standard"><text:s text:c="2"/>basta con “usar login shell”. Voy a leer tu configuración de shell para</text:p>
      <text:p text:style-name="Standard"><text:s text:c="2"/>reconstruir el PATH normal de usuario y resolver el codex correcto desde ahí.</text:p>
      <text:p text:style-name="Standard"/>
      <text:p text:style-name="Standard">• Necesito leer el entorno real del usuario fuera del sandbox para saber qué</text:p>
      <text:p text:style-name="Standard"><text:s text:c="2"/>codex nuevo estás usando en tu terminal normal. Con eso lo dejo fijo en el</text:p>
      <text:p text:style-name="Standard"><text:s text:c="2"/>runtime, no por suposición.</text:p>
      <text:p text:style-name="Standard"/>
      <text:p text:style-name="Standard">• Voy a entrar al punto donde el agente arma y lanza el comando, para dejarlo</text:p>
      <text:p text:style-name="Standard"><text:s text:c="2"/>compatible con un codex externo al snap y no solo con el que viene embebido.</text:p>
      <text:p text:style-name="Standard"><text:soft-page-break/></text:p>
      <text:p text:style-name="Standard">• Ya ubiqué el punto de lanzamiento. Ahora voy a meter resolución explícita del</text:p>
      <text:p text:style-name="Standard"><text:s text:c="2"/>binario y un PATH saneado para que el worker no herede a ciegas el codex viejo</text:p>
      <text:p text:style-name="Standard"><text:s text:c="2"/>del snap.</text:p>
      <text:p text:style-name="Standard"/>
      <text:p text:style-name="Standard">• Antes de editar, voy a mirar la prueba del runtime para mantenerla alineada</text:p>
      <text:p text:style-name="Standard"><text:s text:c="2"/>con el nuevo comportamiento de resolución de codex.</text:p>
      <text:p text:style-name="Standard"/>
      <text:p text:style-name="Standard">• Voy a programar dos mejoras concretas: soportar resolución robusta del binario</text:p>
      <text:p text:style-name="Standard"><text:s text:c="2"/>codex y soportar CODEX_CMD como comando compuesto si hace falta. Luego corro</text:p>
      <text:p text:style-name="Standard"><text:s text:c="2"/>los tests del backend.</text:p>
      <text:p text:style-name="Standard"/>
      <text:p text:style-name="Standard">• Voy a editar agent_runtime.py para que resuelva y lance codex con prioridad</text:p>
      <text:p text:style-name="Standard"><text:s text:c="2"/>fuera del snap, sin romper la compatibilidad con CODEX_CMD actual.</text:p>
      <text:p text:style-name="Standard"/>
      <text:p text:style-name="Standard">• Ahora ajusto la inicialización del runtime y el entorno de lanzamiento para</text:p>
      <text:p text:style-name="Standard"><text:s text:c="2"/>que use esa resolución nueva y no herede el PATH viejo del snap.</text:p>
      <text:p text:style-name="Standard"/>
      <text:p text:style-name="Standard">• Voy a dejar dos pruebas unitarias: una para preferir un codex no-snap y otra</text:p>
      <text:p text:style-name="Standard"><text:s text:c="2"/>para aceptar CODEX_CMD compuesto.</text:p>
      <text:p text:style-name="Standard"/>
      <text:p text:style-name="Standard">• Ya están hechas las ediciones. Ahora corro pruebas del backend enfocadas en</text:p>
      <text:p text:style-name="Standard"><text:s text:c="2"/>agent_runtime y una compilación rápida para asegurar que no metí regresiones.</text:p>
      <text:p text:style-name="Standard"/>
      <text:p text:style-name="Standard">• Encontré un detalle del entorno snap: Path.home() está resolviendo un home</text:p>
      <text:p text:style-name="Standard"><text:s text:c="2"/>encapsulado, no el home real del usuario. Lo corrijo para usar el home del</text:p>
      <text:p text:style-name="Standard"><text:s text:c="2"/>sistema y repito las pruebas.</text:p>
      <text:p text:style-name="Standard"/>
      <text:p text:style-name="Standard">• El fix ya está puesto. Vuelvo a correr compilación y la suite del backend para</text:p>
      <text:p text:style-name="Standard"><text:s text:c="2"/>confirmar que la resolución nueva quedó estable.</text:p>
      <text:p text:style-name="Standard"/>
      <text:p text:style-name="Standard">• La corrección ya detecta tu instalación nueva en /home/neurodriver/.npm-</text:p>
      <text:p text:style-name="Standard"><text:s text:c="2"/>global/bin/codex. Voy a recargar el backend para que el worker empiece a usar</text:p>
      <text:p text:style-name="Standard"><text:s text:c="2"/>esa ruta y no el snap viejo.</text:p>
      <text:p text:style-name="Standard"/>
      <text:p text:style-name="Standard">• El código ya está bien y los tests pasaron, pero el restart falló. Voy a leer</text:p>
      <text:p text:style-name="Standard"><text:s text:c="2"/>el backend.log para cerrar si fue por puerto, permisos o algo puntual del</text:p>
      <text:p text:style-name="Standard"><text:s text:c="2"/>relanzamiento.</text:p>
      <text:p text:style-name="Standard"/>
      <text:p text:style-name="Standard">• Sí, era eso: el worker del sistema estaba lanzando el codex viejo del snap</text:p>
      <text:p text:style-name="Standard"><text:s text:c="2"/>(0.114.0), no el nuevo que tú instalaste.</text:p>
      <text:p text:style-name="Standard"/>
      <text:p text:style-name="Standard"><text:s text:c="2"/>Ya lo dejé corregido en agent_runtime.py para que:</text:p>
      <text:p text:style-name="Standard"/>
      <text:p text:style-name="Standard"><text:s text:c="2"/>- limpie el PATH contaminado por snap</text:p>
      <text:p text:style-name="Standard"><text:s text:c="2"/>- prefiera un codex externo al snap</text:p>
      <text:p text:style-name="Standard"><text:s text:c="2"/>- soporte CODEX_CMD compuesto si algún día quieres forzarlo</text:p>
      <text:p text:style-name="Standard"><text:s text:c="2"/>- resuelva ahora mismo a ['/home/neurodriver/.npm-global/bin/codex']</text:p>
      <text:p text:style-name="Standard"/>
      <text:p text:style-name="Standard"><text:s text:c="2"/>También agregué pruebas en test_agent_runtime_habla.py, y la suite quedó en 48</text:p>
      <text:p text:style-name="Standard"><text:s text:c="2"/>tests OK.</text:p>
      <text:p text:style-name="Standard"/>
      <text:p text:style-name="Standard"><text:soft-page-break/><text:s text:c="2"/>Lo único pendiente es que el backend vivo en 5000 sigue siendo un proceso</text:p>
      <text:p text:style-name="Standard"><text:s text:c="2"/>viejo, fuera del PID file. Para activar el fix, haz un reinicio limpio así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Si quieres dejarlo explícito al 100%, usa este arranque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CODEX_CMD=/home/neurodriver/.npm-global/bin/codex bash start.sh start</text:p>
      <text:p text:style-name="Standard"/>
      <text:p text:style-name="Standard"><text:s text:c="2"/>Después de eso, el siguiente test ya debería salir con la versión nueva de</text:p>
      <text:p text:style-name="Standard"><text:s text:c="2"/>Codex. Si lo reinicias, yo te monitoreo la próxima sesión en vivo.</text:p>
      <text:p text:style-name="Standard"/>
      <text:p text:style-name="Standard"/>
      <text:p text:style-name="Standard">› ok pero borra todos los proyesctos y evidencia arranquemos desde cero</text:p>
      <text:p text:style-name="Standard"/>
      <text:p text:style-name="Standard"/>
      <text:p text:style-name="Standard">• Voy a dejar el sistema en blanco de verdad: borraré los proyectos del</text:p>
      <text:p text:style-name="Standard"><text:s text:c="2"/>workspace, limpiaré el estado visual persistido y reiniciaré el backend para</text:p>
      <text:p text:style-name="Standard"><text:s text:c="2"/>vaciar también las sesiones en memoria.</text:p>
      <text:p text:style-name="Standard"/>
      <text:p text:style-name="Standard">• Voy a borrar la carpeta de sesión restante, dejar los estados persistidos en</text:p>
      <text:p text:style-name="Standard"><text:s text:c="2"/>blanco y truncar los logs de runtime. Luego reinicio el backend para limpiar</text:p>
      <text:p text:style-name="Standard"><text:s text:c="2"/>también la memoria en vivo.</text:p>
      <text:p text:style-name="Standard"/>
      <text:p text:style-name="Standard">• La limpieza en disco ya quedó hecha. Ahora reinicio el backend para que</text:p>
      <text:p text:style-name="Standard"><text:s text:c="2"/>también arranque sin sesiones vivas ni estado en memoria.</text:p>
      <text:p text:style-name="Standard"/>
      <text:p text:style-name="Standard">• El reinicio se cayó al volver a levantar. Voy a leer el log y confirmar si</text:p>
      <text:p text:style-name="Standard"><text:s text:c="2"/>quedó un proceso viejo ocupando el puerto antes de cerrar la limpieza.</text:p>
      <text:p text:style-name="Standard"/>
      <text:p text:style-name="Standard">• Quedó un backend viejo vivo por fuera del PID file con PID 59287, y eso</text:p>
      <text:p text:style-name="Standard"><text:s text:c="2"/>bloqueó el arranque limpio. Lo voy a tumbar y levantar otra vez para cerrar el</text:p>
      <text:p text:style-name="Standard"><text:s text:c="2"/>reseteo de verdad.</text:p>
      <text:p text:style-name="Standard"/>
      <text:p text:style-name="Standard">• No pude matar ese proceso desde esta sesión: sigue vivo fuera del control</text:p>
      <text:p text:style-name="Standard"><text:s text:c="2"/>normal del launcher. Voy a comprobar si al menos quedó la UI y el grafo</text:p>
      <text:p text:style-name="Standard"><text:s text:c="2"/>vacíos; si solo queda basura en memoria, te diré el comando único para cerrar</text:p>
      <text:p text:style-name="Standard"><text:s text:c="2"/>eso desde tu terminal.</text:p>
      <text:p text:style-name="Standard"/>
      <text:p text:style-name="Standard">• Ya quedó en cero.</text:p>
      <text:p text:style-name="Standard"/>
      <text:p text:style-name="Standard"><text:s text:c="2"/>Estado real ahora:</text:p>
      <text:p text:style-name="Standard"/>
      <text:p text:style-name="Standard"><text:s text:c="2"/>- workspace/projects: vacío</text:p>
      <text:p text:style-name="Standard"><text:s text:c="2"/>- editor_state.json: 0 nodos, 0 edges</text:p>
      <text:p text:style-name="Standard"><text:s text:c="2"/>- reverse_engineering_state.json: 0 análisis</text:p>
      <text:p text:style-name="Standard"><text:soft-page-break/><text:s text:c="2"/>- GET /api/architecture: vista vacía</text:p>
      <text:p text:style-name="Standard"><text:s text:c="2"/>- GET /api/agent/sessions: []</text:p>
      <text:p text:style-name="Standard"/>
      <text:p text:style-name="Standard"><text:s text:c="2"/>O sea: no quedaron proyectos, no quedó evidencia de sesiones, y el frontend/</text:p>
      <text:p text:style-name="Standard"><text:s text:c="2"/>backend ya están mostrando estado en blanco.</text:p>
      <text:p text:style-name="Standard"/>
      <text:p text:style-name="Standard"><text:s text:c="2"/>Lo único raro es que el proceso viejo de backend no se dejó matar desde esta</text:p>
      <text:p text:style-name="Standard"><text:s text:c="2"/>sesión, pero ya está sirviendo el estado limpio, así que para el test práctico</text:p>
      <text:p text:style-name="Standard"><text:s text:c="2"/>ya estamos listos. Haz un refresh de la página y debes verla vacía.</text:p>
      <text:p text:style-name="Standard"/>
      <text:p text:style-name="Standard"><text:s text:c="2"/>Si quieres dejar hasta el proceso totalmente renovado también, corre tú esto</text:p>
      <text:p text:style-name="Standard"><text:s text:c="2"/>una vez en tu terminal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Si no, podemos arrancar ya mismo el siguiente test sobre el estado actual, que</text:p>
      <text:p text:style-name="Standard"><text:s text:c="2"/>ya está limpio.</text:p>
      <text:p text:style-name="Standard"/>
      <text:p text:style-name="Standard"/>
      <text:p text:style-name="Standard">› ya inicio monittorea en vivo</text:p>
      <text:p text:style-name="Standard"/>
      <text:p text:style-name="Standard"/>
      <text:p text:style-name="Standard">• Voy a seguir la sesión nueva desde el workspace, el terminal.log y el</text:p>
      <text:p text:style-name="Standard"><text:s text:c="2"/>events.jsonl para distinguir rápido si está escribiendo producto real o si</text:p>
      <text:p text:style-name="Standard"><text:s text:c="2"/>vuelve a quedarse en instrumentación.</text:p>
      <text:p text:style-name="Standard"/>
      <text:p text:style-name="Standard">• El backend está bien y el mapa recibe tráfico constante para sesion-</text:p>
      <text:p text:style-name="Standard"><text:s text:c="2"/>20260511212612-stress-gastos-02. Ahora miro si ya se materializó producto real</text:p>
      <text:p text:style-name="Standard"><text:s text:c="2"/>o si sigue solo en nodos/lint.</text:p>
      <text:p text:style-name="Standard"/>
      <text:p text:style-name="Standard">• Ya cambió el diagnóstico: esta vez no se frenó por auth, sino porque el codex</text:p>
      <text:p text:style-name="Standard"><text:s text:c="2"/>nuevo intenta usar bubblewrap y el entorno no le deja crear namespaces. El</text:p>
      <text:p text:style-name="Standard"><text:s text:c="2"/>propio agente dijo que iba a seguir con apply_patch, así que le doy una</text:p>
      <text:p text:style-name="Standard"><text:s text:c="2"/>ventana corta para ver si empieza a escribir archivos reales pese a eso.</text:p>
      <text:p text:style-name="Standard"/>
      <text:p text:style-name="Standard">• Sigue sin escribir nada en disco. El agente cambió de explicación, pero</text:p>
      <text:p text:style-name="Standard"><text:s text:c="2"/>todavía no materializó ni un solo archivo del producto; le doy una última</text:p>
      <text:p text:style-name="Standard"><text:s text:c="2"/>ventana corta para confirmar si el apply_patch realmente arranca o si esta</text:p>
      <text:p text:style-name="Standard"><text:s text:c="2"/>corrida ya quedó atascada.</text:p>
      <text:p text:style-name="Standard"/>
      <text:p text:style-name="Standard">• Está bloqueado otra vez, pero por una causa distinta.</text:p>
      <text:p text:style-name="Standard"/>
      <text:p text:style-name="Standard"><text:s text:c="2"/>Estado en vivo de sesion-20260511212612-stress-gastos-02:</text:p>
      <text:p text:style-name="Standard"/>
      <text:p text:style-name="Standard"><text:s text:c="2"/>- el backend sigue vivo en 5000 con PID 60013</text:p>
      <text:p text:style-name="Standard"><text:s text:c="2"/>- el proyecto solo tiene .agent-project.json, docs/habla-session.md y los logs</text:p>
      <text:p text:style-name="Standard"><text:s text:c="4"/>de .vista</text:p>
      <text:p text:style-name="Standard"><text:s text:c="2"/>- no existe todavía ningún archivo real en frontend/, src/, shared/ o tests/</text:p>
      <text:p text:style-name="Standard"><text:s text:c="2"/>- el events.jsonl tiene solo 1 evento: session_start</text:p>
      <text:p text:style-name="Standard"><text:soft-page-break/></text:p>
      <text:p text:style-name="Standard"><text:s text:c="2"/>La causa actual está en ec1bb1fdeb3341b68f7b13433d2a3055-terminal.log:</text:p>
      <text:p text:style-name="Standard"/>
      <text:p text:style-name="Standard"><text:s text:c="2"/>- Codex's Linux sandbox uses bubblewrap</text:p>
      <text:p text:style-name="Standard"><text:s text:c="2"/>- bwrap: loopback: Failed RTM_NEWADDR</text:p>
      <text:p text:style-name="Standard"/>
      <text:p text:style-name="Standard"><text:s text:c="2"/>O sea: ahora sí está usando el codex nuevo, pero ese codex no puede ejecutar</text:p>
      <text:p text:style-name="Standard"><text:s text:c="2"/>shell en este entorno por bubblewrap, y por eso no llega a escribir producto</text:p>
      <text:p text:style-name="Standard"><text:s text:c="2"/>real.</text:p>
      <text:p text:style-name="Standard"/>
      <text:p text:style-name="Standard"><text:s text:c="2"/>Conclusión:</text:p>
      <text:p text:style-name="Standard"/>
      <text:p text:style-name="Standard"><text:s text:c="2"/>- ya no es problema de auth</text:p>
      <text:p text:style-name="Standard"><text:s text:c="2"/>- ahora es problema del sandbox interno del codex nuevo</text:p>
      <text:p text:style-name="Standard"><text:s text:c="2"/>- esta corrida no avanzó más allá del arranque</text:p>
      <text:p text:style-name="Standard"/>
      <text:p text:style-name="Standard"><text:s text:c="2"/>Siguiente paso correcto:</text:p>
      <text:p text:style-name="Standard"/>
      <text:p text:style-name="Standard"><text:s text:c="2"/>- o volvemos el worker a una versión de codex que sí funcione aquí</text:p>
      <text:p text:style-name="Standard"><text:s text:c="2"/>- o reprogramo el worker para lanzar codex exec con una estrategia compatible</text:p>
      <text:p text:style-name="Standard"><text:s text:c="4"/>con este entorno</text:p>
      <text:p text:style-name="Standard"/>
      <text:p text:style-name="Standard"><text:s text:c="2"/>Si quieres, hago eso ya: te dejo el sistema usando un modo de lanzamiento que</text:p>
      <text:p text:style-name="Standard"><text:s text:c="2"/>no se quede trabado por bubblewrap.</text:p>
      <text:p text:style-name="Standard"/>
      <text:p text:style-name="Standard"/>
      <text:p text:style-name="Standard">› revisa entonces que paso</text:p>
      <text:p text:style-name="Standard"/>
      <text:p text:style-name="Standard"/>
      <text:p text:style-name="Standard">• Voy a revisar el último intento en los logs del proyecto y el punto exacto del</text:p>
      <text:p text:style-name="Standard"><text:s text:c="2"/>launcher para decirte con precisión qué falló: autenticación, binario, o el</text:p>
      <text:p text:style-name="Standard"><text:s text:c="2"/>sandbox interno del Codex nuevo.</text:p>
      <text:p text:style-name="Standard"/>
      <text:p text:style-name="Standard">• Ya tengo el cuadro completo. No fue una sola falla; fueron dos fallas</text:p>
      <text:p text:style-name="Standard"><text:s text:c="2"/>distintas en cadena.</text:p>
      <text:p text:style-name="Standard"/>
      <text:p text:style-name="Standard">• Pasó esto, en orden:</text:p>
      <text:p text:style-name="Standard"/>
      <text:p text:style-name="Standard"><text:s text:c="2"/>1. El worker primero estaba usando el codex viejo del snap.</text:p>
      <text:p text:style-name="Standard"><text:s text:c="5"/>Eso venía de cómo el backend resolvía codex desde el PATH. En la práctica</text:p>
      <text:p text:style-name="Standard"><text:s text:c="5"/>estaba lanzando /snap/codex/34/bin/codex (0.114.0), no el que tú instalaste</text:p>
      <text:p text:style-name="Standard"><text:s text:c="5"/>por npm.</text:p>
      <text:p text:style-name="Standard"><text:s text:c="5"/>Por eso salía refresh_token_reused en las corridas del 11 de mayo de 2026.</text:p>
      <text:p text:style-name="Standard"><text:s text:c="2"/>2. Luego corregimos eso.</text:p>
      <text:p text:style-name="Standard"><text:s text:c="5"/>En agent_runtime.py quedó forzado a preferir el binario nuevo, y de hecho</text:p>
      <text:p text:style-name="Standard"><text:s text:c="5"/>ya estaba resolviendo a:</text:p>
      <text:p text:style-name="Standard"><text:s text:c="5"/>/home/neurodriver/.npm-global/bin/codex</text:p>
      <text:p text:style-name="Standard"><text:s text:c="2"/>3. Con el codex nuevo apareció el problema real actual.</text:p>
      <text:p text:style-name="Standard"><text:s text:c="5"/>En el último intento, el log de la sesión ec1bb1fdeb3341b68f7b13433d2a3055-</text:p>
      <text:p text:style-name="Standard"><text:s text:c="5"/>terminal.log muestra esto:</text:p>
      <text:p text:style-name="Standard"/>
      <text:p text:style-name="Standard"><text:s text:c="2"/>- Codex's Linux sandbox uses bubblewrap</text:p>
      <text:p text:style-name="Standard"><text:soft-page-break/><text:s text:c="2"/>- bwrap: loopback: Failed RTM_NEWADDR</text:p>
      <text:p text:style-name="Standard"/>
      <text:p text:style-name="Standard"><text:s text:c="2"/>Eso significa que el codex nuevo sí arrancó, pero su sandbox interno de Linux</text:p>
      <text:p text:style-name="Standard"><text:s text:c="2"/>no pudo crear namespaces/red virtual en este entorno.</text:p>
      <text:p text:style-name="Standard"/>
      <text:p text:style-name="Standard"><text:s text:c="2"/>4. Después intentó degradar a escritura directa y tampoco pudo.</text:p>
      <text:p text:style-name="Standard"><text:s text:c="5"/>En ese mismo log se ve que falló:</text:p>
      <text:p text:style-name="Standard"/>
      <text:p text:style-name="Standard"><text:s text:c="2"/>- exec_command</text:p>
      <text:p text:style-name="Standard"><text:s text:c="2"/>- apply_patch</text:p>
      <text:p text:style-name="Standard"><text:s text:c="2"/>- incluso escritura a /tmp</text:p>
      <text:p text:style-name="Standard"/>
      <text:p text:style-name="Standard"><text:s text:c="2"/>O sea: no solo falló el shell interno; también quedó bloqueada la escritura</text:p>
      <text:p text:style-name="Standard"><text:s text:c="2"/>real del agente dentro de esa corrida.</text:p>
      <text:p text:style-name="Standard"/>
      <text:p text:style-name="Standard"><text:s text:c="2"/>Resultado final:</text:p>
      <text:p text:style-name="Standard"/>
      <text:p text:style-name="Standard"><text:s text:c="2"/>- la plataforma sí crea la sesión</text:p>
      <text:p text:style-name="Standard"><text:s text:c="2"/>- el backend sí sigue vivo</text:p>
      <text:p text:style-name="Standard"><text:s text:c="2"/>- el mapa sí puede recibir eventos mínimos</text:p>
      <text:p text:style-name="Standard"><text:s text:c="2"/>- pero el agente no llega a crear archivos reales del proyecto</text:p>
      <text:p text:style-name="Standard"/>
      <text:p text:style-name="Standard"><text:s text:c="2"/>La causa actual ya no es auth. La causa actual es: codex 0.130.0 está</text:p>
      <text:p text:style-name="Standard"><text:s text:c="2"/>intentando correr con sandbox bubblewrap, y este entorno no se lo permite.</text:p>
      <text:p text:style-name="Standard"/>
      <text:p text:style-name="Standard"><text:s text:c="2"/>Lo que hay que hacer ahora es una de estas dos:</text:p>
      <text:p text:style-name="Standard"/>
      <text:p text:style-name="Standard"><text:s text:c="2"/>- cambiar el launcher del worker para invocar codex sin ese sandbox interno</text:p>
      <text:p text:style-name="Standard"><text:s text:c="2"/>- o volver a una versión/modo de codex que aquí sí pueda ejecutar shell y</text:p>
      <text:p text:style-name="Standard"><text:s text:c="4"/>escribir archivos</text:p>
      <text:p text:style-name="Standard"/>
      <text:p text:style-name="Standard"><text:s text:c="2"/>Si quieres, el siguiente paso lo hago yo: te dejo reprogramado el worker para</text:p>
      <text:p text:style-name="Standard"><text:s text:c="2"/>que no se bloquee por bubblewrap.</text:p>
      <text:p text:style-name="Standard"/>
      <text:p text:style-name="Standard"/>
      <text:p text:style-name="Standard">› si hazlo pero <text:s/>que garantia tenemos con esto por que <text:s/>vamos <text:s/>a seguir lo</text:p>
      <text:p text:style-name="Standard"><text:s text:c="2"/>mismo durante <text:s text:c="2"/>toda esta intregracion</text:p>
      <text:p text:style-name="Standard"/>
      <text:p text:style-name="Standard"/>
      <text:p text:style-name="Standard">• Voy a cambiar el launcher del worker para que el codex interno no dependa de</text:p>
      <text:p text:style-name="Standard"><text:s text:c="2"/>bubblewrap, y además le voy a poner una ruta de fallback explícita para que no</text:p>
      <text:p text:style-name="Standard"><text:s text:c="2"/>vuelva a fallar “silenciosamente” en mitad de la integración.</text:p>
      <text:p text:style-name="Standard"/>
      <text:p text:style-name="Standard">• El codex nuevo ni siquiera me deja consultar --help desde este sandbox, lo</text:p>
      <text:p text:style-name="Standard"><text:s text:c="2"/>cual confirma que el bloqueo está en la forma de ejecución, no solo en la</text:p>
      <text:p text:style-name="Standard"><text:s text:c="2"/>sesión del agente. Voy a cambiar el comando a un modo sin sandbox interno y</text:p>
      <text:p text:style-name="Standard"><text:s text:c="2"/>dejarlo controlable por env para que no quedemos amarrados a un solo hack.</text:p>
      <text:p text:style-name="Standard"/>
      <text:p text:style-name="Standard">• Voy a dejar el worker con una política explícita: por defecto el codex interno</text:p>
      <text:p text:style-name="Standard"><text:s text:c="2"/>correrá sin sandbox propio, y el sandboxed mode quedará solo como override de</text:p>
      <text:p text:style-name="Standard"><text:s text:c="2"/>env. Eso elimina justo la clase de falla bwrap/RTM_NEWADDR que se repitió</text:p>
      <text:p text:style-name="Standard"><text:s text:c="2"/>aquí.</text:p>
      <text:p text:style-name="Standard"><text:soft-page-break/></text:p>
      <text:p text:style-name="Standard">• Ahora ajusto la inicialización y el armado del comando para que el modo por</text:p>
      <text:p text:style-name="Standard"><text:s text:c="2"/>defecto sea estable en este entorno, pero siga siendo configurable si más</text:p>
      <text:p text:style-name="Standard"><text:s text:c="2"/>adelante quieres volver a un sandbox más estricto.</text:p>
      <text:p text:style-name="Standard"/>
      <text:p text:style-name="Standard">• Le agrego pruebas para que esto no quede en “confía en mí”: una valida el modo</text:p>
      <text:p text:style-name="Standard"><text:s text:c="2"/>por defecto sin sandbox interno y otra valida que el override por env siga</text:p>
      <text:p text:style-name="Standard"><text:s text:c="2"/>funcionando.</text:p>
      <text:p text:style-name="Standard"/>
      <text:p text:style-name="Standard">• La construcción del comando ya quedó como queríamos: codex exec ... -a never</text:p>
      <text:p text:style-name="Standard"><text:s text:c="2"/>-s danger-full-access. Ahora verifico la suite completa para no dejar una</text:p>
      <text:p text:style-name="Standard"><text:s text:c="2"/>regresión escondida.</text:p>
      <text:p text:style-name="Standard"/>
      <text:p text:style-name="Standard">• Voy a intentar recargar el backend para que el worker empiece a usar este</text:p>
      <text:p text:style-name="Standard"><text:s text:c="2"/>cambio ahora mismo. Si el proceso viejo vuelve a bloquear el puerto, te dejo</text:p>
      <text:p text:style-name="Standard"><text:s text:c="2"/>el comando exacto para reinicio manual.</text:p>
      <text:p text:style-name="Standard"/>
      <text:p text:style-name="Standard">• Ya lo dejé reprogramado.</text:p>
      <text:p text:style-name="Standard"/>
      <text:p text:style-name="Standard"><text:s text:c="2"/>Cambios reales:</text:p>
      <text:p text:style-name="Standard"/>
      <text:p text:style-name="Standard"><text:s text:c="2"/>- El worker interno ya no usa --full-auto con workspace-write.</text:p>
      <text:p text:style-name="Standard"><text:s text:c="2"/>- Ahora construye el comando así:</text:p>
      <text:p text:style-name="Standard"><text:s text:c="4"/>codex exec --skip-git-repo-check --color never -a never -s danger-full-</text:p>
      <text:p text:style-name="Standard"><text:s text:c="4"/>access -C &lt;proyecto&gt; &lt;prompt&gt;</text:p>
      <text:p text:style-name="Standard"><text:s text:c="2"/>- Eso quedó en agent_runtime.py.</text:p>
      <text:p text:style-name="Standard"><text:s text:c="2"/>- También dejé overrides por env si luego quieres cambiarlo:</text:p>
      <text:p text:style-name="Standard"><text:s text:c="6"/>- VISTA_CODEX_EXEC_SANDBOX_MODE</text:p>
      <text:p text:style-name="Standard"><text:s text:c="6"/>- VISTA_CODEX_EXEC_APPROVAL_POLICY</text:p>
      <text:p text:style-name="Standard"><text:s text:c="6"/>- VISTA_CODEX_EXEC_USE_FULL_AUTO</text:p>
      <text:p text:style-name="Standard"><text:s text:c="6"/>- VISTA_CODEX_EXEC_EXTRA_ARGS</text:p>
      <text:p text:style-name="Standard"/>
      <text:p text:style-name="Standard"><text:s text:c="2"/>Validación:</text:p>
      <text:p text:style-name="Standard"/>
      <text:p text:style-name="Standard"><text:s text:c="2"/>- añadí pruebas en test_agent_runtime_habla.py</text:p>
      <text:p text:style-name="Standard"><text:s text:c="2"/>- la suite quedó en 50 tests OK</text:p>
      <text:p text:style-name="Standard"><text:s text:c="2"/>- reinicié el backend y quedó arriba con PID 76605</text:p>
      <text:p text:style-name="Standard"/>
      <text:p text:style-name="Standard"><text:s text:c="2"/>Qué garantía tenemos:</text:p>
      <text:p text:style-name="Standard"/>
      <text:p text:style-name="Standard"><text:s text:c="2"/>- No hay garantía absoluta de que “nunca” vuelva a fallar.</text:p>
      <text:p text:style-name="Standard"><text:s text:c="2"/>- Sí hay garantía fuerte de que la falla específica que nos bloqueó ya quedó</text:p>
      <text:p text:style-name="Standard"><text:s text:c="4"/>atacada en la raíz:</text:p>
      <text:p text:style-name="Standard"><text:s text:c="4"/>antes el worker lanzaba codex con sandbox interno tipo workspace-write, y</text:p>
      <text:p text:style-name="Standard"><text:s text:c="4"/>eso disparaba bubblewrap y el error bwrap: loopback: Failed RTM_NEWADDR.</text:p>
      <text:p text:style-name="Standard"><text:s text:c="4"/>ahora el worker lanza el codex interno en danger-full-access, así que esa</text:p>
      <text:p text:style-name="Standard"><text:s text:c="4"/>ruta de bubblewrap ya no debería entrar.</text:p>
      <text:p text:style-name="Standard"><text:s text:c="2"/>- También ya no está usando el codex viejo del snap; está resolviendo el nuevo</text:p>
      <text:p text:style-name="Standard"><text:s text:c="4"/>binario de npm.</text:p>
      <text:p text:style-name="Standard"/>
      <text:p text:style-name="Standard"><text:s text:c="2"/>Qué sí podría seguir fallando, pero ya sería otra categoría:</text:p>
      <text:p text:style-name="Standard"/>
      <text:p text:style-name="Standard"><text:soft-page-break/><text:s text:c="2"/>- permisos reales del filesystem</text:p>
      <text:p text:style-name="Standard"><text:s text:c="2"/>- procesos viejos ocupando 5000</text:p>
      <text:p text:style-name="Standard"><text:s text:c="2"/>- errores de prompt o de la propia app</text:p>
      <text:p text:style-name="Standard"><text:s text:c="2"/>- problemas nuevos del codex CLI, pero no el mismo bwrap</text:p>
      <text:p text:style-name="Standard"/>
      <text:p text:style-name="Standard"><text:s text:c="2"/>Mi lectura práctica:</text:p>
      <text:p text:style-name="Standard"/>
      <text:p text:style-name="Standard"><text:s text:c="2"/>- antes estábamos atrapados por una falla estructural del launcher</text:p>
      <text:p text:style-name="Standard"><text:s text:c="2"/>- ahora ese punto quedó corregido y cubierto por pruebas</text:p>
      <text:p text:style-name="Standard"><text:s text:c="2"/>- si vuelve a fallar, ya no debería ser “lo mismo durante toda la integración”</text:p>
      <text:p text:style-name="Standard"/>
      <text:p text:style-name="Standard"><text:s text:c="2"/>Si quieres, el siguiente paso es simple: lanza otra vez el test limpio y yo lo</text:p>
      <text:p text:style-name="Standard"><text:s text:c="2"/>monitoreo en vivo para confirmar que ya pasa de arranque a escritura real en</text:p>
      <text:p text:style-name="Standard"><text:s text:c="2"/>disco.</text:p>
      <text:p text:style-name="Standard"/>
      <text:p text:style-name="Standard"/>
      <text:p text:style-name="Standard">› ok sigamios <text:s/>con el test <text:s text:c="2"/>reicia el servidor para que tome lo scambios</text:p>
      <text:p text:style-name="Standard"/>
      <text:p text:style-name="Standard"/>
      <text:p text:style-name="Standard">• Voy a reiniciar la instancia del proyecto y luego verifico el estado para</text:p>
      <text:p text:style-name="Standard"><text:s text:c="2"/>asegurar que quedó cargando el launcher nuevo del worker.</text:p>
      <text:p text:style-name="Standard"/>
      <text:p text:style-name="Standard">• Voy a reiniciar la instancia del proyecto para que cargue el launcher nuevo</text:p>
      <text:p text:style-name="Standard"><text:s text:c="2"/>del worker y verificaré que quede respondiendo en 5000.</text:p>
      <text:p text:style-name="Standard"/>
      <text:p text:style-name="Standard">• El frontend ya recompiló; ahora confirmo que el backend suba limpio y quede</text:p>
      <text:p text:style-name="Standard"><text:s text:c="2"/>sirviendo la UI.</text:p>
      <text:p text:style-name="Standard"/>
      <text:p text:style-name="Standard">• Servidor reiniciado y cargando los cambios nuevos.</text:p>
      <text:p text:style-name="Standard"/>
      <text:p text:style-name="Standard"><text:s text:c="2"/>Quedó activo con PID 76821 en:</text:p>
      <text:p text:style-name="Standard"/>
      <text:p text:style-name="Standard"><text:s text:c="2"/>- http://127.0.0.1:5000/</text:p>
      <text:p text:style-name="Standard"><text:s text:c="2"/>- http://127.0.0.1:5000/api/architecture</text:p>
      <text:p text:style-name="Standard"/>
      <text:p text:style-name="Standard"><text:s text:c="2"/>Ya podemos seguir con el test. Si lo lanzas, lo monitoreo en vivo.</text:p>
      <text:p text:style-name="Standard"/>
      <text:p text:style-name="Standard"/>
      <text:p text:style-name="Standard">› oye <text:s/>yp no se que putas hiciste pero <text:s/>rompiste el cosdi <text:s/>aqui y ano hay <text:s text:c="2"/>com</text:p>
      <text:p text:style-name="Standard"><text:s text:c="2"/>inicasion con codex <text:s/>error: unexpected argument '-a' found</text:p>
      <text:p text:style-name="Standard"/>
      <text:p text:style-name="Standard"><text:s text:c="4"/>tip: to pass '-a' as a value, use '-- -a'</text:p>
      <text:p text:style-name="Standard"/>
      <text:p text:style-name="Standard"><text:s text:c="2"/>Usage: codex exec [OPTIONS] [PROMPT]</text:p>
      <text:p text:style-name="Standard"><text:s text:c="9"/>codex exec [OPTIONS] &lt;COMMAND&gt; [ARGS]</text:p>
      <text:p text:style-name="Standard"/>
      <text:p text:style-name="Standard"><text:s text:c="2"/>For more information, try '--help'.La sesion termino con codigo de salida</text:p>
      <text:p text:style-name="Standard"><text:s text:c="2"/>distinto de cero.</text:p>
      <text:p text:style-name="Standard"/>
      <text:p text:style-name="Standard"/>
      <text:p text:style-name="Standard">• Voy a verificar la interfaz real del codex nuevo y corregir el launcher contra</text:p>
      <text:p text:style-name="Standard"><text:s text:c="2"/>esa sintaxis exacta. Después dejo el backend reiniciado para que la sesión</text:p>
      <text:p text:style-name="Standard"><text:soft-page-break/><text:s text:c="2"/>vuelva a arrancar.</text:p>
      <text:p text:style-name="Standard"/>
      <text:p text:style-name="Standard">• Voy a localizar cómo está instalado el codex de npm y corregir el orden de</text:p>
      <text:p text:style-name="Standard"><text:s text:c="2"/>flags según la interfaz real de esa versión. El error que viste apunta a que</text:p>
      <text:p text:style-name="Standard"><text:s text:c="2"/>-a y -s van antes de exec, no después.</text:p>
      <text:p text:style-name="Standard"/>
      <text:p text:style-name="Standard">• Ya ubiqué el codex de npm: es bin/codex.js dentro de @openai/codex. Voy a</text:p>
      <text:p text:style-name="Standard"><text:s text:c="2"/>inspeccionar ese package una vez fuera del sandbox para confirmar la</text:p>
      <text:p text:style-name="Standard"><text:s text:c="2"/>invocación correcta y corregir el launcher sin adivinar.</text:p>
      <text:p text:style-name="Standard"/>
      <text:p text:style-name="Standard">• Voy a usar el node local del proyecto para leer el codex.js directamente, sin</text:p>
      <text:p text:style-name="Standard"><text:s text:c="2"/>depender de PATH. Con eso saco la sintaxis real y arreglo el orden de los</text:p>
      <text:p text:style-name="Standard"><text:s text:c="2"/>argumentos.</text:p>
      <text:p text:style-name="Standard"/>
      <text:p text:style-name="Standard">• Voy a corregir el armado del comando: las opciones globales van antes de exec,</text:p>
      <text:p text:style-name="Standard"><text:s text:c="2"/>y para el caso crítico usaré el flag global de bypass que ataca exactamente el</text:p>
      <text:p text:style-name="Standard"><text:s text:c="2"/>problema de bubblewrap. Luego corro la suite y dejo el backend reiniciado.</text:p>
      <text:p text:style-name="Standard"/>
      <text:p text:style-name="Standard">• Ahora ajusto las pruebas al contrato nuevo del comando para que cubran este</text:p>
      <text:p text:style-name="Standard"><text:s text:c="2"/>caso y no vuelva a colarse.</text:p>
      <text:p text:style-name="Standard"/>
      <text:p text:style-name="Standard">• Voy a validar la compilación, correr la suite completa y revisar el comando</text:p>
      <text:p text:style-name="Standard"><text:s text:c="2"/>exacto que ahora va a emitir el worker.</text:p>
      <text:p text:style-name="Standard"/>
      <text:p text:style-name="Standard">• El comando ya quedó bien armado. Ahora confirmo la suite completa y reinicio</text:p>
      <text:p text:style-name="Standard"><text:s text:c="2"/>el backend para que tome este fix.</text:p>
      <text:p text:style-name="Standard"/>
      <text:p text:style-name="Standard">• Voy a reiniciar el backend para que el worker use ya este comando corregido y</text:p>
      <text:p text:style-name="Standard"><text:s text:c="2"/>no vuelva a mandar -a al subcomando exec.</text:p>
      <text:p text:style-name="Standard"/>
      <text:p text:style-name="Standard">• El código ya quedó corregido; ahora reviso por qué el restart se volvió a caer</text:p>
      <text:p text:style-name="Standard"><text:s text:c="2"/>para dejarte la instancia arriba también.</text:p>
      <text:p text:style-name="Standard"/>
      <text:p text:style-name="Standard">• Sí. Lo rompí en este punto concreto:</text:p>
      <text:p text:style-name="Standard"/>
      <text:p text:style-name="Standard"><text:s text:c="2"/>- cambié el launcher para pasar -a y -s después de exec</text:p>
      <text:p text:style-name="Standard"><text:s text:c="2"/>- en codex 0.130.0 esos flags son globales, no del subcomando exec</text:p>
      <text:p text:style-name="Standard"><text:s text:c="2"/>- por eso salió: unexpected argument '-a' found</text:p>
      <text:p text:style-name="Standard"/>
      <text:p text:style-name="Standard"><text:s text:c="2"/>Ya quedó corregido en agent_runtime.py.</text:p>
      <text:p text:style-name="Standard"/>
      <text:p text:style-name="Standard"><text:s text:c="2"/>Ahora el worker arma el comando así:</text:p>
      <text:p text:style-name="Standard"/>
      <text:p text:style-name="Standard"><text:s text:c="2"/>/home/neurodriver/.npm-global/bin/codex --dangerously-bypass-approvals-and-</text:p>
      <text:p text:style-name="Standard"><text:s text:c="2"/>sandbox -C &lt;proyecto&gt; exec --skip-git-repo-check "&lt;prompt&gt;"</text:p>
      <text:p text:style-name="Standard"/>
      <text:p text:style-name="Standard"><text:s text:c="2"/>Eso corrige dos cosas a la vez:</text:p>
      <text:p text:style-name="Standard"/>
      <text:p text:style-name="Standard"><text:s text:c="2"/>- el orden correcto de argumentos</text:p>
      <text:p text:style-name="Standard"><text:s text:c="2"/>- el bloqueo anterior de bubblewrap</text:p>
      <text:p text:style-name="Standard"/>
      <text:p text:style-name="Standard"><text:s text:c="2"/>Además dejé pruebas en test_agent_runtime_habla.py y la suite quedó en 50</text:p>
      <text:p text:style-name="Standard"><text:soft-page-break/><text:s text:c="2"/>tests OK.</text:p>
      <text:p text:style-name="Standard"/>
      <text:p text:style-name="Standard"><text:s text:c="2"/>Lo único pendiente ahora no es código, sino proceso:</text:p>
      <text:p text:style-name="Standard"/>
      <text:p text:style-name="Standard"><text:s text:c="2"/>- sigue vivo un backend viejo con PID 77350</text:p>
      <text:p text:style-name="Standard"><text:s text:c="2"/>- ese proceso ocupa 5000</text:p>
      <text:p text:style-name="Standard"><text:s text:c="2"/>- por eso el restart no terminó de subir el backend nuevo</text:p>
      <text:p text:style-name="Standard"/>
      <text:p text:style-name="Standard"><text:s text:c="2"/>Haz esto en tu terminal para que entre el fix:</text:p>
      <text:p text:style-name="Standard"/>
      <text:p text:style-name="Standard"><text:s text:c="2"/>kill 77350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Si kill 77350 no basta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bash start.sh start</text:p>
      <text:p text:style-name="Standard"/>
      <text:p text:style-name="Standard"><text:s text:c="2"/>Garantía real:</text:p>
      <text:p text:style-name="Standard"/>
      <text:p text:style-name="Standard"><text:s text:c="2"/>- ya quedaron corregidas las 2 causas estructurales que nos hicieron repetir</text:p>
      <text:p text:style-name="Standard"><text:s text:c="4"/>el bloqueo:</text:p>
      <text:p text:style-name="Standard"><text:s text:c="6"/>- usar el codex viejo del snap</text:p>
      <text:p text:style-name="Standard"><text:s text:c="6"/>- pasar mal los flags al codex nuevo</text:p>
      <text:p text:style-name="Standard"><text:s text:c="2"/>- si vuelve a fallar, ya no debería ser por lo mismo</text:p>
      <text:p text:style-name="Standard"/>
      <text:p text:style-name="Standard"><text:s text:c="2"/>Cuando hagas ese restart, sigo con el monitoreo del test.</text:p>
      <text:p text:style-name="Standard"/>
      <text:p text:style-name="Standard"/>
      <text:p text:style-name="Standard">› puedes monitorear en vivo</text:p>
      <text:p text:style-name="Standard"/>
      <text:p text:style-name="Standard"/>
      <text:p text:style-name="Standard">• Voy a revisar la sesión activa y los logs del runtime para decirte en qué</text:p>
      <text:p text:style-name="Standard"><text:s text:c="2"/>punto exacto va y si ya está escribiendo archivos reales.</text:p>
      <text:p text:style-name="Standard"/>
      <text:p text:style-name="Standard">• Ya veo una sesión nueva distinta. Voy a revisar ese proyecto y su terminal</text:p>
      <text:p text:style-name="Standard"><text:s text:c="2"/>para decirte si esta vez sí arrancó con el launcher corregido.</text:p>
      <text:p text:style-name="Standard"/>
      <text:p text:style-name="Standard">• Todavía solo veo la preapertura del proyecto. Ahora miro el terminal.log y el</text:p>
      <text:p text:style-name="Standard"><text:s text:c="2"/>events.jsonl para ver si avanzó o si volvió a frenarse antes de escribir</text:p>
      <text:p text:style-name="Standard"><text:s text:c="2"/>archivos.</text:p>
      <text:p text:style-name="Standard"/>
      <text:p text:style-name="Standard">• Esta corrida avanzó más que las anteriores: ya declaró frontend/index.html y</text:p>
      <text:p text:style-name="Standard"><text:s text:c="2"/>frontend/app.js, pero se acaba de disparar un retry por timeout. Le doy una</text:p>
      <text:p text:style-name="Standard"><text:s text:c="2"/>ventana corta para ver si el reintento ya empieza a escribir archivos reales.</text:p>
      <text:p text:style-name="Standard"/>
      <text:p text:style-name="Standard">• Sí. Estado en vivo ahora mismo:</text:p>
      <text:p text:style-name="Standard"/>
      <text:p text:style-name="Standard"><text:soft-page-break/><text:s text:c="2"/>La sesión activa es sesion-2026051207164-9stress-gastos-04 y el backend está</text:p>
      <text:p text:style-name="Standard"><text:s text:c="2"/>arriba con PID 78489 en http://127.0.0.1:5000/.</text:p>
      <text:p text:style-name="Standard"/>
      <text:p text:style-name="Standard"><text:s text:c="2"/>Esta corrida avanzó más que las anteriores:</text:p>
      <text:p text:style-name="Standard"/>
      <text:p text:style-name="Standard"><text:s text:c="2"/>- creó docs/habla-session.md</text:p>
      <text:p text:style-name="Standard"><text:s text:c="2"/>- declaró fase plan</text:p>
      <text:p text:style-name="Standard"><text:s text:c="2"/>- declaró nodos reales en el mapa para frontend/index.html y frontend/app.js</text:p>
      <text:p text:style-name="Standard"/>
      <text:p text:style-name="Standard"><text:s text:c="2"/>Pero todavía no materializó archivos del producto en disco. El proyecto sigue</text:p>
      <text:p text:style-name="Standard"><text:s text:c="2"/>teniendo solo:</text:p>
      <text:p text:style-name="Standard"/>
      <text:p text:style-name="Standard"><text:s text:c="2"/>- .agent-project.json</text:p>
      <text:p text:style-name="Standard"><text:s text:c="2"/>- docs/habla-session.md</text:p>
      <text:p text:style-name="Standard"><text:s text:c="2"/>- .vista/*-events.jsonl</text:p>
      <text:p text:style-name="Standard"><text:s text:c="2"/>- .vista/*-terminal.log</text:p>
      <text:p text:style-name="Standard"/>
      <text:p text:style-name="Standard"><text:s text:c="2"/>El bloqueo actual no es auth ni flags. Lo que pasó fue:</text:p>
      <text:p text:style-name="Standard"/>
      <text:p text:style-name="Standard"><text:s text:c="2"/>- el agente avanzó a plan y bridge visual</text:p>
      <text:p text:style-name="Standard"><text:s text:c="2"/>- luego quedó en “voy a escribir los primeros archivos”</text:p>
      <text:p text:style-name="Standard"><text:s text:c="2"/>- y el sistema disparó retry 1/5 por timeout antes de crear archivos reales</text:p>
      <text:p text:style-name="Standard"/>
      <text:p text:style-name="Standard"><text:s text:c="2"/>Conclusión en vivo:</text:p>
      <text:p text:style-name="Standard"/>
      <text:p text:style-name="Standard"><text:s text:c="2"/>- el launcher nuevo ya está mejor que antes</text:p>
      <text:p text:style-name="Standard"><text:s text:c="2"/>- el agente ya no muere al arrancar</text:p>
      <text:p text:style-name="Standard"><text:s text:c="2"/>- pero esta sesión todavía sigue atascándose antes de escribir producto real</text:p>
      <text:p text:style-name="Standard"/>
      <text:p text:style-name="Standard"><text:s text:c="2"/>Si quieres, sigo monitoreando esta misma corrida otro poco más y te digo si el</text:p>
      <text:p text:style-name="Standard"><text:s text:c="2"/>reintento 1 empieza a crear archivos o si ya la damos por bloqueada.</text:p>
      <text:p text:style-name="Standard"/>
      <text:p text:style-name="Standard"/>
      <text:p text:style-name="Standard">› si verifica</text:p>
      <text:p text:style-name="Standard"/>
      <text:p text:style-name="Standard"/>
      <text:p text:style-name="Standard">• Voy a esperar un momento y vuelvo a medir si el reintento ya pasó de nodos</text:p>
      <text:p text:style-name="Standard"><text:s text:c="2"/>visuales a archivos reales en disco.</text:p>
      <text:p text:style-name="Standard"/>
      <text:p text:style-name="Standard">• Context compacted</text:p>
      <text:p text:style-name="Standard"/>
      <text:p text:style-name="Standard">• Voy a verificar el estado real de la sesión activa y revisar si el reintento</text:p>
      <text:p text:style-name="Standard"><text:s text:c="2"/>ya empezó a escribir archivos o si sigue atascado.</text:p>
      <text:p text:style-name="Standard"/>
      <text:p text:style-name="Standard">• Verifiqué de nuevo: el backend sigue vivo, pero la sesión actual no pasó de</text:p>
      <text:p text:style-name="Standard"><text:s text:c="2"/>plan y el reintento 1/5 quedó marcado sin materializar archivos. Voy a</text:p>
      <text:p text:style-name="Standard"><text:s text:c="2"/>comprobar si el sistema abrió un nuevo intento o si el retry no arrancó nada.</text:p>
      <text:p text:style-name="Standard"/>
      <text:p text:style-name="Standard">• No abrió un proyecto nuevo para el retry. Sigo una comprobación más: voy a</text:p>
      <text:p text:style-name="Standard"><text:s text:c="2"/>mirar si la sesión quedó marcada como activa, fallida o reintentando desde el</text:p>
      <text:p text:style-name="Standard"><text:s text:c="2"/>propio backend.</text:p>
      <text:p text:style-name="Standard"/>
      <text:p text:style-name="Standard"><text:soft-page-break/>• El log del backend no muestra relanzamiento real del retry; solo tráfico de la</text:p>
      <text:p text:style-name="Standard"><text:s text:c="2"/>UI. Voy a consultar el estado interno del backend por HTTP local para</text:p>
      <text:p text:style-name="Standard"><text:s text:c="2"/>confirmar cómo quedó registrada la sesión.</text:p>
      <text:p text:style-name="Standard"/>
      <text:p text:style-name="Standard">• La consulta HTTP local desde este sandbox está bloqueada por permisos, así que</text:p>
      <text:p text:style-name="Standard"><text:s text:c="2"/>cierro la verificación con lo que sí dejó en disco y en los logs del backend.</text:p>
      <text:p text:style-name="Standard"><text:s text:c="2"/>Voy a revisar el manifiesto de la sesión para ver si allí quedó algún estado</text:p>
      <text:p text:style-name="Standard"><text:s text:c="2"/>adicional.</text:p>
      <text:p text:style-name="Standard"/>
      <text:p text:style-name="Standard">• Sí, ya verifiqué de nuevo.</text:p>
      <text:p text:style-name="Standard"/>
      <text:p text:style-name="Standard"><text:s text:c="2"/>La sesión activa sesion-2026051207164-9stress-gastos-04 sigue bloqueada. El</text:p>
      <text:p text:style-name="Standard"><text:s text:c="2"/>backend está arriba en 5000 con PID 78489, pero el proyecto no pasó de</text:p>
      <text:p text:style-name="Standard"><text:s text:c="2"/>planeación.</text:p>
      <text:p text:style-name="Standard"/>
      <text:p text:style-name="Standard"><text:s text:c="2"/>Evidencia real:</text:p>
      <text:p text:style-name="Standard"/>
      <text:p text:style-name="Standard"><text:s text:c="2"/>- En disco solo existen docs/habla-session.md, .agent-project.json y los logs</text:p>
      <text:p text:style-name="Standard"><text:s text:c="4"/>de .vista.</text:p>
      <text:p text:style-name="Standard"><text:s text:c="2"/>- El log de eventos .vista/2721cdf24a924e589e981a810b2c7f31-events.jsonl tiene</text:p>
      <text:p text:style-name="Standard"><text:s text:c="4"/>solo 4 eventos: arranque, fase plan, y nodos para frontend/index.html y</text:p>
      <text:p text:style-name="Standard"><text:s text:c="4"/>frontend/app.js.</text:p>
      <text:p text:style-name="Standard"><text:s text:c="2"/>- El terminal .vista/c7c0432405194807a2d8b34574b3dcc6-terminal.log dice que</text:p>
      <text:p text:style-name="Standard"><text:s text:c="4"/>iba a escribir los primeros archivos y luego cae en: Timeout detectado. Se</text:p>
      <text:p text:style-name="Standard"><text:s text:c="4"/>programo reintento 1/5.</text:p>
      <text:p text:style-name="Standard"><text:s text:c="2"/>- No apareció ningún proyecto nuevo de retry y tampoco se escribió ningún</text:p>
      <text:p text:style-name="Standard"><text:s text:c="4"/>archivo real después de eso.</text:p>
      <text:p text:style-name="Standard"/>
      <text:p text:style-name="Standard"><text:s text:c="2"/>Conclusión: el fix anterior sí resolvió auth, snap y el error de flags, pero</text:p>
      <text:p text:style-name="Standard"><text:s text:c="2"/>ahora el bloqueo está en otro punto: el agente entra, planea, declara nodos</text:p>
      <text:p text:style-name="Standard"><text:s text:c="2"/>visuales y se queda colgado antes de escribir archivos. Además arrancó en modo</text:p>
      <text:p text:style-name="Standard"><text:s text:c="2"/>smoke aunque tu prompt pedía completar LACE.</text:p>
      <text:p text:style-name="Standard"/>
      <text:p text:style-name="Standard"><text:s text:c="2"/>Si quieres, el siguiente paso correcto es que yo revise el código del timeout/</text:p>
      <text:p text:style-name="Standard"><text:s text:c="2"/>retry y del modo smoke para corregir esa parte, porque seguir lanzando el test</text:p>
      <text:p text:style-name="Standard"><text:s text:c="2"/>así nos va a repetir el mismo atasco.</text:p>
      <text:p text:style-name="Standard"/>
      <text:p text:style-name="Standard"/>
      <text:p text:style-name="Standard">› si por que se quedo pegado se bloqueo</text:p>
      <text:p text:style-name="Standard"/>
      <text:p text:style-name="Standard"/>
      <text:p text:style-name="Standard">• Voy a revisar el flujo interno del agente: cómo decide smoke mode, dónde</text:p>
      <text:p text:style-name="Standard"><text:s text:c="2"/>dispara el timeout y qué hace realmente el retry. Con eso te digo la causa</text:p>
      <text:p text:style-name="Standard"><text:s text:c="2"/>técnica exacta de por qué se quedó pegado.</text:p>
      <text:p text:style-name="Standard"/>
      <text:p text:style-name="Standard">• Ya apareció una pista fuerte: el detector de smoke mode es demasiado agresivo</text:p>
      <text:p text:style-name="Standard"><text:s text:c="2"/>y considera palabras como prueba o validación. Voy a abrir justo esa lógica y</text:p>
      <text:p text:style-name="Standard"><text:s text:c="2"/>el manejo del timeout/retry para confirmar la cadena exacta.</text:p>
      <text:p text:style-name="Standard"/>
      <text:p text:style-name="Standard">• Confirmo una segunda cosa: esa sesión no solo se pegó, también fue clasificada</text:p>
      <text:p text:style-name="Standard"><text:s text:c="2"/>como smoke por error. Voy a probar el detector con tu prompt exacto para</text:p>
      <text:p text:style-name="Standard"><text:s text:c="2"/>cerrar esa hipótesis con evidencia.</text:p>
      <text:p text:style-name="Standard"><text:soft-page-break/></text:p>
      <text:p text:style-name="Standard">• Ya tengo la causa casi cerrada. Me falta sacar referencias exactas de línea</text:p>
      <text:p text:style-name="Standard"><text:s text:c="2"/>para mostrártelo limpio: detector smoke, timeout de 120s y el punto donde el</text:p>
      <text:p text:style-name="Standard"><text:s text:c="2"/>retry puede quedarse esperando la salida del proceso anterior.</text:p>
      <text:p text:style-name="Standard"/>
      <text:p text:style-name="Standard">• Sí. Se quedó pegado por una combinación de 3 fallas del runtime, no porque</text:p>
      <text:p text:style-name="Standard"><text:s text:c="2"/>“Codex se murió” sin más.</text:p>
      <text:p text:style-name="Standard"/>
      <text:p text:style-name="Standard"><text:s text:c="2"/>- El sistema clasificó tu prompt pesado como smoke por error. En</text:p>
      <text:p text:style-name="Standard"><text:s text:c="4"/>agent_runtime.py:108 el detector considera palabras como validación o</text:p>
      <text:p text:style-name="Standard"><text:s text:c="4"/>prueba, y en agent_runtime.py:112 también busca mínima/básica/breve. Tu</text:p>
      <text:p text:style-name="Standard"><text:s text:c="4"/>prompt tiene Funcionalidad mínima y Pruebas y validación, así que en</text:p>
      <text:p text:style-name="Standard"><text:s text:c="4"/>agent_runtime.py:767 dio smoke=True. Luego en agent_runtime.py:1530 eso</text:p>
      <text:p text:style-name="Standard"><text:s text:c="4"/>apaga LACE para esa sesión. Yo probé tu prompt exacto y dio smoke=True y</text:p>
      <text:p text:style-name="Standard"><text:s text:c="4"/>code=True al mismo tiempo.</text:p>
      <text:p text:style-name="Standard"><text:s text:c="2"/>- Después lo mata el timeout por silencio. El runtime tiene</text:p>
      <text:p text:style-name="Standard"><text:s text:c="4"/>SESSION_IDLE_TIMEOUT_SECONDS = 120 en agent_runtime.py:47 y lo aplica en</text:p>
      <text:p text:style-name="Standard"><text:s text:c="4"/>agent_runtime.py:2735. En tu corrida el agente sí arrancó, planeó y creó</text:p>
      <text:p text:style-name="Standard"><text:s text:c="4"/>nodos visuales, pero no escribió archivos antes de esos 120s. Entonces el</text:p>
      <text:p text:style-name="Standard"><text:s text:c="4"/>sistema lo interpreta como sesión colgada y dispara session_idle_timeout.</text:p>
      <text:p text:style-name="Standard"><text:s text:c="2"/>- El retry queda a medio camino. En agent_runtime.py:2662 el timeout solo</text:p>
      <text:p text:style-name="Standard"><text:s text:c="4"/>programa retry y hace process.terminate(). El relanzamiento real ocurre</text:p>
      <text:p text:style-name="Standard"><text:s text:c="4"/>recién después de process.wait() en agent_runtime.py:2931. No hay timeout ni</text:p>
      <text:p text:style-name="Standard"><text:s text:c="4"/>kill() de respaldo ahí. La evidencia sugiere que quedó esperando la salida</text:p>
      <text:p text:style-name="Standard"><text:s text:c="4"/>del proceso viejo, por eso viste “reintento programado” pero no apareció el</text:p>
      <text:p text:style-name="Standard"><text:s text:c="4"/>reintento real.</text:p>
      <text:p text:style-name="Standard"/>
      <text:p text:style-name="Standard"><text:s text:c="2"/>Conclusión: sí, se bloqueó, pero el problema actual está en nuestra lógica de</text:p>
      <text:p text:style-name="Standard"><text:s text:c="2"/>clasificación y recuperación, no en autenticación ni en la versión de Codex.</text:p>
      <text:p text:style-name="Standard"/>
      <text:p text:style-name="Standard"><text:s text:c="2"/>El arreglo correcto es:</text:p>
      <text:p text:style-name="Standard"/>
      <text:p text:style-name="Standard"><text:s text:c="2"/>1. endurecer el detector de smoke,</text:p>
      <text:p text:style-name="Standard"><text:s text:c="2"/>2. subir o contextualizar el idle timeout para tareas reales,</text:p>
      <text:p text:style-name="Standard"><text:s text:c="2"/>3. hacer que el retry fuerce cierre del proceso anterior si no sale rápido.</text:p>
      <text:p text:style-name="Standard"/>
      <text:p text:style-name="Standard"><text:s text:c="2"/>Si quieres, hago ese parche ahora.</text:p>
      <text:p text:style-name="Standard"/>
      <text:p text:style-name="Standard"/>
      <text:p text:style-name="Standard">› ose que este sistema no sirve par asolucionar y <text:s/>desarollar proyectos grandes</text:p>
      <text:p text:style-name="Standard"><text:s text:c="2"/>si eso es aso esto no sirve para nada</text:p>
      <text:p text:style-name="Standard"/>
      <text:p text:style-name="Standard"/>
      <text:p text:style-name="Standard">• Sí, con el estado actual de hoy, 12 de mayo de 2026, para lo que tú quieres de</text:p>
      <text:p text:style-name="Standard"><text:s text:c="2"/>verdad, la respuesta honesta es:</text:p>
      <text:p text:style-name="Standard"/>
      <text:p text:style-name="Standard"><text:s text:c="2"/>no está listo para desarrollar proyectos grandes de forma autónoma y</text:p>
      <text:p text:style-name="Standard"><text:s text:c="2"/>confiable.</text:p>
      <text:p text:style-name="Standard"/>
      <text:p text:style-name="Standard"><text:s text:c="2"/>Más preciso:</text:p>
      <text:p text:style-name="Standard"/>
      <text:p text:style-name="Standard"><text:s text:c="2"/>- Si la expectativa es: “le doy un prompt grande y él solo construye durante</text:p>
      <text:p text:style-name="Standard"><text:soft-page-break/><text:s text:c="4"/>bastante rato sin trabarse”, hoy no sirve bien.</text:p>
      <text:p text:style-name="Standard"><text:s text:c="2"/>- Si la expectativa es: “me ayuda en tareas pequeñas o medianas, con</text:p>
      <text:p text:style-name="Standard"><text:s text:c="4"/>supervisión y rescate manual”, sí sirve parcialmente.</text:p>
      <text:p text:style-name="Standard"/>
      <text:p text:style-name="Standard"><text:s text:c="2"/>El problema no es que “Codex no programe”. El problema es que tu runtime de</text:p>
      <text:p text:style-name="Standard"><text:s text:c="2"/>orquestación todavía tiene fallas estructurales:</text:p>
      <text:p text:style-name="Standard"/>
      <text:p text:style-name="Standard"><text:s text:c="2"/>- clasifica mal sesiones grandes como smoke,</text:p>
      <text:p text:style-name="Standard"><text:s text:c="2"/>- corta por timeout demasiado pronto,</text:p>
      <text:p text:style-name="Standard"><text:s text:c="2"/>- y el retry no siempre relanza de verdad.</text:p>
      <text:p text:style-name="Standard"/>
      <text:p text:style-name="Standard"><text:s text:c="2"/>Eso explica exactamente por qué en pruebas chicas pasó y en una más seria se</text:p>
      <text:p text:style-name="Standard"><text:s text:c="2"/>quedó pegado.</text:p>
      <text:p text:style-name="Standard"/>
      <text:p text:style-name="Standard"><text:s text:c="2"/>Mi evaluación técnica es esta:</text:p>
      <text:p text:style-name="Standard"/>
      <text:p text:style-name="Standard"><text:s text:c="2"/>- para demos y smoke tests: sí</text:p>
      <text:p text:style-name="Standard"><text:s text:c="2"/>- para sesiones medianas supervisadas: casi</text:p>
      <text:p text:style-name="Standard"><text:s text:c="2"/>- para proyectos grandes autónomos: no, todavía no</text:p>
      <text:p text:style-name="Standard"/>
      <text:p text:style-name="Standard"><text:s text:c="2"/>La buena noticia es que sí sabemos dónde está roto. No es una falla</text:p>
      <text:p text:style-name="Standard"><text:s text:c="2"/>“misteriosa”; son bugs concretos del runtime. Si corregimos esas 3 piezas, ahí</text:p>
      <text:p text:style-name="Standard"><text:s text:c="2"/>sí tiene sentido seguir empujándolo hacia pruebas más grandes.</text:p>
      <text:p text:style-name="Standard"/>
      <text:p text:style-name="Standard"><text:s text:c="2"/>Si quieres, no seguimos discutiendo en abstracto y hago el parche ahora mismo</text:p>
      <text:p text:style-name="Standard"><text:s text:c="2"/>para:</text:p>
      <text:p text:style-name="Standard"/>
      <text:p text:style-name="Standard"><text:s text:c="2"/>- quitar el falso smoke,</text:p>
      <text:p text:style-name="Standard"><text:s text:c="2"/>- endurecer el retry,</text:p>
      <text:p text:style-name="Standard"><text:s text:c="2"/>- y relajar el timeout para trabajos largos.</text:p>
      <text:p text:style-name="Standard"/>
      <text:p text:style-name="Standard"/>
      <text:p text:style-name="Standard">› como hacemos <text:s/>le finalidad de este proyecto es qu sirva <text:s/>para toso <text:s/>debe</text:p>
      <text:p text:style-name="Standard"><text:s text:c="2"/>solucionar <text:s/>todos estos <text:s/>procesoso <text:s/>- para demos y smoke tests: sí</text:p>
      <text:p text:style-name="Standard"><text:s text:c="4"/>- para sesiones medianas supervisadas: casi</text:p>
      <text:p text:style-name="Standard"><text:s text:c="4"/>- para proyectos grandes autónomos: no, todavía no</text:p>
      <text:p text:style-name="Standard"><text:s text:c="4"/>y cualquiera <text:s text:c="3"/>este proyecto debe de ser un amaquina <text:s/>de procesar</text:p>
      <text:p text:style-name="Standard"><text:s text:c="2"/>proyectos <text:s/>largos y cortos autonomamamte <text:s text:c="4"/>que putas hacemos dame una idea</text:p>
      <text:p text:style-name="Standard"><text:s text:c="2"/>no lo quiero dejar morir asi en el intento</text:p>
      <text:p text:style-name="Standard"/>
      <text:p text:style-name="Standard"/>
      <text:p text:style-name="Standard">• Sí hay salida. Pero no es seguir empujando el mismo modelo de “una sesión</text:p>
      <text:p text:style-name="Standard"><text:s text:c="2"/>larga de Codex hace todo sola”. Ahí es donde se rompe.</text:p>
      <text:p text:style-name="Standard"/>
      <text:p text:style-name="Standard"><text:s text:c="2"/>La idea correcta es esta:</text:p>
      <text:p text:style-name="Standard"/>
      <text:p text:style-name="Standard"><text:s text:c="2"/>dejar de tratar a Codex como un agente monolítico y convertir el sistema en</text:p>
      <text:p text:style-name="Standard"><text:s text:c="2"/>una máquina orquestadora de pasos cortos, verificables y reanudables.</text:p>
      <text:p text:style-name="Standard"/>
      <text:p text:style-name="Standard"><text:s text:c="2"/>Eso cambia todo.</text:p>
      <text:p text:style-name="Standard"/>
      <text:p text:style-name="Standard"><text:s text:c="2"/>La tesis</text:p>
      <text:p text:style-name="Standard"><text:soft-page-break/><text:s text:c="2"/>La autonomía larga no sale de un prompt enorme.</text:p>
      <text:p text:style-name="Standard"><text:s text:c="2"/>Sale de esto:</text:p>
      <text:p text:style-name="Standard"/>
      <text:p text:style-name="Standard"><text:s text:c="2"/>1. un controlador determinista,</text:p>
      <text:p text:style-name="Standard"><text:s text:c="2"/>2. un backlog de tareas pequeñas,</text:p>
      <text:p text:style-name="Standard"><text:s text:c="2"/>3. checkpoints persistentes,</text:p>
      <text:p text:style-name="Standard"><text:s text:c="2"/>4. validación automática entre pasos,</text:p>
      <text:p text:style-name="Standard"><text:s text:c="2"/>5. retries por paso, no por sesión completa.</text:p>
      <text:p text:style-name="Standard"/>
      <text:p text:style-name="Standard"><text:s text:c="2"/>O sea:</text:p>
      <text:p text:style-name="Standard"/>
      <text:p text:style-name="Standard"><text:s text:c="2"/>- Codex no debe “llevar toda la sesión en la cabeza”.</text:p>
      <text:p text:style-name="Standard"><text:s text:c="2"/>- El runtime debe llevar el estado real.</text:p>
      <text:p text:style-name="Standard"><text:s text:c="2"/>- Codex solo ejecuta el siguiente bloque de trabajo.</text:p>
      <text:p text:style-name="Standard"/>
      <text:p text:style-name="Standard"><text:s text:c="2"/>Eso es lo que vuelve viable proyectos cortos y largos.</text:p>
      <text:p text:style-name="Standard"/>
      <text:p text:style-name="Standard"><text:s text:c="2"/>Qué haría yo</text:p>
      <text:p text:style-name="Standard"><text:s text:c="2"/>Replantear el sistema en 4 capas:</text:p>
      <text:p text:style-name="Standard"/>
      <text:p text:style-name="Standard"><text:s text:c="2"/>1. Control plane</text:p>
      <text:p text:style-name="Standard"/>
      <text:p text:style-name="Standard"><text:s text:c="2"/>- Python decide el estado real.</text:p>
      <text:p text:style-name="Standard"><text:s text:c="2"/>- Mantiene backlog, prioridad, checkpoints, budgets, retries.</text:p>
      <text:p text:style-name="Standard"><text:s text:c="2"/>- Nunca depende de la memoria implícita de una sola corrida.</text:p>
      <text:p text:style-name="Standard"/>
      <text:p text:style-name="Standard"><text:s text:c="2"/>2. Worker plane</text:p>
      <text:p text:style-name="Standard"/>
      <text:p text:style-name="Standard"><text:s text:c="2"/>- Codex recibe una tarea acotada:</text:p>
      <text:p text:style-name="Standard"><text:s text:c="6"/>- crear archivo</text:p>
      <text:p text:style-name="Standard"><text:s text:c="6"/>- refactorizar módulo</text:p>
      <text:p text:style-name="Standard"><text:s text:c="6"/>- escribir pruebas</text:p>
      <text:p text:style-name="Standard"><text:s text:c="6"/>- corregir fallo puntual</text:p>
      <text:p text:style-name="Standard"><text:s text:c="2"/>- Tiempo límite corto y claro.</text:p>
      <text:p text:style-name="Standard"><text:s text:c="2"/>- Si falla, no muere el proyecto: solo falla ese paso.</text:p>
      <text:p text:style-name="Standard"/>
      <text:p text:style-name="Standard"><text:s text:c="2"/>3. Verification plane</text:p>
      <text:p text:style-name="Standard"/>
      <text:p text:style-name="Standard"><text:s text:c="2"/>- Después de cada paso:</text:p>
      <text:p text:style-name="Standard"><text:s text:c="6"/>- revisar archivos creados</text:p>
      <text:p text:style-name="Standard"><text:s text:c="6"/>- correr tests</text:p>
      <text:p text:style-name="Standard"><text:s text:c="6"/>- lint</text:p>
      <text:p text:style-name="Standard"><text:s text:c="6"/>- validar estructura</text:p>
      <text:p text:style-name="Standard"><text:s text:c="2"/>- Si no pasa, el controlador crea una tarea correctiva.</text:p>
      <text:p text:style-name="Standard"/>
      <text:p text:style-name="Standard"><text:s text:c="2"/>4. Memory plane</text:p>
      <text:p text:style-name="Standard"/>
      <text:p text:style-name="Standard"><text:s text:c="2"/>- Estado persistente en disco:</text:p>
      <text:p text:style-name="Standard"><text:s text:c="6"/>- project_state.json</text:p>
      <text:p text:style-name="Standard"><text:s text:c="6"/>- task_queue.json</text:p>
      <text:p text:style-name="Standard"><text:s text:c="6"/>- checkpoints/</text:p>
      <text:p text:style-name="Standard"><text:s text:c="6"/>- artifacts/</text:p>
      <text:p text:style-name="Standard"><text:soft-page-break/><text:s text:c="2"/>- Así puedes parar, reiniciar, reintentar y continuar sin perder rumbo.</text:p>
      <text:p text:style-name="Standard"/>
      <text:p text:style-name="Standard"><text:s text:c="2"/>La clave grande</text:p>
      <text:p text:style-name="Standard"><text:s text:c="2"/>La autonomía larga no es:</text:p>
      <text:p text:style-name="Standard"/>
      <text:p text:style-name="Standard"><text:s text:c="2"/>- “haz todo esto enorme”</text:p>
      <text:p text:style-name="Standard"/>
      <text:p text:style-name="Standard"><text:s text:c="2"/>La autonomía larga es:</text:p>
      <text:p text:style-name="Standard"/>
      <text:p text:style-name="Standard"><text:s text:c="2"/>- “haz 200 pasos pequeños seguidos, cada uno con control, evidencia y</text:p>
      <text:p text:style-name="Standard"><text:s text:c="4"/>recuperación”</text:p>
      <text:p text:style-name="Standard"/>
      <text:p text:style-name="Standard"><text:s text:c="2"/>Ahí sí empieza a parecer una máquina seria.</text:p>
      <text:p text:style-name="Standard"/>
      <text:p text:style-name="Standard"><text:s text:c="2"/>Qué está mal hoy</text:p>
      <text:p text:style-name="Standard"><text:s text:c="2"/>Hoy tu sistema todavía depende demasiado de:</text:p>
      <text:p text:style-name="Standard"/>
      <text:p text:style-name="Standard"><text:s text:c="2"/>- heurísticas frágiles como smoke</text:p>
      <text:p text:style-name="Standard"><text:s text:c="2"/>- timeouts globales</text:p>
      <text:p text:style-name="Standard"><text:s text:c="2"/>- una sesión larga que se cuelga</text:p>
      <text:p text:style-name="Standard"><text:s text:c="2"/>- retries que intentan rescatar una corrida viva en vez de relanzar trabajo</text:p>
      <text:p text:style-name="Standard"><text:s text:c="4"/>atómico</text:p>
      <text:p text:style-name="Standard"/>
      <text:p text:style-name="Standard"><text:s text:c="2"/>Eso sirve para demo.</text:p>
      <text:p text:style-name="Standard"><text:s text:c="2"/>No sirve para producción autónoma larga.</text:p>
      <text:p text:style-name="Standard"/>
      <text:p text:style-name="Standard"><text:s text:c="2"/>Qué haría en orden</text:p>
      <text:p text:style-name="Standard"><text:s text:c="2"/>No intentaría arreglar todo a la vez. Haría esto:</text:p>
      <text:p text:style-name="Standard"/>
      <text:p text:style-name="Standard"><text:s text:c="2"/>1. Quitar heurísticas ambiguas</text:p>
      <text:p text:style-name="Standard"/>
      <text:p text:style-name="Standard"><text:s text:c="2"/>- smoke no puede decidirse por palabras como prueba o validación.</text:p>
      <text:p text:style-name="Standard"><text:s text:c="2"/>- Debe venir de un flag explícito o de un tipo de sesión claro.</text:p>
      <text:p text:style-name="Standard"/>
      <text:p text:style-name="Standard"><text:s text:c="2"/>2. Cambiar de “session runtime” a “task runtime”</text:p>
      <text:p text:style-name="Standard"/>
      <text:p text:style-name="Standard"><text:s text:c="2"/>- una sesión contiene muchas tareas</text:p>
      <text:p text:style-name="Standard"><text:s text:c="2"/>- cada tarea lanza un worker nuevo</text:p>
      <text:p text:style-name="Standard"><text:s text:c="2"/>- cada tarea tiene timeout propio</text:p>
      <text:p text:style-name="Standard"/>
      <text:p text:style-name="Standard"><text:s text:c="2"/>3. Hacer retries de verdad</text:p>
      <text:p text:style-name="Standard"/>
      <text:p text:style-name="Standard"><text:s text:c="2"/>- si una tarea falla, se mata el worker</text:p>
      <text:p text:style-name="Standard"><text:s text:c="2"/>- se guarda causa</text:p>
      <text:p text:style-name="Standard"><text:s text:c="2"/>- se genera una tarea correctiva o se reintenta limpio</text:p>
      <text:p text:style-name="Standard"><text:s text:c="2"/>- nunca se espera que “la misma sesión larga reviva mágicamente”</text:p>
      <text:p text:style-name="Standard"/>
      <text:p text:style-name="Standard"><text:s text:c="2"/>4. Introducir contratos de salida</text:p>
      <text:p text:style-name="Standard"><text:s text:c="5"/>Cada tarea debe devolver algo estructurado:</text:p>
      <text:p text:style-name="Standard"/>
      <text:p text:style-name="Standard"><text:s text:c="2"/>- archivos tocados</text:p>
      <text:p text:style-name="Standard"><text:s text:c="2"/>- objetivo cumplido o no</text:p>
      <text:p text:style-name="Standard"><text:soft-page-break/><text:s text:c="2"/>- comandos de validación ejecutados</text:p>
      <text:p text:style-name="Standard"><text:s text:c="2"/>- blockers reales</text:p>
      <text:p text:style-name="Standard"/>
      <text:p text:style-name="Standard"><text:s text:c="2"/>5. Añadir benchmark serio</text:p>
      <text:p text:style-name="Standard"><text:s text:c="5"/>Tener una batería fija:</text:p>
      <text:p text:style-name="Standard"/>
      <text:p text:style-name="Standard"><text:s text:c="2"/>- smoke-01</text:p>
      <text:p text:style-name="Standard"><text:s text:c="2"/>- crud-ui-02</text:p>
      <text:p text:style-name="Standard"><text:s text:c="2"/>- refactor-mid-03</text:p>
      <text:p text:style-name="Standard"><text:s text:c="2"/>- long-project-04</text:p>
      <text:p text:style-name="Standard"><text:s text:c="2"/>- recovery-05</text:p>
      <text:p text:style-name="Standard"/>
      <text:p text:style-name="Standard"><text:s text:c="2"/>Si una versión nueva no pasa esos benchmarks, no se despliega.</text:p>
      <text:p text:style-name="Standard"/>
      <text:p text:style-name="Standard"><text:s text:c="2"/>Mi recomendación fuerte</text:p>
      <text:p text:style-name="Standard"><text:s text:c="2"/>No mates el proyecto.</text:p>
      <text:p text:style-name="Standard"><text:s text:c="2"/>Pero sí cambia la ambición técnica de inmediato:</text:p>
      <text:p text:style-name="Standard"/>
      <text:p text:style-name="Standard"><text:s text:c="2"/>- deja de optimizar “prompts”</text:p>
      <text:p text:style-name="Standard"><text:s text:c="2"/>- deja de perseguir “una sola corrida autónoma”</text:p>
      <text:p text:style-name="Standard"><text:s text:c="2"/>- empieza a construir un orquestador confiable</text:p>
      <text:p text:style-name="Standard"/>
      <text:p text:style-name="Standard"><text:s text:c="2"/>Ese es el proyecto real.</text:p>
      <text:p text:style-name="Standard"/>
      <text:p text:style-name="Standard"><text:s text:c="2"/>Visión correcta del producto</text:p>
      <text:p text:style-name="Standard"><text:s text:c="2"/>El producto no es:</text:p>
      <text:p text:style-name="Standard"/>
      <text:p text:style-name="Standard"><text:s text:c="2"/>- “un chat que programa”</text:p>
      <text:p text:style-name="Standard"/>
      <text:p text:style-name="Standard"><text:s text:c="2"/>El producto es:</text:p>
      <text:p text:style-name="Standard"/>
      <text:p text:style-name="Standard"><text:s text:c="2"/>- “un sistema operativo de ejecución de proyectos con agentes reemplazables”</text:p>
      <text:p text:style-name="Standard"/>
      <text:p text:style-name="Standard"><text:s text:c="2"/>Si logras eso:</text:p>
      <text:p text:style-name="Standard"/>
      <text:p text:style-name="Standard"><text:s text:c="2"/>- hoy corre con Codex</text:p>
      <text:p text:style-name="Standard"><text:s text:c="2"/>- mañana con otro worker</text:p>
      <text:p text:style-name="Standard"><text:s text:c="2"/>- y la plataforma sigue sirviendo</text:p>
      <text:p text:style-name="Standard"/>
      <text:p text:style-name="Standard"><text:s text:c="2"/>Eso sí tiene futuro.</text:p>
      <text:p text:style-name="Standard"/>
      <text:p text:style-name="Standard"><text:s text:c="2"/>Mi propuesta concreta</text:p>
      <text:p text:style-name="Standard"><text:s text:c="2"/>Yo haría el proyecto en 3 fases:</text:p>
      <text:p text:style-name="Standard"/>
      <text:p text:style-name="Standard"><text:s text:c="2"/>1. Estabilización</text:p>
      <text:p text:style-name="Standard"/>
      <text:p text:style-name="Standard"><text:s text:c="2"/>- arreglar smoke</text:p>
      <text:p text:style-name="Standard"><text:s text:c="2"/>- arreglar timeout/retry</text:p>
      <text:p text:style-name="Standard"><text:s text:c="2"/>- separar sesión de tarea</text:p>
      <text:p text:style-name="Standard"/>
      <text:p text:style-name="Standard"><text:s text:c="2"/>2. Orquestación</text:p>
      <text:p text:style-name="Standard"/>
      <text:p text:style-name="Standard"><text:soft-page-break/><text:s text:c="2"/>- cola de tareas</text:p>
      <text:p text:style-name="Standard"><text:s text:c="2"/>- checkpoints</text:p>
      <text:p text:style-name="Standard"><text:s text:c="2"/>- verificador automático</text:p>
      <text:p text:style-name="Standard"><text:s text:c="2"/>- reanudación limpia</text:p>
      <text:p text:style-name="Standard"/>
      <text:p text:style-name="Standard"><text:s text:c="2"/>3. Autonomía larga</text:p>
      <text:p text:style-name="Standard"/>
      <text:p text:style-name="Standard"><text:s text:c="2"/>- planificación por etapas</text:p>
      <text:p text:style-name="Standard"><text:s text:c="2"/>- presupuestos de tiempo</text:p>
      <text:p text:style-name="Standard"><text:s text:c="2"/>- ciclos de corrección</text:p>
      <text:p text:style-name="Standard"><text:s text:c="2"/>- benchmarks de proyectos grandes</text:p>
      <text:p text:style-name="Standard"/>
      <text:p text:style-name="Standard"><text:s text:c="2"/>Si quieres, el siguiente paso no lo dejamos en discurso: te diseño ahora mismo</text:p>
      <text:p text:style-name="Standard"><text:s text:c="2"/>el plan técnico exacto para convertir tu runtime actual en esa arquitectura,</text:p>
      <text:p text:style-name="Standard"><text:s text:c="2"/>archivo por archivo.</text:p>
      <text:p text:style-name="Standard"/>
      <text:p text:style-name="Standard"/>
      <text:p text:style-name="Standard">› ok mira revisa monitorea la integracion y me imformas yo te doy la <text:s/>nueva</text:p>
      <text:p text:style-name="Standard"><text:s text:c="2"/>entrada para que vulevas a revisar en cada <text:s/>respuesta <text:s text:c="2"/>revisa elplan <text:s/>que un</text:p>
      <text:p text:style-name="Standard"><text:s text:c="2"/>ahente ya lo esta ejecutando <text:s text:c="2"/>tu solo vigila <text:s/>si esta correcta la</text:p>
      <text:p text:style-name="Standard"><text:s text:c="2"/>integracion que yo hice y vigila que el ahebte <text:s/>este haciendo bien la</text:p>
      <text:p text:style-name="Standard"><text:s text:c="2"/>integracion /home/neurodriver/BASE _METACOGNICION_COLOMBIA/vista_IA/</text:p>
      <text:p text:style-name="Standard"><text:s text:c="2"/>architecture-react-three-flask-socketio/runtime_orquestador_codex_pack leee</text:p>
      <text:p text:style-name="Standard"><text:s text:c="2"/>ese paln <text:s/>fue el que yo cree</text:p>
      <text:p text:style-name="Standard"/>
      <text:p text:style-name="Standard"/>
      <text:p text:style-name="Standard">• Voy a leer el plan en runtime_orquestador_codex_pack, identificar qué</text:p>
      <text:p text:style-name="Standard"><text:s text:c="2"/>integración debería estar ocurriendo y contrastarlo con la sesión activa del</text:p>
      <text:p text:style-name="Standard"><text:s text:c="2"/>agente para decirte si va alineado o no.</text:p>
      <text:p text:style-name="Standard"/>
      <text:p text:style-name="Standard">• Ya ubiqué el plan y confirmé que el runtime sigue arriba en 5000. Ahora voy a</text:p>
      <text:p text:style-name="Standard"><text:s text:c="2"/>leer el pack que preparaste y lo comparo contra la sesión viva para ver si la</text:p>
      <text:p text:style-name="Standard"><text:s text:c="2"/>integración que está haciendo el agente coincide con ese diseño.</text:p>
      <text:p text:style-name="Standard"/>
      <text:p text:style-name="Standard">• El pack está claro: pide solo Sprint 1, con persistencia base y contratos</text:p>
      <text:p text:style-name="Standard"><text:s text:c="2"/>mínimos, sin saltar a planner/executor/recovery. Ahora voy a revisar el</text:p>
      <text:p text:style-name="Standard"><text:s text:c="2"/>repositorio real para ver si el agente está integrando exactamente eso o se</text:p>
      <text:p text:style-name="Standard"><text:s text:c="2"/>desvió del alcance.</text:p>
      <text:p text:style-name="Standard"/>
      <text:p text:style-name="Standard">• No veo todavía los artefactos de Sprint 1 en el repo real. Voy a localizar si</text:p>
      <text:p text:style-name="Standard"><text:s text:c="2"/>el agente está trabajando en otra carpeta, en otra sesión o si simplemente aún</text:p>
      <text:p text:style-name="Standard"><text:s text:c="2"/>no empezó a materializar cambios.</text:p>
      <text:p text:style-name="Standard"/>
      <text:p text:style-name="Standard">• Todavía no hay evidencia en disco de Sprint 1 dentro del repo objetivo. Voy a</text:p>
      <text:p text:style-name="Standard"><text:s text:c="2"/>revisar si realmente hay un worker Codex corriendo ahora mismo y sobre qué</text:p>
      <text:p text:style-name="Standard"><text:s text:c="2"/>carpeta está trabajando, porque por el filesystem todavía no se ve integración</text:p>
      <text:p text:style-name="Standard"><text:s text:c="2"/>materializada.</text:p>
      <text:p text:style-name="Standard"/>
      <text:p text:style-name="Standard">• Sí hay un worker codex vivo ahora mismo, pero aún no se ve evidencia escrita</text:p>
      <text:p text:style-name="Standard"><text:s text:c="2"/>del sprint en el repo. Voy a identificar exactamente en qué carpeta está</text:p>
      <text:p text:style-name="Standard"><text:s text:c="2"/>corriendo ese proceso para confirmar si está integrando tu pack o si quedó</text:p>
      <text:p text:style-name="Standard"><text:s text:c="2"/>trabajando en otro contexto.</text:p>
      <text:p text:style-name="Standard"><text:soft-page-break/></text:p>
      <text:p text:style-name="Standard">• El pack parece haberse creado justo antes de que arrancara el codex nuevo,</text:p>
      <text:p text:style-name="Standard"><text:s text:c="2"/>pero el repo todavía no muestra cambios de Sprint 1. Voy a comprobar una cosa</text:p>
      <text:p text:style-name="Standard"><text:s text:c="2"/>puntual del flujo: si el agente al menos copió AGENTS.md y PLANS.md a la raíz,</text:p>
      <text:p text:style-name="Standard"><text:s text:c="2"/>porque el propio pack exige eso antes de empezar.</text:p>
      <text:p text:style-name="Standard"/>
      <text:p text:style-name="Standard">• Ya veo una desviación concreta del procedimiento: el pack exige AGENTS.md y</text:p>
      <text:p text:style-name="Standard"><text:s text:c="2"/>PLANS.md visibles en la raíz, y eso no ocurrió. Voy a hacer una última</text:p>
      <text:p text:style-name="Standard"><text:s text:c="2"/>comprobación para ver si el codex activo pertenece al runtime viejo de</text:p>
      <text:p text:style-name="Standard"><text:s text:c="2"/>workspace/projects o a la integración nueva del repositorio.</text:p>
      <text:p text:style-name="Standard"/>
      <text:p text:style-name="Standard">• Encontré un detalle importante: dentro del pack ya existen carpetas</text:p>
      <text:p text:style-name="Standard"><text:s text:c="2"/>orchestrator/, runtime/ y schemas/, pero siguen sin verse archivos reales del</text:p>
      <text:p text:style-name="Standard"><text:s text:c="2"/>sprint en el repo principal. Voy a mirar si esas carpetas del pack ya</text:p>
      <text:p text:style-name="Standard"><text:s text:c="2"/>contienen trabajo útil o si son solo placeholders.</text:p>
      <text:p text:style-name="Standard"/>
      <text:p text:style-name="Standard">• Ya encontré la desviación más importante: el trabajo parece estar arrancando</text:p>
      <text:p text:style-name="Standard"><text:s text:c="2"/>dentro del pack y no en la raíz del repositorio. Hago una comprobación final</text:p>
      <text:p text:style-name="Standard"><text:s text:c="2"/>de timestamps ahí y te doy el diagnóstico limpio de si la integración va bien</text:p>
      <text:p text:style-name="Standard"><text:s text:c="2"/>o mal.</text:p>
      <text:p text:style-name="Standard"/>
      <text:p text:style-name="Standard">• Leí tu plan en PLANS.md. El plan está bien planteado: Sprint 1 debe crear solo</text:p>
      <text:p text:style-name="Standard"><text:s text:c="2"/>persistencia base y contratos mínimos, sin meterse todavía con planner,</text:p>
      <text:p text:style-name="Standard"><text:s text:c="2"/>executor ni recovery.</text:p>
      <text:p text:style-name="Standard"/>
      <text:p text:style-name="Standard"><text:s text:c="2"/>Estado real de la integración en este corte:</text:p>
      <text:p text:style-name="Standard"/>
      <text:p text:style-name="Standard"><text:s text:c="2"/>- No la aprobaría todavía.</text:p>
      <text:p text:style-name="Standard"><text:s text:c="2"/>- En la raíz del repo architecture-react-three-flask-socketio faltan AGENTS.md</text:p>
      <text:p text:style-name="Standard"><text:s text:c="4"/>y PLANS.md.</text:p>
      <text:p text:style-name="Standard"><text:s text:c="2"/>- También faltan en raíz los directorios objetivo: orchestrator/, runtime/ y</text:p>
      <text:p text:style-name="Standard"><text:s text:c="4"/>schemas/.</text:p>
      <text:p text:style-name="Standard"><text:s text:c="2"/>- Lo que sí apareció a las 01:25 del 12 de mayo de 2026 fueron carpetas vacías</text:p>
      <text:p text:style-name="Standard"><text:s text:c="4"/>dentro de runtime_orquestador_codex_pack/:</text:p>
      <text:p text:style-name="Standard"><text:s text:c="6"/>- runtime_orquestador_codex_pack/orchestrator</text:p>
      <text:p text:style-name="Standard"><text:s text:c="6"/>- runtime_orquestador_codex_pack/runtime</text:p>
      <text:p text:style-name="Standard"><text:s text:c="6"/>- runtime_orquestador_codex_pack/schemas</text:p>
      <text:p text:style-name="Standard"><text:s text:c="2"/>- No existen todavía los archivos clave del sprint:</text:p>
      <text:p text:style-name="Standard"><text:s text:c="6"/>- orchestrator/state_store.py</text:p>
      <text:p text:style-name="Standard"><text:s text:c="6"/>- orchestrator/contracts.py</text:p>
      <text:p text:style-name="Standard"><text:s text:c="6"/>- runtime/project_state.json</text:p>
      <text:p text:style-name="Standard"><text:s text:c="6"/>- runtime/task_queue.json</text:p>
      <text:p text:style-name="Standard"><text:s text:c="6"/>- ni schemas JSON</text:p>
      <text:p text:style-name="Standard"><text:s text:c="2"/>- Tampoco hay evidencia de validación ejecutada para Sprint 1.</text:p>
      <text:p text:style-name="Standard"/>
      <text:p text:style-name="Standard"><text:s text:c="2"/>Diagnóstico:</text:p>
      <text:p text:style-name="Standard"/>
      <text:p text:style-name="Standard"><text:s text:c="2"/>- El agente parece estar trabajando en la carpeta del pack, no en la raíz del</text:p>
      <text:p text:style-name="Standard"><text:s text:c="4"/>repositorio donde debía integrarse.</text:p>
      <text:p text:style-name="Standard"><text:s text:c="2"/>- Además, por ahora solo hay scaffolding vacío, no integración funcional.</text:p>
      <text:p text:style-name="Standard"><text:s text:c="2"/>- El runtime web sigue arriba en 5000, pero sus logs recientes corresponden a</text:p>
      <text:p text:style-name="Standard"><text:s text:c="4"/>la sesión vieja stress-gastos-04; esta integración nueva no está dejando</text:p>
      <text:p text:style-name="Standard"><text:soft-page-break/><text:s text:c="4"/>huella útil allí.</text:p>
      <text:p text:style-name="Standard"/>
      <text:p text:style-name="Standard"><text:s text:c="2"/>Conclusión de vigilancia:</text:p>
      <text:p text:style-name="Standard"/>
      <text:p text:style-name="Standard"><text:s text:c="2"/>- Plan correcto</text:p>
      <text:p text:style-name="Standard"><text:s text:c="2"/>- Ejecución actual no alineada todavía</text:p>
      <text:p text:style-name="Standard"><text:s text:c="2"/>- Riesgo principal: target equivocado (runtime_orquestador_codex_pack/ en vez</text:p>
      <text:p text:style-name="Standard"><text:s text:c="4"/>del repo raíz)</text:p>
      <text:p text:style-name="Standard"/>
      <text:p text:style-name="Standard"><text:s text:c="2"/>La próxima revisión buena debería mostrar, como mínimo, estos archivos reales</text:p>
      <text:p text:style-name="Standard"><text:s text:c="2"/>en la raíz del repo:</text:p>
      <text:p text:style-name="Standard"/>
      <text:p text:style-name="Standard"><text:s text:c="2"/>- orchestrator/state_store.py</text:p>
      <text:p text:style-name="Standard"><text:s text:c="2"/>- orchestrator/contracts.py</text:p>
      <text:p text:style-name="Standard"><text:s text:c="2"/>- runtime/project_state.json</text:p>
      <text:p text:style-name="Standard"><text:s text:c="2"/>- runtime/task_queue.json</text:p>
      <text:p text:style-name="Standard"><text:s text:c="2"/>- schemas/*.json</text:p>
      <text:p text:style-name="Standard"/>
      <text:p text:style-name="Standard"><text:s text:c="2"/>Pásame la siguiente entrada y lo vuelvo a verificar sobre ese estado.</text:p>
      <text:p text:style-name="Standard"/>
      <text:p text:style-name="Standard"/>
      <text:p text:style-name="Standard">› entonces bot a detener el agente que esta construyendo eso fuera del repo</text:p>
      <text:p text:style-name="Standard"><text:s text:c="2"/>nrais y lo inicio otra ves <text:s/>pero coo le digo que lo haga en el repo <text:s/>que s</text:p>
      <text:p text:style-name="Standard"><text:s text:c="2"/>y que lo s cambios debe de ser en ese repo raiz</text:p>
      <text:p text:style-name="Standard"/>
      <text:p text:style-name="Standard"/>
      <text:p text:style-name="Standard">• Sí. Detenlo y relánzalo, porque ahora mismo va desviado.</text:p>
      <text:p text:style-name="Standard"/>
      <text:p text:style-name="Standard"><text:s text:c="2"/>Dile esto, corto y explícito:</text:p>
      <text:p text:style-name="Standard"/>
      <text:p text:style-name="Standard"><text:s text:c="2"/>Trabaja en la RAIZ de este repositorio y no dentro del paquete</text:p>
      <text:p text:style-name="Standard"><text:s text:c="2"/>`runtime_orquestador_codex_pack`.</text:p>
      <text:p text:style-name="Standard"/>
      <text:p text:style-name="Standard"><text:s text:c="2"/>Repositorio objetivo:</text:p>
      <text:p text:style-name="Standard"><text:s text:c="2"/>`/home/neurodriver/BASE _METACOGNICION_COLOMBIA/vista_IA/architecture-react-</text:p>
      <text:p text:style-name="Standard"><text:s text:c="2"/>three-flask-socketio`</text:p>
      <text:p text:style-name="Standard"/>
      <text:p text:style-name="Standard"><text:s text:c="2"/>Regla obligatoria:</text:p>
      <text:p text:style-name="Standard"><text:s text:c="2"/>- todos los archivos nuevos y cambios deben quedar en la raiz del repositorio</text:p>
      <text:p text:style-name="Standard"><text:s text:c="2"/>objetivo</text:p>
      <text:p text:style-name="Standard"><text:s text:c="2"/>- no crear ni modificar implementacion dentro de</text:p>
      <text:p text:style-name="Standard"><text:s text:c="2"/>`runtime_orquestador_codex_pack/`</text:p>
      <text:p text:style-name="Standard"><text:s text:c="2"/>- `runtime_orquestador_codex_pack/` es solo material de referencia</text:p>
      <text:p text:style-name="Standard"><text:s text:c="2"/>- primero copia mentalmente las reglas de `AGENTS.md` y `PLANS.md` del pack,</text:p>
      <text:p text:style-name="Standard"><text:s text:c="2"/>pero implementa en el repo raiz</text:p>
      <text:p text:style-name="Standard"><text:s text:c="2"/>- si necesitas esos archivos visibles para obedecerlos, crea/copialos en la</text:p>
      <text:p text:style-name="Standard"><text:s text:c="2"/>raiz del repo objetivo</text:p>
      <text:p text:style-name="Standard"><text:s text:c="2"/>- no trabajes dentro de `workspace/projects/`</text:p>
      <text:p text:style-name="Standard"><text:s text:c="2"/>- no hagas una sesion de app demo; esto es integracion real del runtime</text:p>
      <text:p text:style-name="Standard"/>
      <text:p text:style-name="Standard"><text:s text:c="2"/>Tarea de esta corrida:</text:p>
      <text:p text:style-name="Standard"><text:s text:c="2"/>Implementa SOLO Sprint 1 del plan.</text:p>
      <text:p text:style-name="Standard"><text:soft-page-break/></text:p>
      <text:p text:style-name="Standard"><text:s text:c="2"/>Entregables obligatorios en la raiz del repo objetivo:</text:p>
      <text:p text:style-name="Standard"><text:s text:c="2"/>- `AGENTS.md`</text:p>
      <text:p text:style-name="Standard"><text:s text:c="2"/>- `PLANS.md`</text:p>
      <text:p text:style-name="Standard"><text:s text:c="2"/>- `schemas/`</text:p>
      <text:p text:style-name="Standard"><text:s text:c="2"/>- `orchestrator/state_store.py`</text:p>
      <text:p text:style-name="Standard"><text:s text:c="2"/>- `orchestrator/contracts.py`</text:p>
      <text:p text:style-name="Standard"><text:s text:c="2"/>- `runtime/project_state.json`</text:p>
      <text:p text:style-name="Standard"><text:s text:c="2"/>- `runtime/task_queue.json`</text:p>
      <text:p text:style-name="Standard"/>
      <text:p text:style-name="Standard"><text:s text:c="2"/>Restricciones:</text:p>
      <text:p text:style-name="Standard"><text:s text:c="2"/>- no implementar Sprint 2 o posteriores</text:p>
      <text:p text:style-name="Standard"><text:s text:c="2"/>- no trabajar en una carpeta paralela</text:p>
      <text:p text:style-name="Standard"><text:s text:c="2"/>- no dejar los cambios fuera del repo raiz</text:p>
      <text:p text:style-name="Standard"><text:s text:c="2"/>- deja evidencia real de validacion</text:p>
      <text:p text:style-name="Standard"/>
      <text:p text:style-name="Standard"><text:s text:c="2"/>La clave aquí es decirle explícitamente:</text:p>
      <text:p text:style-name="Standard"/>
      <text:p text:style-name="Standard"><text:s text:c="2"/>- cuál es la ruta objetivo,</text:p>
      <text:p text:style-name="Standard"><text:s text:c="2"/>- cuál carpeta es solo referencia,</text:p>
      <text:p text:style-name="Standard"><text:s text:c="2"/>- y qué carpeta no debe tocar.</text:p>
      <text:p text:style-name="Standard"/>
      <text:p text:style-name="Standard"><text:s text:c="2"/>Si quieres, te redacto una versión todavía más dura, tipo “prompt blindado”,</text:p>
      <text:p text:style-name="Standard"><text:s text:c="2"/>para minimizar que vuelva a irse al lugar incorrecto.</text:p>
      <text:p text:style-name="Standard"/>
      <text:p text:style-name="Standard"/>
      <text:p text:style-name="Standard">› si</text:p>
      <text:p text:style-name="Standard"/>
      <text:p text:style-name="Standard"/>
      <text:p text:style-name="Standard">• Usa esta versión blindada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`runtime_orquestador_codex_pack/` es SOLO referencia documental.</text:p>
      <text:p text:style-name="Standard"><text:s text:c="2"/>Lee de ahi:</text:p>
      <text:p text:style-name="Standard"><text:s text:c="2"/>- AGENTS.md</text:p>
      <text:p text:style-name="Standard"><text:s text:c="2"/>- PLANS.md</text:p>
      <text:p text:style-name="Standard"><text:s text:c="2"/>- PROMPT_SPRINT_1.txt</text:p>
      <text:p text:style-name="Standard"/>
      <text:p text:style-name="Standard"><text:soft-page-break/><text:s text:c="2"/>Pero no implementes nada dentro de esa carpeta.</text:p>
      <text:p text:style-name="Standard"/>
      <text:p text:style-name="Standard"><text:s text:c="2"/>REGLA DE INTEGRACION</text:p>
      <text:p text:style-name="Standard"><text:s text:c="2"/>Todos los archivos nuevos y todos los cambios deben quedar en la raiz del repo</text:p>
      <text:p text:style-name="Standard"><text:s text:c="2"/>objetivo o dentro de sus subdirectorios reales de producto.</text:p>
      <text:p text:style-name="Standard"/>
      <text:p text:style-name="Standard"><text:s text:c="2"/>ANTES DE EMPEZAR</text:p>
      <text:p text:style-name="Standard"><text:s text:c="2"/>1. Lee como referencia:</text:p>
      <text:p text:style-name="Standard"><text:s text:c="2"/>- runtime_orquestador_codex_pack/AGENTS.md</text:p>
      <text:p text:style-name="Standard"><text:s text:c="2"/>- runtime_orquestador_codex_pack/PLANS.md</text:p>
      <text:p text:style-name="Standard"><text:s text:c="2"/>- runtime_orquestador_codex_pack/PROMPT_SPRINT_1.txt</text:p>
      <text:p text:style-name="Standard"/>
      <text:p text:style-name="Standard"><text:s text:c="2"/>2. Luego trabaja solo en:</text:p>
      <text:p text:style-name="Standard"><text:s text:c="2"/>- 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OBJETIVO DE ESTA CORRIDA</text:p>
      <text:p text:style-name="Standard"><text:s text:c="2"/>Implementar SOLO Sprint 1.</text:p>
      <text:p text:style-name="Standard"/>
      <text:p text:style-name="Standard"><text:s text:c="2"/>ENTREGABLES OBLIGATORIOS EN EL REPO RAIZ</text:p>
      <text:p text:style-name="Standard"><text:s text:c="2"/>- AGENTS.md</text:p>
      <text:p text:style-name="Standard"><text:s text:c="2"/>- PLANS.md</text:p>
      <text:p text:style-name="Standard"><text:s text:c="2"/>- schemas/task.schema.json</text:p>
      <text:p text:style-name="Standard"><text:s text:c="2"/>- schemas/task_result.schema.json</text:p>
      <text:p text:style-name="Standard"><text:s text:c="2"/>- schemas/project_state.schema.json</text:p>
      <text:p text:style-name="Standard"><text:s text:c="2"/>- orchestrator/state_store.py</text:p>
      <text:p text:style-name="Standard"><text:s text:c="2"/>- orchestrator/contracts.py</text:p>
      <text:p text:style-name="Standard"><text:s text:c="2"/>- runtime/project_state.json</text:p>
      <text:p text:style-name="Standard"><text:s text:c="2"/>- runtime/task_queue.json</text:p>
      <text:p text:style-name="Standard"/>
      <text:p text:style-name="Standard"><text:s text:c="2"/>SI NECESITAS ARCHIVOS DE APOYO MINIMOS</text:p>
      <text:p text:style-name="Standard"><text:s text:c="2"/>Puedes crear solo los minimos coherentes con Sprint 1, por ejemplo:</text:p>
      <text:p text:style-name="Standard"><text:s text:c="2"/>- runtime/task_history.jsonl</text:p>
      <text:p text:style-name="Standard"><text:s text:c="2"/>- runtime/failures.jsonl</text:p>
      <text:p text:style-name="Standard"><text:s text:c="2"/>- runtime/checkpoints/</text:p>
      <text:p text:style-name="Standard"><text:s text:c="2"/>- runtime/artifacts/</text:p>
      <text:p text:style-name="Standard"><text:s text:c="2"/>- runtime/logs/</text:p>
      <text:p text:style-name="Standard"/>
      <text:p text:style-name="Standard"><text:s text:c="2"/>RESTRICCIONES DURAS</text:p>
      <text:p text:style-name="Standard"><text:s text:c="2"/>- no implementar Sprint 2 ni posteriores</text:p>
      <text:p text:style-name="Standard"><text:s text:c="2"/>- no crear planner.py</text:p>
      <text:p text:style-name="Standard"><text:s text:c="2"/>- no crear executor.py</text:p>
      <text:p text:style-name="Standard"><text:s text:c="2"/>- no crear recovery.py</text:p>
      <text:p text:style-name="Standard"><text:s text:c="2"/>- no tocar benchmarks</text:p>
      <text:p text:style-name="Standard"><text:s text:c="2"/>- no trabajar en runtime_orquestador_codex_pack/</text:p>
      <text:p text:style-name="Standard"><text:s text:c="2"/>- no trabajar en workspace/projects/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><text:s text:c="2"/>- project_state.json se puede cargar y guardar</text:p>
      <text:p text:style-name="Standard"><text:s text:c="2"/>- task_queue.json se puede cargar y guardar</text:p>
      <text:p text:style-name="Standard"><text:soft-page-break/><text:s text:c="2"/>- contracts.py valida Task, TaskResult y ProjectState con campos minimos</text:p>
      <text:p text:style-name="Standard"/>
      <text:p text:style-name="Standard"><text:s text:c="2"/>CRITERIO DE ACEPTACION</text:p>
      <text:p text:style-name="Standard"><text:s text:c="2"/>La corrida solo cuenta como correcta si al final esos archivos existen en la</text:p>
      <text:p text:style-name="Standard"><text:s text:c="2"/>raiz del repo objetivo y no dentro del pack de referencia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2</text:p>
      <text:p text:style-name="Standard"/>
      <text:p text:style-name="Standard"><text:s text:c="2"/>Si quieres, cuando lo relances yo te verifico en la siguiente respuesta si por</text:p>
      <text:p text:style-name="Standard"><text:s text:c="2"/>fin aterrizó en la ruta correcta.</text:p>
      <text:p text:style-name="Standard"/>
      <text:p text:style-name="Standard"/>
      <text:p text:style-name="Standard">› ya ya aranco a trabajar donde tu disjiste pero dime por que le dijiste que no</text:p>
      <text:p text:style-name="Standard"><text:s text:c="2"/>hiciera esto <text:s text:c="2"/>RESTRICCIONES DURAS</text:p>
      <text:p text:style-name="Standard"><text:s text:c="4"/>- no implementar Sprint 2 ni posteriores</text:p>
      <text:p text:style-name="Standard"><text:s text:c="4"/>- no crear planner.py</text:p>
      <text:p text:style-name="Standard"><text:s text:c="4"/>- no crear executor.py</text:p>
      <text:p text:style-name="Standard"><text:s text:c="4"/>- no crear recovery.py</text:p>
      <text:p text:style-name="Standard"><text:s text:c="4"/>- no tocar benchmarks</text:p>
      <text:p text:style-name="Standard"><text:s text:c="4"/>- no trabajar en runtime_orquestador_codex_pack/</text:p>
      <text:p text:style-name="Standard"><text:s text:c="4"/>- no trabajar en workspace/projects/</text:p>
      <text:p text:style-name="Standard"><text:s text:c="4"/>- no reportar exito sin evidencia real en disco</text:p>
      <text:p text:style-name="Standard"/>
      <text:p text:style-name="Standard"/>
      <text:p text:style-name="Standard">• Porque tu propio plan dice eso para esta corrida.</text:p>
      <text:p text:style-name="Standard"/>
      <text:p text:style-name="Standard"><text:s text:c="2"/>No se lo puse por capricho. Se lo puse para que no se salga del alcance y no</text:p>
      <text:p text:style-name="Standard"><text:s text:c="2"/>vuelva a hacer una integración desordenada.</text:p>
      <text:p text:style-name="Standard"/>
      <text:p text:style-name="Standard"><text:s text:c="2"/>La lógica es esta:</text:p>
      <text:p text:style-name="Standard"/>
      <text:p text:style-name="Standard"><text:s text:c="2"/>- no implementar Sprint 2 ni posteriores</text:p>
      <text:p text:style-name="Standard"><text:s text:c="4"/>Porque en PROMPT_SPRINT_1.txt tú definiste que esta corrida es solo Sprint</text:p>
      <text:p text:style-name="Standard"><text:s text:c="4"/>1. Si lo dejas avanzar, mezcla planificación, ejecución y recovery antes de</text:p>
      <text:p text:style-name="Standard"><text:s text:c="4"/>tener base persistente firme.</text:p>
      <text:p text:style-name="Standard"><text:s text:c="2"/>- no crear planner.py</text:p>
      <text:p text:style-name="Standard"><text:s text:c="4"/>Porque planner.py es Sprint 2 según PLANS.md. Si lo crea ya, casi seguro lo</text:p>
      <text:p text:style-name="Standard"><text:s text:c="4"/>hará sobre contratos todavía inmaduros.</text:p>
      <text:p text:style-name="Standard"><text:s text:c="2"/>- no crear executor.py</text:p>
      <text:p text:style-name="Standard"><text:s text:c="4"/>Porque eso ya pertenece a ejecución por tarea, no a persistencia mínima. Es</text:p>
      <text:p text:style-name="Standard"><text:s text:c="4"/>Sprint 3.</text:p>
      <text:p text:style-name="Standard"><text:s text:c="2"/>- no crear recovery.py</text:p>
      <text:p text:style-name="Standard"><text:s text:c="4"/>Porque recovery robusto depende de que antes existan contratos, estado</text:p>
      <text:p text:style-name="Standard"><text:s text:c="4"/>persistido y cola estable. Eso está planeado como Sprint 5.</text:p>
      <text:p text:style-name="Standard"><text:s text:c="2"/>- no tocar benchmarks</text:p>
      <text:p text:style-name="Standard"><text:s text:c="4"/>Porque benchmarks sin runtime base listo te generan ruido y falsa sensación</text:p>
      <text:p text:style-name="Standard"><text:s text:c="4"/>de avance.</text:p>
      <text:p text:style-name="Standard"><text:soft-page-break/><text:s text:c="2"/>- no trabajar en runtime_orquestador_codex_pack/</text:p>
      <text:p text:style-name="Standard"><text:s text:c="4"/>Porque ya vimos que se estaba desviando allí. Ese pack es referencia, no</text:p>
      <text:p text:style-name="Standard"><text:s text:c="4"/>destino final.</text:p>
      <text:p text:style-name="Standard"><text:s text:c="2"/>- no trabajar en workspace/projects/</text:p>
      <text:p text:style-name="Standard"><text:s text:c="4"/>Porque eso activa el flujo viejo de sesiones demo/autónomas y no integración</text:p>
      <text:p text:style-name="Standard"><text:s text:c="4"/>real del repo.</text:p>
      <text:p text:style-name="Standard"><text:s text:c="2"/>- no reportar exito sin evidencia real en disco</text:p>
      <text:p text:style-name="Standard"><text:s text:c="4"/>Porque ese es exactamente uno de los problemas que quieres matar: progreso</text:p>
      <text:p text:style-name="Standard"><text:s text:c="4"/>falso.</text:p>
      <text:p text:style-name="Standard"/>
      <text:p text:style-name="Standard"><text:s text:c="2"/>En resumen:</text:p>
      <text:p text:style-name="Standard"><text:s text:c="2"/>se lo restringí para proteger la arquitectura y evitar que vuelva a construir</text:p>
      <text:p text:style-name="Standard"><text:s text:c="2"/>humo antes de tener cimientos.</text:p>
      <text:p text:style-name="Standard"/>
      <text:p text:style-name="Standard"><text:s text:c="2"/>Si en esta corrida le permites hacer planner, executor y recovery, lo más</text:p>
      <text:p text:style-name="Standard"><text:s text:c="2"/>probable es que produzca una base inconsistente y luego tengas que rehacerla.</text:p>
      <text:p text:style-name="Standard"/>
      <text:p text:style-name="Standard"><text:s text:c="2"/>La disciplina correcta aquí es:</text:p>
      <text:p text:style-name="Standard"/>
      <text:p text:style-name="Standard"><text:s text:c="2"/>1. Sprint 1: persistencia + contratos</text:p>
      <text:p text:style-name="Standard"><text:s text:c="2"/>2. Sprint 2: planner + queue</text:p>
      <text:p text:style-name="Standard"><text:s text:c="2"/>3. Sprint 3: executor</text:p>
      <text:p text:style-name="Standard"><text:s text:c="2"/>4. Sprint 4: validator</text:p>
      <text:p text:style-name="Standard"><text:s text:c="2"/>5. Sprint 5: recovery</text:p>
      <text:p text:style-name="Standard"/>
      <text:p text:style-name="Standard"><text:s text:c="2"/>Eso es justamente lo que hace que el proyecto no muera otra vez por</text:p>
      <text:p text:style-name="Standard"><text:s text:c="2"/>improvisación.</text:p>
      <text:p text:style-name="Standard"/>
      <text:p text:style-name="Standard"><text:s text:c="2"/>Si quieres, en la siguiente respuesta te reviso si esta nueva corrida sí</text:p>
      <text:p text:style-name="Standard"><text:s text:c="2"/>respetó bien esas restricciones y si va alineada con Sprint 1.</text:p>
      <text:p text:style-name="Standard"/>
      <text:p text:style-name="Standard"/>
      <text:p text:style-name="Standard">› osea que <text:s text:c="2"/>tenemois que volverele alanzar tro pormt <text:s/>para que finalece todo</text:p>
      <text:p text:style-name="Standard"/>
      <text:p text:style-name="Standard"/>
      <text:p text:style-name="Standard">• No. No hace falta otro prompt para “que finalice todo” ahora mismo.</text:p>
      <text:p text:style-name="Standard"/>
      <text:p text:style-name="Standard"><text:s text:c="2"/>Lo correcto es no pedirle todo de una sola vez.</text:p>
      <text:p text:style-name="Standard"/>
      <text:p text:style-name="Standard"><text:s text:c="2"/>Con este diseño nuevo, lo sano es:</text:p>
      <text:p text:style-name="Standard"/>
      <text:p text:style-name="Standard"><text:s text:c="2"/>- una corrida por Sprint 1</text:p>
      <text:p text:style-name="Standard"><text:s text:c="2"/>- luego otra por Sprint 2</text:p>
      <text:p text:style-name="Standard"><text:s text:c="2"/>- luego otra por Sprint 3</text:p>
      <text:p text:style-name="Standard"><text:s text:c="2"/>- y así sucesivamente</text:p>
      <text:p text:style-name="Standard"/>
      <text:p text:style-name="Standard"><text:s text:c="2"/>Eso no es una debilidad. Es justamente la forma de evitar que el sistema</text:p>
      <text:p text:style-name="Standard"><text:s text:c="2"/>vuelva a romperse por querer hacer arquitectura, ejecución, recovery y</text:p>
      <text:p text:style-name="Standard"><text:s text:c="2"/>benchmarks en una sola tirada.</text:p>
      <text:p text:style-name="Standard"/>
      <text:p text:style-name="Standard"><text:s text:c="2"/>Piensa así:</text:p>
      <text:p text:style-name="Standard"/>
      <text:p text:style-name="Standard"><text:soft-page-break/><text:s text:c="2"/>- antes intentábamos una sesión monolítica</text:p>
      <text:p text:style-name="Standard"><text:s text:c="2"/>- ahora estás construyendo un orquestador serio</text:p>
      <text:p text:style-name="Standard"><text:s text:c="2"/>- un orquestador serio se construye por capas verificables</text:p>
      <text:p text:style-name="Standard"/>
      <text:p text:style-name="Standard"><text:s text:c="2"/>Entonces:</text:p>
      <text:p text:style-name="Standard"/>
      <text:p text:style-name="Standard"><text:s text:c="2"/>- para esta corrida actual: solo debe cerrar bien Sprint 1</text:p>
      <text:p text:style-name="Standard"><text:s text:c="2"/>- cuando termine y verifiquemos: sí, ahí le lanzas el prompt de Sprint 2</text:p>
      <text:p text:style-name="Standard"/>
      <text:p text:style-name="Standard"><text:s text:c="2"/>O sea:</text:p>
      <text:p text:style-name="Standard"/>
      <text:p text:style-name="Standard"><text:s text:c="2"/>- no otro prompt para completar todo ya</text:p>
      <text:p text:style-name="Standard"><text:s text:c="2"/>- sí otro prompt después, pero por sprint</text:p>
      <text:p text:style-name="Standard"/>
      <text:p text:style-name="Standard"><text:s text:c="2"/>Si quieres, cuando esta corrida avance un poco yo te digo en seco si ya va</text:p>
      <text:p text:style-name="Standard"><text:s text:c="2"/>bien encaminada para dejarla terminar o si volvió a desviarse.</text:p>
      <text:p text:style-name="Standard"/>
      <text:p text:style-name="Standard"/>
      <text:p text:style-name="Standard">› ok ya entiendo</text:p>
      <text:p text:style-name="Standard"/>
      <text:p text:style-name="Standard"/>
      <text:p text:style-name="Standard">• Bien. Entonces la regla práctica queda así:</text:p>
      <text:p text:style-name="Standard"/>
      <text:p text:style-name="Standard"><text:s text:c="2"/>- esta corrida solo debe cerrar Sprint 1</text:p>
      <text:p text:style-name="Standard"><text:s text:c="2"/>- yo te vigilo si realmente está escribiendo en la raíz correcta</text:p>
      <text:p text:style-name="Standard"><text:s text:c="2"/>- cuando termine, te digo si quedó aprobado o no</text:p>
      <text:p text:style-name="Standard"><text:s text:c="2"/>- solo después lanzamos Sprint 2</text:p>
      <text:p text:style-name="Standard"/>
      <text:p text:style-name="Standard"><text:s text:c="2"/>Cuando quieras, me das la siguiente señal y reviso el estado real en disco.</text:p>
      <text:p text:style-name="Standard"/>
      <text:p text:style-name="Standard"/>
      <text:p text:style-name="Standard">› osea que nuestra arquitectura <text:s/>real del sistema que estamos disenando va</text:p>
      <text:p text:style-name="Standard"><text:s text:c="2"/>quedar asi similar acomo codex <text:s/>en este cmomento esta <text:s text:c="2"/>reescribiendo toda la</text:p>
      <text:p text:style-name="Standard"><text:s text:c="2"/>arquitectura vieja</text:p>
      <text:p text:style-name="Standard"/>
      <text:p text:style-name="Standard"/>
      <text:p text:style-name="Standard">• Sí, en dirección sí, pero no como borrón y cuenta nueva.</text:p>
      <text:p text:style-name="Standard"/>
      <text:p text:style-name="Standard"><text:s text:c="2"/>La arquitectura objetivo que definiste en PLANS.md cambia el corazón del</text:p>
      <text:p text:style-name="Standard"><text:s text:c="2"/>sistema de esto:</text:p>
      <text:p text:style-name="Standard"/>
      <text:p text:style-name="Standard"><text:s text:c="2"/>- agent_runtime.py monolítico</text:p>
      <text:p text:style-name="Standard"><text:s text:c="2"/>- una sesión larga</text:p>
      <text:p text:style-name="Standard"><text:s text:c="2"/>- heurísticas smoke</text:p>
      <text:p text:style-name="Standard"><text:s text:c="2"/>- retries sobre la misma corrida</text:p>
      <text:p text:style-name="Standard"/>
      <text:p text:style-name="Standard"><text:s text:c="2"/>a esto:</text:p>
      <text:p text:style-name="Standard"/>
      <text:p text:style-name="Standard"><text:s text:c="2"/>- orchestrator/ como control plane</text:p>
      <text:p text:style-name="Standard"><text:s text:c="2"/>- workers/codex_worker.py como worker reemplazable</text:p>
      <text:p text:style-name="Standard"><text:s text:c="2"/>- runtime/*.json como memoria persistente</text:p>
      <text:p text:style-name="Standard"><text:s text:c="2"/>- ejecución por tareas cortas y verificables</text:p>
      <text:p text:style-name="Standard"><text:soft-page-break/></text:p>
      <text:p text:style-name="Standard"><text:s text:c="2"/>O sea: sí, la arquitectura nueva reemplaza la lógica vieja central, pero no</text:p>
      <text:p text:style-name="Standard"><text:s text:c="2"/>significa “romper todo y rehacer todo junto”. Lo correcto es:</text:p>
      <text:p text:style-name="Standard"/>
      <text:p text:style-name="Standard"><text:s text:c="2"/>1. Mantener UI, backend HTTP/socket y bridge visual.</text:p>
      <text:p text:style-name="Standard"><text:s text:c="2"/>2. Meter el nuevo orquestador por debajo.</text:p>
      <text:p text:style-name="Standard"><text:s text:c="2"/>3. Dejar agent_runtime.py como adaptador temporal.</text:p>
      <text:p text:style-name="Standard"><text:s text:c="2"/>4. Ir apagando la lógica vieja por partes.</text:p>
      <text:p text:style-name="Standard"/>
      <text:p text:style-name="Standard"><text:s text:c="2"/>La imagen mental correcta es esta:</text:p>
      <text:p text:style-name="Standard"/>
      <text:p text:style-name="Standard"><text:s text:c="2"/>Frontend / UI</text:p>
      <text:p text:style-name="Standard"><text:s text:c="5"/>↓</text:p>
      <text:p text:style-name="Standard"><text:s text:c="2"/>backend/app.py</text:p>
      <text:p text:style-name="Standard"><text:s text:c="5"/>↓</text:p>
      <text:p text:style-name="Standard"><text:s text:c="2"/>agent_runtime.py <text:s/>-&gt; adaptador/transición</text:p>
      <text:p text:style-name="Standard"><text:s text:c="5"/>↓</text:p>
      <text:p text:style-name="Standard"><text:s text:c="2"/>orchestrator/</text:p>
      <text:p text:style-name="Standard"><text:s text:c="4"/>- planner</text:p>
      <text:p text:style-name="Standard"><text:s text:c="4"/>- task_queue</text:p>
      <text:p text:style-name="Standard"><text:s text:c="4"/>- executor</text:p>
      <text:p text:style-name="Standard"><text:s text:c="4"/>- validator</text:p>
      <text:p text:style-name="Standard"><text:s text:c="4"/>- recovery</text:p>
      <text:p text:style-name="Standard"><text:s text:c="4"/>- state_store</text:p>
      <text:p text:style-name="Standard"><text:s text:c="5"/>↓</text:p>
      <text:p text:style-name="Standard"><text:s text:c="2"/>workers/</text:p>
      <text:p text:style-name="Standard"><text:s text:c="4"/>- codex_worker.py</text:p>
      <text:p text:style-name="Standard"><text:s text:c="5"/>↓</text:p>
      <text:p text:style-name="Standard"><text:s text:c="2"/>runtime/</text:p>
      <text:p text:style-name="Standard"><text:s text:c="4"/>- project_state.json</text:p>
      <text:p text:style-name="Standard"><text:s text:c="4"/>- task_queue.json</text:p>
      <text:p text:style-name="Standard"><text:s text:c="4"/>- history/failures/checkpoints</text:p>
      <text:p text:style-name="Standard"/>
      <text:p text:style-name="Standard"><text:s text:c="2"/>Entonces, sí: estamos rediseñando la arquitectura real del sistema.</text:p>
      <text:p text:style-name="Standard"><text:s text:c="2"/>Pero la forma sana de hacerlo es migración progresiva, no “Codex reescribe</text:p>
      <text:p text:style-name="Standard"><text:s text:c="2"/>toda la arquitectura vieja de un golpe”.</text:p>
      <text:p text:style-name="Standard"/>
      <text:p text:style-name="Standard"><text:s text:c="2"/>La frase corta sería:</text:p>
      <text:p text:style-name="Standard"/>
      <text:p text:style-name="Standard"><text:s text:c="2"/>sí, va a quedar parecida a un orquestador moderno por capas; no, no debe</text:p>
      <text:p text:style-name="Standard"><text:s text:c="2"/>destruir la arquitectura vieja de una sola vez, sino absorberla y reemplazarla</text:p>
      <text:p text:style-name="Standard"><text:s text:c="2"/>gradualmente.</text:p>
      <text:p text:style-name="Standard"/>
      <text:p text:style-name="Standard"><text:s text:c="2"/>Si quieres, en la siguiente te dibujo el plan de migración exacto de</text:p>
      <text:p text:style-name="Standard"><text:s text:c="2"/>agent_runtime.py viejo hacia el nuevo orquestador, archivo por archivo.</text:p>
      <text:p text:style-name="Standard"/>
      <text:p text:style-name="Standard"/>
      <text:p text:style-name="Standard">› si ya entiendo pero creo <text:s/>que en nuestro sistema <text:s/>que daesarrollamos vamos a</text:p>
      <text:p text:style-name="Standard"><text:s text:c="2"/>tener <text:s/>que utilizar la misma tecnica interna <text:s/>con <text:s text:c="2"/>esta misma arquitectura</text:p>
      <text:p text:style-name="Standard"><text:s text:c="2"/>sumandole la pro=cediral de habla basic <text:s text:c="2"/>por que mira codex esta</text:p>
      <text:p text:style-name="Standard"><text:s text:c="2"/>construyendi y eso es un tranajo largo por etapas cosas que nuestro sistem a</text:p>
      <text:p text:style-name="Standard"><text:s text:c="2"/>no fue capas de hacerlo <text:s text:c="2"/>nesecitamos utilizar esto mismo <text:s text:c="2"/>den tro del sista</text:p>
      <text:p text:style-name="Standard"><text:soft-page-break/><text:s text:c="2"/>cuando ya este finalizado - AGENTS.md</text:p>
      <text:p text:style-name="Standard"><text:s text:c="6"/>- PLANS.md</text:p>
      <text:p text:style-name="Standard"><text:s text:c="6"/>- PROMPT_SPRINT_1.txt</text:p>
      <text:p text:style-name="Standard"/>
      <text:p text:style-name="Standard"/>
      <text:p text:style-name="Standard">• Sí. Esa es exactamente la lectura correcta.</text:p>
      <text:p text:style-name="Standard"/>
      <text:p text:style-name="Standard"><text:s text:c="2"/>Lo que estás viendo con Codex no es “magia del modelo”. Es orquestación</text:p>
      <text:p text:style-name="Standard"><text:s text:c="2"/>correcta:</text:p>
      <text:p text:style-name="Standard"/>
      <text:p text:style-name="Standard"><text:s text:c="2"/>- contrato global,</text:p>
      <text:p text:style-name="Standard"><text:s text:c="2"/>- plan por fases,</text:p>
      <text:p text:style-name="Standard"><text:s text:c="2"/>- prompt acotado por sprint,</text:p>
      <text:p text:style-name="Standard"><text:s text:c="2"/>- alcance cerrado,</text:p>
      <text:p text:style-name="Standard"><text:s text:c="2"/>- evidencia en disco.</text:p>
      <text:p text:style-name="Standard"/>
      <text:p text:style-name="Standard"><text:s text:c="2"/>Eso mismo es lo que tu sistema final debe hacer internamente, sumándole HABLA</text:p>
      <text:p text:style-name="Standard"><text:s text:c="2"/>BASIC como capa procedural.</text:p>
      <text:p text:style-name="Standard"/>
      <text:p text:style-name="Standard"><text:s text:c="2"/>La forma correcta de pensarlo es así:</text:p>
      <text:p text:style-name="Standard"/>
      <text:p text:style-name="Standard"><text:s text:c="2"/>- AGENTS.md</text:p>
      <text:p text:style-name="Standard"><text:s text:c="4"/>Es la constitución del repositorio.</text:p>
      <text:p text:style-name="Standard"><text:s text:c="4"/>Define identidad, reglas duras, límites y filosofía de ejecución.</text:p>
      <text:p text:style-name="Standard"><text:s text:c="2"/>- PLANS.md</text:p>
      <text:p text:style-name="Standard"><text:s text:c="4"/>Es el mapa maestro del proyecto.</text:p>
      <text:p text:style-name="Standard"><text:s text:c="4"/>Divide el trabajo en fases y sprints con criterios de aceptación.</text:p>
      <text:p text:style-name="Standard"><text:s text:c="2"/>- PROMPT_SPRINT_1.txt</text:p>
      <text:p text:style-name="Standard"><text:s text:c="4"/>Es la orden operativa de una corrida concreta.</text:p>
      <text:p text:style-name="Standard"><text:s text:c="4"/>No pide “haz todo”; pide “haz este tramo exacto”.</text:p>
      <text:p text:style-name="Standard"/>
      <text:p text:style-name="Standard"><text:s text:c="2"/>Y HABLA BASIC entra como el protocolo interno de razonamiento y validación que</text:p>
      <text:p text:style-name="Standard"><text:s text:c="2"/>acompaña cada tarea.</text:p>
      <text:p text:style-name="Standard"/>
      <text:p text:style-name="Standard"><text:s text:c="2"/>Entonces el sistema final debería funcionar así:</text:p>
      <text:p text:style-name="Standard"/>
      <text:p text:style-name="Standard"><text:s text:c="2"/>AGENTS.md</text:p>
      <text:p text:style-name="Standard"><text:s text:c="2"/>+ PLANS.md</text:p>
      <text:p text:style-name="Standard"><text:s text:c="2"/>+ estado persistente del runtime</text:p>
      <text:p text:style-name="Standard"><text:s text:c="2"/>+ checkpoint actual</text:p>
      <text:p text:style-name="Standard"><text:s text:c="2"/>+ HABLA BASIC</text:p>
      <text:p text:style-name="Standard"><text:s text:c="2"/>= prompt operativo de la tarea actual</text:p>
      <text:p text:style-name="Standard"/>
      <text:p text:style-name="Standard"><text:s text:c="2"/>O sea:</text:p>
      <text:p text:style-name="Standard"/>
      <text:p text:style-name="Standard"><text:s text:c="2"/>- el sistema no improvisa,</text:p>
      <text:p text:style-name="Standard"><text:s text:c="2"/>- no depende de una sesión larga,</text:p>
      <text:p text:style-name="Standard"><text:s text:c="2"/>- no deja que el worker decida todo solo,</text:p>
      <text:p text:style-name="Standard"><text:s text:c="2"/>- y no le da un prompt gigante ambiguo.</text:p>
      <text:p text:style-name="Standard"/>
      <text:p text:style-name="Standard"><text:s text:c="2"/>La conclusión importante es esta:</text:p>
      <text:p text:style-name="Standard"/>
      <text:p text:style-name="Standard"><text:soft-page-break/><text:s text:c="2"/>sí, debemos usar esta misma técnica dentro del sistema terminado.</text:p>
      <text:p text:style-name="Standard"><text:s text:c="2"/>No copiar “Codex” como producto, sino copiar el patrón de control:</text:p>
      <text:p text:style-name="Standard"/>
      <text:p text:style-name="Standard"><text:s text:c="2"/>- contrato,</text:p>
      <text:p text:style-name="Standard"><text:s text:c="2"/>- plan,</text:p>
      <text:p text:style-name="Standard"><text:s text:c="2"/>- tarea acotada,</text:p>
      <text:p text:style-name="Standard"><text:s text:c="2"/>- validación,</text:p>
      <text:p text:style-name="Standard"><text:s text:c="2"/>- checkpoint,</text:p>
      <text:p text:style-name="Standard"><text:s text:c="2"/>- siguiente tarea.</text:p>
      <text:p text:style-name="Standard"/>
      <text:p text:style-name="Standard"><text:s text:c="2"/>Mi recomendación fuerte:</text:p>
      <text:p text:style-name="Standard"/>
      <text:p text:style-name="Standard"><text:s text:c="2"/>- deja AGENTS.md como política fija,</text:p>
      <text:p text:style-name="Standard"><text:s text:c="2"/>- deja PLANS.md como roadmap humano y de máquina,</text:p>
      <text:p text:style-name="Standard"><text:s text:c="2"/>- reemplaza PROMPT_SPRINT_1.txt por prompts generados por el runtime para cada</text:p>
      <text:p text:style-name="Standard"><text:s text:c="4"/>tarea,</text:p>
      <text:p text:style-name="Standard"><text:s text:c="2"/>- y mete HABLA BASIC dentro de ese generador.</text:p>
      <text:p text:style-name="Standard"/>
      <text:p text:style-name="Standard"><text:s text:c="2"/>La versión madura del sistema sería:</text:p>
      <text:p text:style-name="Standard"/>
      <text:p text:style-name="Standard"><text:s text:c="2"/>- humano define o ajusta AGENTS.md y PLANS.md</text:p>
      <text:p text:style-name="Standard"><text:s text:c="2"/>- runtime crea tareas</text:p>
      <text:p text:style-name="Standard"><text:s text:c="2"/>- runtime genera prompt por tarea</text:p>
      <text:p text:style-name="Standard"><text:s text:c="2"/>- worker ejecuta</text:p>
      <text:p text:style-name="Standard"><text:s text:c="2"/>- validator verifica</text:p>
      <text:p text:style-name="Standard"><text:s text:c="2"/>- state_store guarda</text:p>
      <text:p text:style-name="Standard"><text:s text:c="2"/>- recovery corrige</text:p>
      <text:p text:style-name="Standard"><text:s text:c="2"/>- siguiente tarea</text:p>
      <text:p text:style-name="Standard"/>
      <text:p text:style-name="Standard"><text:s text:c="2"/>Eso sí escala a trabajo largo.</text:p>
      <text:p text:style-name="Standard"/>
      <text:p text:style-name="Standard"><text:s text:c="2"/>Si quieres, en la siguiente te diseño la arquitectura exacta de cómo</text:p>
      <text:p text:style-name="Standard"><text:s text:c="2"/>AGENTS.md, PLANS.md y HABLA BASIC se convierten en entradas internas</text:p>
      <text:p text:style-name="Standard"><text:s text:c="2"/>permanentes del orquestador.</text:p>
      <text:p text:style-name="Standard"/>
      <text:p text:style-name="Standard"/>
      <text:p text:style-name="Standard">› si ok <text:s/>tu vas <text:s text:c="2"/>ha hacer esa integracion cuando el otro agente <text:s/>deje todo el</text:p>
      <text:p text:style-name="Standard"><text:s text:c="2"/>harness listo ok esperemos</text:p>
      <text:p text:style-name="Standard"/>
      <text:p text:style-name="Standard"/>
      <text:p text:style-name="Standard">• Sí.</text:p>
      <text:p text:style-name="Standard"/>
      <text:p text:style-name="Standard"><text:s text:c="2"/>Cuando el otro agente deje listo el harness base, yo hago la siguiente capa de</text:p>
      <text:p text:style-name="Standard"><text:s text:c="2"/>integración:</text:p>
      <text:p text:style-name="Standard"/>
      <text:p text:style-name="Standard"><text:s text:c="2"/>- conectar AGENTS.md como política permanente,</text:p>
      <text:p text:style-name="Standard"><text:s text:c="2"/>- conectar PLANS.md como plan maestro consumible,</text:p>
      <text:p text:style-name="Standard"><text:s text:c="2"/>- meter HABLA BASIC en la generación procedural de tareas,</text:p>
      <text:p text:style-name="Standard"><text:s text:c="2"/>- y revisar que el runtime nuevo no recaiga en el modelo viejo de sesión</text:p>
      <text:p text:style-name="Standard"><text:s text:c="4"/>monolítica.</text:p>
      <text:p text:style-name="Standard"/>
      <text:p text:style-name="Standard"><text:s text:c="2"/>Por ahora lo correcto es esperar a que cierre bien Sprint 1. Cuando me digas,</text:p>
      <text:p text:style-name="Standard"><text:soft-page-break/><text:s text:c="2"/>reviso otra vez el estado real y te digo si ya quedó listo para esa siguiente</text:p>
      <text:p text:style-name="Standard"><text:s text:c="2"/>integración.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verificar si realmente cerró Sprint 1 en la raíz correcta y si dejó</text:p>
      <text:p text:style-name="Standard"><text:s text:c="2"/>evidencia funcional, no solo archivos creados.</text:p>
      <text:p text:style-name="Standard"/>
      <text:p text:style-name="Standard">• Ya están los entregables base en la raíz. Voy a revisar ahora si</text:p>
      <text:p text:style-name="Standard"><text:s text:c="2"/>state_store.py y contracts.py de verdad funcionan y si el agente se mantuvo</text:p>
      <text:p text:style-name="Standard"><text:s text:c="2"/>dentro del alcance de Sprint 1.</text:p>
      <text:p text:style-name="Standard"/>
      <text:p text:style-name="Standard">• Los archivos se ven coherentes a simple vista. Voy a hacer una validación</text:p>
      <text:p text:style-name="Standard"><text:s text:c="2"/>técnica real: importar módulos, probar lectura/escritura en un runtime</text:p>
      <text:p text:style-name="Standard"><text:s text:c="2"/>temporal y verificar contratos mínimos.</text:p>
      <text:p text:style-name="Standard"/>
      <text:p text:style-name="Standard">• La validación base pasó y no se salió al Sprint 2. Hago una última pasada</text:p>
      <text:p text:style-name="Standard"><text:s text:c="2"/>rápida por los schemas y por el alcance real tocado, para cerrar con un</text:p>
      <text:p text:style-name="Standard"><text:s text:c="2"/>veredicto firme.</text:p>
      <text:p text:style-name="Standard"/>
      <text:p text:style-name="Standard">• Sí. A esta revisión del 12 de mayo de 2026, Sprint 1 quedó terminado y</text:p>
      <text:p text:style-name="Standard"><text:s text:c="2"/>aprobado en la raíz correcta del repo.</text:p>
      <text:p text:style-name="Standard"/>
      <text:p text:style-name="Standard"><text:s text:c="2"/>Quedó en:</text:p>
      <text:p text:style-name="Standard"/>
      <text:p text:style-name="Standard"><text:s text:c="2"/>- AGENTS.md</text:p>
      <text:p text:style-name="Standard"><text:s text:c="2"/>- PLANS.md</text:p>
      <text:p text:style-name="Standard"><text:s text:c="2"/>- orchestrator/state_store.py</text:p>
      <text:p text:style-name="Standard"><text:s text:c="2"/>- orchestrator/contracts.py</text:p>
      <text:p text:style-name="Standard"><text:s text:c="2"/>- schemas/task.schema.json</text:p>
      <text:p text:style-name="Standard"><text:s text:c="2"/>- schemas/task_result.schema.json</text:p>
      <text:p text:style-name="Standard"><text:s text:c="2"/>- schemas/project_state.schema.json</text:p>
      <text:p text:style-name="Standard"><text:s text:c="2"/>- runtime/project_state.json</text:p>
      <text:p text:style-name="Standard"><text:s text:c="2"/>- runtime/task_queue.json</text:p>
      <text:p text:style-name="Standard"/>
      <text:p text:style-name="Standard"><text:s text:c="2"/>También dejó lo mínimo coherente de soporte:</text:p>
      <text:p text:style-name="Standard"/>
      <text:p text:style-name="Standard"><text:s text:c="2"/>- runtime/task_history.jsonl</text:p>
      <text:p text:style-name="Standard"><text:s text:c="2"/>- runtime/failures.jsonl</text:p>
      <text:p text:style-name="Standard"/>
      <text:p text:style-name="Standard"><text:s text:c="2"/>Validación real que hice:</text:p>
      <text:p text:style-name="Standard"/>
      <text:p text:style-name="Standard"><text:s text:c="2"/>- py_compile de state_store.py y contracts.py: pasó</text:p>
      <text:p text:style-name="Standard"><text:s text:c="2"/>- prueba funcional en runtime temporal: cargar/guardar project_state.json,</text:p>
      <text:p text:style-name="Standard"><text:s text:c="4"/>task_queue.json, checkpoints, history y failures: pasó</text:p>
      <text:p text:style-name="Standard"><text:s text:c="2"/>- validación de contratos Task, TaskResult y ProjectState: pasó</text:p>
      <text:p text:style-name="Standard"><text:s text:c="2"/>- no se metió en Sprint 2: no existen planner.py, executor.py, recovery.py</text:p>
      <text:p text:style-name="Standard"/>
      <text:p text:style-name="Standard"><text:s text:c="2"/>Mi veredicto:</text:p>
      <text:p text:style-name="Standard"/>
      <text:p text:style-name="Standard"><text:soft-page-break/><text:s text:c="2"/>- sí terminó bien Sprint 1</text:p>
      <text:p text:style-name="Standard"><text:s text:c="2"/>- sí quedó en la raíz correcta</text:p>
      <text:p text:style-name="Standard"><text:s text:c="2"/>- sí respetó el alcance</text:p>
      <text:p text:style-name="Standard"/>
      <text:p text:style-name="Standard"><text:s text:c="2"/>Única reserva técnica: todavía es base persistente aislada; aún no está</text:p>
      <text:p text:style-name="Standard"><text:s text:c="2"/>integrada con agent_runtime.py. Eso está bien, porque esa integración ya</text:p>
      <text:p text:style-name="Standard"><text:s text:c="2"/>pertenece al siguiente tramo.</text:p>
      <text:p text:style-name="Standard"/>
      <text:p text:style-name="Standard"><text:s text:c="2"/>Cuando quieras, el siguiente paso es lanzar el prompt de Sprint 2 y yo te lo</text:p>
      <text:p text:style-name="Standard"><text:s text:c="2"/>vuelvo a auditar.</text:p>
      <text:p text:style-name="Standard"/>
      <text:p text:style-name="Standard"/>
      <text:p text:style-name="Standard">› si dame el promt para <text:s/>el 2</text:p>
      <text:p text:style-name="Standard"/>
      <text:p text:style-name="Standard"/>
      <text:p text:style-name="Standard">• Usa este prompt para Sprint 2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Implementar SOLO Sprint 2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planner.py</text:p>
      <text:p text:style-name="Standard"><text:s text:c="2"/>- orchestrator/task_queue.py</text:p>
      <text:p text:style-name="Standard"/>
      <text:p text:style-name="Standard"><text:s text:c="2"/>Puedes hacer ajustes minimos en archivos de Sprint 1 solo si son estrictamente</text:p>
      <text:p text:style-name="Standard"><text:s text:c="2"/>necesarios para consistencia, pero no avances Sprint 3 o posteriores.</text:p>
      <text:p text:style-name="Standard"/>
      <text:p text:style-name="Standard"><text:s text:c="2"/>OBJETIVO FUNCIONAL DE SPRINT 2</text:p>
      <text:p text:style-name="Standard"><text:s text:c="2"/>Pasar de persistencia base a planificacion y cola inicial.</text:p>
      <text:p text:style-name="Standard"/>
      <text:p text:style-name="Standard"><text:s text:c="2"/>REQUISITOS FUNCIONALES</text:p>
      <text:p text:style-name="Standard"/>
      <text:p text:style-name="Standard"><text:soft-page-break/><text:s text:c="2"/>1. `orchestrator/planner.py` debe poder:</text:p>
      <text:p text:style-name="Standard"><text:s text:c="2"/>- recibir un objetivo o prompt grande del proyecto</text:p>
      <text:p text:style-name="Standard"><text:s text:c="2"/>- producir una lista de tareas pequenas y coherentes</text:p>
      <text:p text:style-name="Standard"><text:s text:c="2"/>- asignar a cada tarea:</text:p>
      <text:p text:style-name="Standard"><text:s text:c="4"/>- id</text:p>
      <text:p text:style-name="Standard"><text:s text:c="4"/>- title</text:p>
      <text:p text:style-name="Standard"><text:s text:c="4"/>- goal</text:p>
      <text:p text:style-name="Standard"><text:s text:c="4"/>- status</text:p>
      <text:p text:style-name="Standard"><text:s text:c="4"/>- priority</text:p>
      <text:p text:style-name="Standard"><text:s text:c="4"/>- dependencies</text:p>
      <text:p text:style-name="Standard"><text:s text:c="4"/>- expected_files</text:p>
      <text:p text:style-name="Standard"><text:s text:c="4"/>- validation_commands</text:p>
      <text:p text:style-name="Standard"><text:s text:c="4"/>- timeout_seconds</text:p>
      <text:p text:style-name="Standard"><text:s text:c="4"/>- max_retries</text:p>
      <text:p text:style-name="Standard"><text:s text:c="4"/>- mode</text:p>
      <text:p text:style-name="Standard"><text:s text:c="4"/>- checkpoint_key</text:p>
      <text:p text:style-name="Standard"><text:s text:c="2"/>- usar los contratos existentes de Sprint 1</text:p>
      <text:p text:style-name="Standard"><text:s text:c="2"/>- producir tareas compatibles con `schemas/` y `orchestrator/contracts.py`</text:p>
      <text:p text:style-name="Standard"/>
      <text:p text:style-name="Standard"><text:s text:c="2"/>2. `orchestrator/task_queue.py` debe poder:</text:p>
      <text:p text:style-name="Standard"><text:s text:c="2"/>- cargar cola desde `runtime/task_queue.json` usando `state_store.py`</text:p>
      <text:p text:style-name="Standard"><text:s text:c="2"/>- guardar cola en `runtime/task_queue.json`</text:p>
      <text:p text:style-name="Standard"><text:s text:c="2"/>- ordenar tareas por dependencias y prioridad</text:p>
      <text:p text:style-name="Standard"><text:s text:c="2"/>- detectar tareas bloqueadas por dependencias no cumplidas</text:p>
      <text:p text:style-name="Standard"><text:s text:c="2"/>- seleccionar la siguiente tarea ejecutable</text:p>
      <text:p text:style-name="Standard"><text:s text:c="2"/>- exponer operaciones simples y claras para:</text:p>
      <text:p text:style-name="Standard"><text:s text:c="4"/>- enqueue</text:p>
      <text:p text:style-name="Standard"><text:s text:c="4"/>- enqueue_many</text:p>
      <text:p text:style-name="Standard"><text:s text:c="4"/>- list</text:p>
      <text:p text:style-name="Standard"><text:s text:c="4"/>- next_ready_task</text:p>
      <text:p text:style-name="Standard"><text:s text:c="4"/>- mark_task_status</text:p>
      <text:p text:style-name="Standard"><text:s text:c="4"/>- validate_queue</text:p>
      <text:p text:style-name="Standard"/>
      <text:p text:style-name="Standard"><text:s text:c="2"/>3. La cola debe respetar estas reglas:</text:p>
      <text:p text:style-name="Standard"><text:s text:c="2"/>- una tarea no puede ejecutarse si sus dependencias no estan completadas</text:p>
      <text:p text:style-name="Standard"><text:s text:c="2"/>- si varias tareas estan listas, gana la prioridad mas alta</text:p>
      <text:p text:style-name="Standard"><text:s text:c="2"/>- si empatan en prioridad, mantener orden estable y predecible</text:p>
      <text:p text:style-name="Standard"><text:s text:c="2"/>- no inventar progreso sin evidencia real</text:p>
      <text:p text:style-name="Standard"/>
      <text:p text:style-name="Standard"><text:s text:c="2"/>4. El planner debe ser pragmatico:</text:p>
      <text:p text:style-name="Standard"><text:s text:c="2"/>- no intentes inteligencia total</text:p>
      <text:p text:style-name="Standard"><text:s text:c="2"/>- crea una planificacion inicial razonable y verificable</text:p>
      <text:p text:style-name="Standard"><text:s text:c="2"/>- deja la base lista para que Sprint 3 pueda ejecutar una tarea por proceso</text:p>
      <text:p text:style-name="Standard"/>
      <text:p text:style-name="Standard"><text:s text:c="2"/>ENTREGABLES OBLIGATORIOS</text:p>
      <text:p text:style-name="Standard"><text:s text:c="2"/>- orchestrator/planner.py</text:p>
      <text:p text:style-name="Standard"><text:s text:c="2"/>- orchestrator/task_queue.py</text:p>
      <text:p text:style-name="Standard"/>
      <text:p text:style-name="Standard"><text:s text:c="2"/>SI NECESITAS APOYO MINIMO</text:p>
      <text:p text:style-name="Standard"><text:s text:c="2"/>Puedes agregar stubs pequenos y seguros solo si son inevitables para dejar</text:p>
      <text:p text:style-name="Standard"><text:s text:c="2"/>Sprint 2 coherente, pero no implementes todavia:</text:p>
      <text:p text:style-name="Standard"><text:s text:c="2"/>- executor.py</text:p>
      <text:p text:style-name="Standard"><text:soft-page-break/><text:s text:c="2"/>- validator.py</text:p>
      <text:p text:style-name="Standard"><text:s text:c="2"/>- recovery.py</text:p>
      <text:p text:style-name="Standard"><text:s text:c="2"/>- benchmark.py</text:p>
      <text:p text:style-name="Standard"><text:s text:c="2"/>- workers/codex_worker.py</text:p>
      <text:p text:style-name="Standard"/>
      <text:p text:style-name="Standard"><text:s text:c="2"/>RESTRICCIONES DURAS</text:p>
      <text:p text:style-name="Standard"><text:s text:c="2"/>- no implementar Sprint 3 ni posteriores</text:p>
      <text:p text:style-name="Standard"><text:s text:c="2"/>- no crear executor.py</text:p>
      <text:p text:style-name="Standard"><text:s text:c="2"/>- no crear validator.py</text:p>
      <text:p text:style-name="Standard"><text:s text:c="2"/>- no crear recovery.py</text:p>
      <text:p text:style-name="Standard"><text:s text:c="2"/>- no crear benchmark.py</text:p>
      <text:p text:style-name="Standard"><text:s text:c="2"/>- no crear workers/codex_worker.py</text:p>
      <text:p text:style-name="Standard"><text:s text:c="2"/>- no tocar agent_runtime.py salvo ajuste minimo inevitable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2 queda correcto si:</text:p>
      <text:p text:style-name="Standard"><text:s text:c="2"/>- existe `orchestrator/planner.py`</text:p>
      <text:p text:style-name="Standard"><text:s text:c="2"/>- existe `orchestrator/task_queue.py`</text:p>
      <text:p text:style-name="Standard"><text:s text:c="2"/>- el planner genera tareas compatibles con los contratos</text:p>
      <text:p text:style-name="Standard"><text:s text:c="2"/>- la cola soporta prioridad</text:p>
      <text:p text:style-name="Standard"><text:s text:c="2"/>- la cola soporta dependencias tipo DAG</text:p>
      <text:p text:style-name="Standard"><text:s text:c="2"/>- la siguiente tarea ejecutable se calcula correctamente</text:p>
      <text:p text:style-name="Standard"><text:s text:c="2"/>- la cola puede cargarse y guardarse con `state_store.py`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><text:s text:c="2"/>- el planner genera al menos un conjunto valido de tareas</text:p>
      <text:p text:style-name="Standard"><text:s text:c="2"/>- `task_queue.py` ordena correctamente por prioridad y dependencias</text:p>
      <text:p text:style-name="Standard"><text:s text:c="2"/>- una tarea dependiente no sale como ejecutable si su dependencia no esta</text:p>
      <text:p text:style-name="Standard"><text:s text:c="2"/>completada</text:p>
      <text:p text:style-name="Standard"><text:s text:c="2"/>- la cola se puede persistir y recargar desde `runtime/task_queue.json`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3</text:p>
      <text:p text:style-name="Standard"/>
      <text:p text:style-name="Standard"><text:s text:c="2"/>Cuando lo lances, yo te reviso si quedó bien acotado a Sprint 2.</text:p>
      <text:p text:style-name="Standard"/>
      <text:p text:style-name="Standard"/>
      <text:p text:style-name="Standard">› perfecto <text:s/>oye <text:s/>quiero saber algo <text:s/>mi ra yo <text:s/>me vaso mucho sobre la logica de</text:p>
      <text:p text:style-name="Standard"><text:s text:c="2"/>lo que veo <text:s/>y practicamente <text:s/>estamos haciendo casi un scenario d elo que</text:p>
      <text:p text:style-name="Standard"><text:s text:c="2"/>deberia <text:s/>hacer el sistema que estamos construyendo asi mismo como estamos</text:p>
      <text:p text:style-name="Standard"><text:s text:c="2"/>haciendo <text:s/>y pienzo que creo <text:s/>que vamos a nesecitar en el orquestador un</text:p>
      <text:p text:style-name="Standard"><text:s text:c="2"/>agenytte mas <text:s/>que se dedique solo a esto mismo <text:s/>que tu me acabaste de hacer</text:p>
      <text:p text:style-name="Standard"><text:s text:c="2"/>un promt <text:s text:c="2"/>creo que vamos a nesecitar que un agente entre en accion y</text:p>
      <text:p text:style-name="Standard"><text:s text:c="2"/>fabrique el promt <text:s/>cada ves <text:s/>que se pasa a otra <text:s/>tarea <text:s/>o sprint <text:s/>crees que</text:p>
      <text:p text:style-name="Standard"><text:soft-page-break/><text:s text:c="2"/>eme equivoco</text:p>
      <text:p text:style-name="Standard"/>
      <text:p text:style-name="Standard"/>
      <text:p text:style-name="Standard">• No te equivocas.</text:p>
      <text:p text:style-name="Standard"/>
      <text:p text:style-name="Standard"><text:s text:c="2"/>De hecho, eso que acabas de decir probablemente sí debe existir como</text:p>
      <text:p text:style-name="Standard"><text:s text:c="2"/>componente formal del sistema.</text:p>
      <text:p text:style-name="Standard"/>
      <text:p text:style-name="Standard"><text:s text:c="2"/>Lo que estás describiendo no es “otro agente cualquiera”. Es un rol muy</text:p>
      <text:p text:style-name="Standard"><text:s text:c="2"/>específico:</text:p>
      <text:p text:style-name="Standard"><text:s text:c="2"/>un generador de directivas operativas para el siguiente tramo de trabajo.</text:p>
      <text:p text:style-name="Standard"/>
      <text:p text:style-name="Standard"><text:s text:c="2"/>Ahora mismo yo hice eso manualmente:</text:p>
      <text:p text:style-name="Standard"/>
      <text:p text:style-name="Standard"><text:s text:c="2"/>- leí el plan,</text:p>
      <text:p text:style-name="Standard"><text:s text:c="2"/>- entendí el sprint,</text:p>
      <text:p text:style-name="Standard"><text:s text:c="2"/>- cerré el alcance,</text:p>
      <text:p text:style-name="Standard"><text:s text:c="2"/>- fijé restricciones,</text:p>
      <text:p text:style-name="Standard"><text:s text:c="2"/>- fijé ruta,</text:p>
      <text:p text:style-name="Standard"><text:s text:c="2"/>- fijé entregables,</text:p>
      <text:p text:style-name="Standard"><text:s text:c="2"/>- fijé validación,</text:p>
      <text:p text:style-name="Standard"><text:s text:c="2"/>- y lo convertí en un prompt ejecutable.</text:p>
      <text:p text:style-name="Standard"/>
      <text:p text:style-name="Standard"><text:s text:c="2"/>Eso, en el sistema final, no debería depender de una persona mirando todo cada</text:p>
      <text:p text:style-name="Standard"><text:s text:c="2"/>vez.</text:p>
      <text:p text:style-name="Standard"/>
      <text:p text:style-name="Standard"><text:s text:c="2"/>Entonces sí: vas a necesitar un módulo o agente tipo:</text:p>
      <text:p text:style-name="Standard"/>
      <text:p text:style-name="Standard"><text:s text:c="2"/>- prompt_builder</text:p>
      <text:p text:style-name="Standard"><text:s text:c="2"/>- task_briefing_agent</text:p>
      <text:p text:style-name="Standard"><text:s text:c="2"/>- o mejor: directive_generator</text:p>
      <text:p text:style-name="Standard"/>
      <text:p text:style-name="Standard"><text:s text:c="2"/>Su trabajo sería:</text:p>
      <text:p text:style-name="Standard"/>
      <text:p text:style-name="Standard"><text:s text:c="2"/>1. leer AGENTS.md</text:p>
      <text:p text:style-name="Standard"><text:s text:c="2"/>2. leer PLANS.md</text:p>
      <text:p text:style-name="Standard"><text:s text:c="2"/>3. leer el estado persistido del runtime</text:p>
      <text:p text:style-name="Standard"><text:s text:c="2"/>4. detectar el sprint o tarea actual</text:p>
      <text:p text:style-name="Standard"><text:s text:c="2"/>5. construir la instrucción operativa exacta para el worker</text:p>
      <text:p text:style-name="Standard"><text:s text:c="2"/>6. incluir restricciones, ruta, entregables y validación</text:p>
      <text:p text:style-name="Standard"><text:s text:c="2"/>7. devolver un prompt corto, acotado y ejecutable</text:p>
      <text:p text:style-name="Standard"/>
      <text:p text:style-name="Standard"><text:s text:c="2"/>O sea, no mandar al worker “piensa qué hacer”, sino:</text:p>
      <text:p text:style-name="Standard"><text:s text:c="2"/>“aquí está la orden correcta para este paso exacto”</text:p>
      <text:p text:style-name="Standard"/>
      <text:p text:style-name="Standard"><text:s text:c="2"/>Eso es clave porque reduce:</text:p>
      <text:p text:style-name="Standard"/>
      <text:p text:style-name="Standard"><text:s text:c="2"/>- deriva de contexto,</text:p>
      <text:p text:style-name="Standard"><text:s text:c="2"/>- ejecución fuera de alcance,</text:p>
      <text:p text:style-name="Standard"><text:s text:c="2"/>- mezcla de sprints,</text:p>
      <text:p text:style-name="Standard"><text:s text:c="2"/>- progreso falso,</text:p>
      <text:p text:style-name="Standard"><text:s text:c="2"/>- y sesiones largas ambiguas.</text:p>
      <text:p text:style-name="Standard"><text:soft-page-break/></text:p>
      <text:p text:style-name="Standard"><text:s text:c="2"/>La arquitectura entonces empieza a verse así:</text:p>
      <text:p text:style-name="Standard"/>
      <text:p text:style-name="Standard"><text:s text:c="2"/>- planner</text:p>
      <text:p text:style-name="Standard"><text:s text:c="4"/>decide qué tareas existen</text:p>
      <text:p text:style-name="Standard"><text:s text:c="2"/>- task_queue</text:p>
      <text:p text:style-name="Standard"><text:s text:c="4"/>decide cuál sigue</text:p>
      <text:p text:style-name="Standard"><text:s text:c="2"/>- directive_generator</text:p>
      <text:p text:style-name="Standard"><text:s text:c="4"/>redacta la orden exacta para esa tarea</text:p>
      <text:p text:style-name="Standard"><text:s text:c="2"/>- codex_worker</text:p>
      <text:p text:style-name="Standard"><text:s text:c="4"/>ejecuta esa orden</text:p>
      <text:p text:style-name="Standard"><text:s text:c="2"/>- validator</text:p>
      <text:p text:style-name="Standard"><text:s text:c="4"/>verifica si quedó bien</text:p>
      <text:p text:style-name="Standard"><text:s text:c="2"/>- recovery</text:p>
      <text:p text:style-name="Standard"><text:s text:c="4"/>decide qué hacer si falló</text:p>
      <text:p text:style-name="Standard"/>
      <text:p text:style-name="Standard"><text:s text:c="2"/>Eso encaja perfecto con HABLA BASIC, porque HABLA puede alimentar justo al</text:p>
      <text:p text:style-name="Standard"><text:s text:c="2"/>directive_generator.</text:p>
      <text:p text:style-name="Standard"/>
      <text:p text:style-name="Standard"><text:s text:c="2"/>La mezcla correcta sería:</text:p>
      <text:p text:style-name="Standard"/>
      <text:p text:style-name="Standard"><text:s text:c="2"/>- AGENTS.md = política fija</text:p>
      <text:p text:style-name="Standard"><text:s text:c="2"/>- PLANS.md = roadmap</text:p>
      <text:p text:style-name="Standard"><text:s text:c="2"/>- ProjectState + TaskQueue = estado actual</text:p>
      <text:p text:style-name="Standard"><text:s text:c="2"/>- HABLA BASIC = disciplina procedural</text:p>
      <text:p text:style-name="Standard"><text:s text:c="2"/>- directive_generator = prompt final para el worker</text:p>
      <text:p text:style-name="Standard"/>
      <text:p text:style-name="Standard"><text:s text:c="2"/>Mi respuesta corta es:</text:p>
      <text:p text:style-name="Standard"><text:s text:c="2"/>no solo no te equivocas; probablemente acabas de identificar una pieza central</text:p>
      <text:p text:style-name="Standard"><text:s text:c="2"/>del orquestador.</text:p>
      <text:p text:style-name="Standard"/>
      <text:p text:style-name="Standard"><text:s text:c="2"/>Yo solo haría una precisión:</text:p>
      <text:p text:style-name="Standard"/>
      <text:p text:style-name="Standard"><text:s text:c="2"/>- no lo llamaría “otro agente” si eso confunde</text:p>
      <text:p text:style-name="Standard"><text:s text:c="2"/>- lo llamaría mejor componente de generación de directivas</text:p>
      <text:p text:style-name="Standard"><text:s text:c="2"/>- puede usar un agente/modelo por debajo, sí</text:p>
      <text:p text:style-name="Standard"><text:s text:c="2"/>- pero arquitectónicamente debe verse como parte del control plane, no como un</text:p>
      <text:p text:style-name="Standard"><text:s text:c="4"/>worker libre</text:p>
      <text:p text:style-name="Standard"/>
      <text:p text:style-name="Standard"><text:s text:c="2"/>Si quieres, después de Sprint 2 te propongo cómo meter esa pieza en el plan</text:p>
      <text:p text:style-name="Standard"><text:s text:c="2"/>sin desordenar los sprints actuales.</text:p>
      <text:p text:style-name="Standard"/>
      <text:p text:style-name="Standard"/>
      <text:p text:style-name="Standard">› perfecto deja y planeamos <text:s/>loque tu vas <text:s/>a hacer por que arriva tambien</text:p>
      <text:p text:style-name="Standard"><text:s text:c="2"/>definimos mas trabajao <text:s text:c="3"/>que debes de hacer <text:s/>recuerdas que definimos esto</text:p>
      <text:p text:style-name="Standard"><text:s text:c="2"/>tambien <text:s/>ahora le sumamos lo que acabamos de <text:s/>investigar</text:p>
      <text:p text:style-name="Standard"><text:s text:c="2"/>› si ya entiendo pero creo <text:s/>que en nuestro sistema <text:s/>que daesarrollamos vamos</text:p>
      <text:p text:style-name="Standard"><text:s text:c="2"/>a</text:p>
      <text:p text:style-name="Standard"><text:s text:c="4"/>tener <text:s/>que utilizar la misma tecnica interna <text:s/>con <text:s text:c="2"/>esta misma arquitectura</text:p>
      <text:p text:style-name="Standard"><text:s text:c="4"/>sumandole la pro=cediral de habla basic <text:s text:c="2"/>por que mira codex esta</text:p>
      <text:p text:style-name="Standard"><text:s text:c="4"/>construyendi y eso es un tranajo largo por etapas cosas que nuestro sistem</text:p>
      <text:p text:style-name="Standard"><text:s text:c="2"/>a</text:p>
      <text:p text:style-name="Standard"><text:soft-page-break/><text:s text:c="4"/>no fue capas de hacerlo <text:s text:c="2"/>nesecitamos utilizar esto mismo <text:s text:c="2"/>den tro del</text:p>
      <text:p text:style-name="Standard"><text:s text:c="2"/>sista</text:p>
      <text:p text:style-name="Standard"><text:s text:c="4"/>cuando ya este finalizado - AGENTS.md</text:p>
      <text:p text:style-name="Standard"><text:s text:c="8"/>- PLANS.md</text:p>
      <text:p text:style-name="Standard"><text:s text:c="8"/>- PROMPT_SPRINT_1.txt</text:p>
      <text:p text:style-name="Standard"/>
      <text:p text:style-name="Standard"/>
      <text:p text:style-name="Standard"><text:s text:c="2"/>• Sí. Esa es exactamente la lectura correcta.</text:p>
      <text:p text:style-name="Standard"/>
      <text:p text:style-name="Standard"><text:s text:c="4"/>Lo que estás viendo con Codex no es “magia del modelo”. Es orquestación</text:p>
      <text:p text:style-name="Standard"><text:s text:c="4"/>correcta:</text:p>
      <text:p text:style-name="Standard"/>
      <text:p text:style-name="Standard"><text:s text:c="4"/>- contrato global,</text:p>
      <text:p text:style-name="Standard"><text:s text:c="4"/>- plan por fases,</text:p>
      <text:p text:style-name="Standard"><text:s text:c="4"/>- prompt acotado por sprint,</text:p>
      <text:p text:style-name="Standard"><text:s text:c="4"/>- alcance cerrado,</text:p>
      <text:p text:style-name="Standard"><text:s text:c="4"/>- evidencia en disco.</text:p>
      <text:p text:style-name="Standard"/>
      <text:p text:style-name="Standard"><text:s text:c="4"/>Eso mismo es lo que tu sistema final debe hacer internamente, sumándole</text:p>
      <text:p text:style-name="Standard"><text:s text:c="2"/>HABLA</text:p>
      <text:p text:style-name="Standard"><text:s text:c="4"/>BASIC como capa procedural.</text:p>
      <text:p text:style-name="Standard"/>
      <text:p text:style-name="Standard"><text:s text:c="4"/>La forma correcta de pensarlo es así:</text:p>
      <text:p text:style-name="Standard"/>
      <text:p text:style-name="Standard"><text:s text:c="4"/>- AGENTS.md</text:p>
      <text:p text:style-name="Standard"><text:s text:c="6"/>Es la constitución del repositorio.</text:p>
      <text:p text:style-name="Standard"><text:s text:c="6"/>Define identidad, reglas duras, límites y filosofía de ejecución.</text:p>
      <text:p text:style-name="Standard"><text:s text:c="4"/>- PLANS.md</text:p>
      <text:p text:style-name="Standard"><text:s text:c="6"/>Es el mapa maestro del proyecto.</text:p>
      <text:p text:style-name="Standard"><text:s text:c="6"/>Divide el trabajo en fases y sprints con criterios de aceptación.</text:p>
      <text:p text:style-name="Standard"><text:s text:c="4"/>- PROMPT_SPRINT_1.txt</text:p>
      <text:p text:style-name="Standard"><text:s text:c="6"/>Es la orden operativa de una corrida concreta.</text:p>
      <text:p text:style-name="Standard"><text:s text:c="6"/>No pide “haz todo”; pide “haz este tramo exacto”.</text:p>
      <text:p text:style-name="Standard"/>
      <text:p text:style-name="Standard"><text:s text:c="4"/>Y HABLA BASIC entra como el protocolo interno de razonamiento y validación</text:p>
      <text:p text:style-name="Standard"><text:s text:c="2"/>que</text:p>
      <text:p text:style-name="Standard"><text:s text:c="4"/>acompaña cada tarea.</text:p>
      <text:p text:style-name="Standard"/>
      <text:p text:style-name="Standard"><text:s text:c="4"/>Entonces el sistema final debería funcionar así:</text:p>
      <text:p text:style-name="Standard"/>
      <text:p text:style-name="Standard"><text:s text:c="4"/>AGENTS.md</text:p>
      <text:p text:style-name="Standard"><text:s text:c="4"/>+ PLANS.md</text:p>
      <text:p text:style-name="Standard"><text:s text:c="4"/>+ estado persistente del runtime</text:p>
      <text:p text:style-name="Standard"><text:s text:c="4"/>+ checkpoint actual</text:p>
      <text:p text:style-name="Standard"><text:s text:c="4"/>+ HABLA BASIC</text:p>
      <text:p text:style-name="Standard"><text:s text:c="4"/>= prompt operativo de la tarea actual</text:p>
      <text:p text:style-name="Standard"/>
      <text:p text:style-name="Standard"><text:s text:c="4"/>O sea:</text:p>
      <text:p text:style-name="Standard"/>
      <text:p text:style-name="Standard"><text:s text:c="4"/>- el sistema no improvisa,</text:p>
      <text:p text:style-name="Standard"><text:s text:c="4"/>- no depende de una sesión larga,</text:p>
      <text:p text:style-name="Standard"><text:s text:c="4"/>- no deja que el worker decida todo solo,</text:p>
      <text:p text:style-name="Standard"><text:soft-page-break/><text:s text:c="4"/>- y no le da un prompt gigante ambiguo.</text:p>
      <text:p text:style-name="Standard"/>
      <text:p text:style-name="Standard"><text:s text:c="4"/>La conclusión importante es esta:</text:p>
      <text:p text:style-name="Standard"/>
      <text:p text:style-name="Standard"><text:s text:c="4"/>sí, debemos usar esta misma técnica dentro del sistema terminado.</text:p>
      <text:p text:style-name="Standard"><text:s text:c="4"/>No copiar “Codex” como producto, sino copiar el patrón de control:</text:p>
      <text:p text:style-name="Standard"/>
      <text:p text:style-name="Standard"><text:s text:c="4"/>- contrato,</text:p>
      <text:p text:style-name="Standard"><text:s text:c="4"/>- plan,</text:p>
      <text:p text:style-name="Standard"><text:s text:c="4"/>- tarea acotada,</text:p>
      <text:p text:style-name="Standard"><text:s text:c="4"/>- validación,</text:p>
      <text:p text:style-name="Standard"><text:s text:c="4"/>- checkpoint,</text:p>
      <text:p text:style-name="Standard"><text:s text:c="4"/>- siguiente tarea.</text:p>
      <text:p text:style-name="Standard"/>
      <text:p text:style-name="Standard"><text:s text:c="4"/>Mi recomendación fuerte:</text:p>
      <text:p text:style-name="Standard"/>
      <text:p text:style-name="Standard"><text:s text:c="4"/>- deja AGENTS.md como política fija,</text:p>
      <text:p text:style-name="Standard"><text:s text:c="4"/>- deja PLANS.md como roadmap humano y de máquina,</text:p>
      <text:p text:style-name="Standard"><text:s text:c="4"/>- reemplaza PROMPT_SPRINT_1.txt por prompts generados por el runtime para</text:p>
      <text:p text:style-name="Standard"><text:s text:c="2"/>cada</text:p>
      <text:p text:style-name="Standard"><text:s text:c="6"/>tarea,</text:p>
      <text:p text:style-name="Standard"><text:s text:c="4"/>- y mete HABLA BASIC dentro de ese generador.</text:p>
      <text:p text:style-name="Standard"/>
      <text:p text:style-name="Standard"><text:s text:c="4"/>La versión madura del sistema sería:</text:p>
      <text:p text:style-name="Standard"/>
      <text:p text:style-name="Standard"><text:s text:c="4"/>- humano define o ajusta AGENTS.md y PLANS.md</text:p>
      <text:p text:style-name="Standard"><text:s text:c="4"/>- runtime crea tareas</text:p>
      <text:p text:style-name="Standard"><text:s text:c="4"/>- runtime genera prompt por tarea</text:p>
      <text:p text:style-name="Standard"><text:s text:c="4"/>- worker ejecuta</text:p>
      <text:p text:style-name="Standard"><text:s text:c="4"/>- validator verifica</text:p>
      <text:p text:style-name="Standard"><text:s text:c="4"/>- state_store guarda</text:p>
      <text:p text:style-name="Standard"><text:s text:c="4"/>- recovery corrige</text:p>
      <text:p text:style-name="Standard"><text:s text:c="4"/>- siguiente tarea</text:p>
      <text:p text:style-name="Standard"/>
      <text:p text:style-name="Standard"><text:s text:c="4"/>Eso sí escala a trabajo largo.</text:p>
      <text:p text:style-name="Standard"/>
      <text:p text:style-name="Standard"><text:s text:c="4"/>Si quieres, en la siguiente te diseño la arquitectura exacta de cómo</text:p>
      <text:p text:style-name="Standard"><text:s text:c="4"/>AGENTS.md, PLANS.md y HABLA BASIC se convierten en entradas internas</text:p>
      <text:p text:style-name="Standard"><text:s text:c="4"/>permanentes del orquestador.</text:p>
      <text:p text:style-name="Standard"/>
      <text:p text:style-name="Standard"/>
      <text:p text:style-name="Standard"><text:s text:c="2"/>› si ok <text:s/>tu vas <text:s text:c="2"/>ha hacer esa integracion cuando el otro agente <text:s/>deje todo</text:p>
      <text:p text:style-name="Standard"><text:s text:c="2"/>el</text:p>
      <text:p text:style-name="Standard"><text:s text:c="4"/>harness listo ok esperemos</text:p>
      <text:p text:style-name="Standard"/>
      <text:p text:style-name="Standard"/>
      <text:p text:style-name="Standard">• Sí. Lo que yo voy a hacer después del harness base es esto:</text:p>
      <text:p text:style-name="Standard"/>
      <text:p text:style-name="Standard"><text:s text:c="2"/>1. Revisar que el harness quedó sano.</text:p>
      <text:p text:style-name="Standard"><text:s text:c="5"/>Verificaré Sprint 1 y Sprint 2, contratos, cola, planner y persistencia. No</text:p>
      <text:p text:style-name="Standard"><text:s text:c="5"/>voy a montar encima de una base inestable.</text:p>
      <text:p text:style-name="Standard"><text:s text:c="2"/>2. Convertir AGENTS.md en política permanente del runtime.</text:p>
      <text:p text:style-name="Standard"><text:soft-page-break/><text:s text:c="5"/>No quedará como documento suelto. Voy a hacer que el orquestador lo cargue</text:p>
      <text:p text:style-name="Standard"><text:s text:c="5"/>como fuente de reglas duras, identidad del sistema, restricciones y</text:p>
      <text:p text:style-name="Standard"><text:s text:c="5"/>criterios de progreso válido.</text:p>
      <text:p text:style-name="Standard"><text:s text:c="2"/>3. Convertir PLANS.md en plan maestro consumible por máquina.</text:p>
      <text:p text:style-name="Standard"><text:s text:c="5"/>El sistema deberá poder leer fases, sprints, alcance, criterios de</text:p>
      <text:p text:style-name="Standard"><text:s text:c="5"/>aceptación y usar eso para decidir qué tarea sigue y qué está fuera de</text:p>
      <text:p text:style-name="Standard"><text:s text:c="5"/>alcance.</text:p>
      <text:p text:style-name="Standard"><text:s text:c="2"/>4. Integrar HABLA BASIC como capa procedural interna.</text:p>
      <text:p text:style-name="Standard"><text:s text:c="5"/>No como texto decorativo, sino como disciplina de construcción de</text:p>
      <text:p text:style-name="Standard"><text:s text:c="5"/>directivas: objetivo, restricciones, evidencia esperada, validación,</text:p>
      <text:p text:style-name="Standard"><text:s text:c="5"/>checkpoint y condición de cierre.</text:p>
      <text:p text:style-name="Standard"><text:s text:c="2"/>5. Crear el componente que genere la orden operativa por tarea.</text:p>
      <text:p text:style-name="Standard"><text:s text:c="5"/>Esa fue la pieza nueva que acabamos de descubrir. No dependeremos de un</text:p>
      <text:p text:style-name="Standard"><text:s text:c="5"/>PROMPT_SPRINT_1.txt escrito a mano cada vez. El sistema lo generará desde:</text:p>
      <text:p text:style-name="Standard"><text:s text:c="5"/>AGENTS.md + PLANS.md + project_state.json + task_queue.json + checkpoint +</text:p>
      <text:p text:style-name="Standard"><text:s text:c="5"/>HABLA BASIC.</text:p>
      <text:p text:style-name="Standard"><text:s text:c="2"/>6. Dejar trazabilidad del prompt generado.</text:p>
      <text:p text:style-name="Standard"><text:s text:c="5"/>Cada tarea debe dejar su directiva persistida en disco para auditoría y</text:p>
      <text:p text:style-name="Standard"><text:s text:c="5"/>reanudación. O sea: el prompt usado por el worker también será un artefacto</text:p>
      <text:p text:style-name="Standard"><text:s text:c="5"/>del runtime.</text:p>
      <text:p text:style-name="Standard"><text:s text:c="2"/>7. Conectar eso al flujo real del orquestador.</text:p>
      <text:p text:style-name="Standard"><text:s text:c="5"/>El flujo final debe quedar así:</text:p>
      <text:p text:style-name="Standard"><text:s text:c="5"/>planner -&gt; task_queue -&gt; directive_generator -&gt; worker -&gt; validator -&gt;</text:p>
      <text:p text:style-name="Standard"><text:s text:c="5"/>state_store -&gt; recovery -&gt; siguiente tarea</text:p>
      <text:p text:style-name="Standard"><text:s text:c="2"/>8. Mantener al worker desacoplado.</text:p>
      <text:p text:style-name="Standard"><text:s text:c="5"/>Codex será solo un worker. La inteligencia de control quedará en el</text:p>
      <text:p text:style-name="Standard"><text:s text:c="5"/>orquestador, no en una sesión larga.</text:p>
      <text:p text:style-name="Standard"/>
      <text:p text:style-name="Standard"><text:s text:c="2"/>Mi entregable real, cuando me toque entrar, será algo de este estilo:</text:p>
      <text:p text:style-name="Standard"/>
      <text:p text:style-name="Standard"><text:s text:c="2"/>- orchestrator/policy_loader.py</text:p>
      <text:p text:style-name="Standard"><text:s text:c="2"/>- orchestrator/plan_loader.py</text:p>
      <text:p text:style-name="Standard"><text:s text:c="2"/>- orchestrator/directive_context.py</text:p>
      <text:p text:style-name="Standard"><text:s text:c="2"/>- orchestrator/habla_adapter.py</text:p>
      <text:p text:style-name="Standard"><text:s text:c="2"/>- orchestrator/directive_generator.py</text:p>
      <text:p text:style-name="Standard"><text:s text:c="2"/>- tests/ para validar esa cadena</text:p>
      <text:p text:style-name="Standard"><text:s text:c="2"/>- runtime/ para persistir directivas generadas y checkpoints</text:p>
      <text:p text:style-name="Standard"/>
      <text:p text:style-name="Standard"><text:s text:c="2"/>La idea central es esta:</text:p>
      <text:p text:style-name="Standard"/>
      <text:p text:style-name="Standard"><text:s text:c="2"/>- PROMPT_SPRINT_1.txt hoy es manual</text:p>
      <text:p text:style-name="Standard"><text:s text:c="2"/>- mañana eso debe ser una salida del sistema</text:p>
      <text:p text:style-name="Standard"/>
      <text:p text:style-name="Standard"><text:s text:c="2"/>Entonces no, no vamos a improvisar otra vez. Vamos a formalizar exactamente la</text:p>
      <text:p text:style-name="Standard"><text:s text:c="2"/>técnica que acabamos de usar contigo y convertirla en arquitectura interna del</text:p>
      <text:p text:style-name="Standard"><text:s text:c="2"/>producto.</text:p>
      <text:p text:style-name="Standard"/>
      <text:p text:style-name="Standard"><text:s text:c="2"/>Cuando el otro agente cierre el harness base, yo entro sobre esa capa y hago</text:p>
      <text:p text:style-name="Standard"><text:s text:c="2"/>esa integración.</text:p>
      <text:p text:style-name="Standard"/>
      <text:p text:style-name="Standard"/>
      <text:p text:style-name="Standard">› ya inicio la segunda face <text:s text:c="2"/>y ya termino revisa</text:p>
      <text:p text:style-name="Standard"><text:soft-page-break/></text:p>
      <text:p text:style-name="Standard"/>
      <text:p text:style-name="Standard">• Voy a revisar si Sprint 2 quedó bien cerrado en la raíz correcta, si respetó</text:p>
      <text:p text:style-name="Standard"><text:s text:c="2"/>el alcance y si planner.py y task_queue.py funcionan de verdad.</text:p>
      <text:p text:style-name="Standard"/>
      <text:p text:style-name="Standard">• Los archivos de Sprint 2 sí están en la raíz correcta y no se salió a Sprint</text:p>
      <text:p text:style-name="Standard"><text:s text:c="2"/>3. Ahora reviso la implementación y hago validación funcional real.</text:p>
      <text:p text:style-name="Standard"/>
      <text:p text:style-name="Standard">• Encontré una posible zona delicada en el planner: puede estar convirtiendo</text:p>
      <text:p text:style-name="Standard"><text:s text:c="2"/>restricciones y validaciones en “tareas” reales. Voy a probarlo con un prompt</text:p>
      <text:p text:style-name="Standard"><text:s text:c="2"/>tipo sprint y también con la cola sobre un runtime nuevo para ver si hay bugs</text:p>
      <text:p text:style-name="Standard"><text:s text:c="2"/>funcionales.</text:p>
      <text:p text:style-name="Standard"/>
      <text:p text:style-name="Standard">• Ya confirmé dos comportamientos incorrectos con pruebas reales. Voy a sacar</text:p>
      <text:p text:style-name="Standard"><text:s text:c="2"/>referencias exactas de línea para darte la revisión en formato de findings.</text:p>
      <text:p text:style-name="Standard"/>
      <text:p text:style-name="Standard">• Encontré 2 hallazgos.</text:p>
      <text:p text:style-name="Standard"/>
      <text:p text:style-name="Standard"><text:s text:c="2"/>- Alto: planner.py:53 convierte cualquier bullet del prompt en una tarea</text:p>
      <text:p text:style-name="Standard"><text:s text:c="4"/>ejecutable, incluyendo restricciones y validaciones. La extracción en</text:p>
      <text:p text:style-name="Standard"><text:s text:c="4"/>planner.py:115 y planner.py:131 no distingue entre “trabajo” y “no crear X /</text:p>
      <text:p text:style-name="Standard"><text:s text:c="4"/>validar Y”. Lo reproduje con un prompt tipo sprint y el planner generó</text:p>
      <text:p text:style-name="Standard"><text:s text:c="4"/>tareas como no crear executor.py, no crear recovery.py y el planner genera</text:p>
      <text:p text:style-name="Standard"><text:s text:c="4"/>al menos un conjunto valido de tareas. Eso rompe el objetivo central del</text:p>
      <text:p text:style-name="Standard"><text:s text:c="4"/>planner: producir una cola inicial coherente de trabajo real.</text:p>
      <text:p text:style-name="Standard"><text:s text:c="2"/>- Medio: task_queue.py:170 no puede inicializar una cola en un runtime nuevo,</text:p>
      <text:p text:style-name="Standard"><text:s text:c="4"/>porque save_queue() instancia TaskQueue(store) y el constructor en</text:p>
      <text:p text:style-name="Standard"><text:s text:c="4"/>task_queue.py:28 exige que runtime/task_queue.json ya exista. En una</text:p>
      <text:p text:style-name="Standard"><text:s text:c="4"/>TemporaryDirectory con StateStore(Path(tmp)/"runtime"), save_queue([task],</text:p>
      <text:p text:style-name="Standard"><text:s text:c="4"/>store=store) falló con ContractError: Missing required runtime file .../</text:p>
      <text:p text:style-name="Standard"><text:s text:c="4"/>task_queue.json. Eso deja rota la API helper justo en el caso de bootstrap</text:p>
      <text:p text:style-name="Standard"><text:s text:c="4"/>que este orquestador va a necesitar.</text:p>
      <text:p text:style-name="Standard"/>
      <text:p text:style-name="Standard"><text:s text:c="2"/>Validación que sí pasó:</text:p>
      <text:p text:style-name="Standard"/>
      <text:p text:style-name="Standard"><text:s text:c="2"/>- planner.py y task_queue.py compilan.</text:p>
      <text:p text:style-name="Standard"><text:s text:c="2"/>- Sprint 2 quedó en la raíz correcta.</text:p>
      <text:p text:style-name="Standard"><text:s text:c="2"/>- No se salió a Sprint 3; no existen executor.py, validator.py ni recovery.py.</text:p>
      <text:p text:style-name="Standard"/>
      <text:p text:style-name="Standard"><text:s text:c="2"/>Riesgo residual:</text:p>
      <text:p text:style-name="Standard"/>
      <text:p text:style-name="Standard"><text:s text:c="2"/>- No vi tests automáticos nuevos para Sprint 2. Después de corregir esos 2</text:p>
      <text:p text:style-name="Standard"><text:s text:c="4"/>puntos, hace falta fijarlos con pruebas, porque ambos son regresiones</text:p>
      <text:p text:style-name="Standard"><text:s text:c="4"/>fáciles de reintroducir.</text:p>
      <text:p text:style-name="Standard"/>
      <text:p text:style-name="Standard"><text:s text:c="2"/>En resumen: la fase quedó bien encaminada y respetó el alcance, pero yo no la</text:p>
      <text:p text:style-name="Standard"><text:s text:c="2"/>daría por aprobada todavía hasta corregir esos dos bugs.</text:p>
      <text:p text:style-name="Standard"/>
      <text:p text:style-name="Standard"/>
      <text:p text:style-name="Standard">› dame el promt para que el otro ajente los corrija</text:p>
      <text:p text:style-name="Standard"/>
      <text:p text:style-name="Standard"/>
      <text:p text:style-name="Standard"><text:soft-page-break/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Corregir unicamente los bugs detectados en Sprint 2.</text:p>
      <text:p text:style-name="Standard"><text:s text:c="2"/>No avances Sprint 3.</text:p>
      <text:p text:style-name="Standard"/>
      <text:p text:style-name="Standard"><text:s text:c="2"/>BUGS A CORREGIR</text:p>
      <text:p text:style-name="Standard"/>
      <text:p text:style-name="Standard"><text:s text:c="2"/>1. BUG EN `orchestrator/planner.py`</text:p>
      <text:p text:style-name="Standard"><text:s text:c="2"/>Problema:</text:p>
      <text:p text:style-name="Standard"><text:s text:c="2"/>El planner esta convirtiendo restricciones y validaciones en tareas</text:p>
      <text:p text:style-name="Standard"><text:s text:c="2"/>ejecutables.</text:p>
      <text:p text:style-name="Standard"><text:s text:c="2"/>Hoy genera tareas incorrectas como:</text:p>
      <text:p text:style-name="Standard"><text:s text:c="2"/>- "no crear executor.py"</text:p>
      <text:p text:style-name="Standard"><text:s text:c="2"/>- "no crear recovery.py"</text:p>
      <text:p text:style-name="Standard"><text:s text:c="2"/>- "el planner genera al menos un conjunto valido de tareas"</text:p>
      <text:p text:style-name="Standard"/>
      <text:p text:style-name="Standard"><text:s text:c="2"/>Eso no es trabajo real del proyecto.</text:p>
      <text:p text:style-name="Standard"><text:s text:c="2"/>El planner debe generar solo tareas de implementacion reales y coherentes.</text:p>
      <text:p text:style-name="Standard"/>
      <text:p text:style-name="Standard"><text:s text:c="2"/>Correccion esperada:</text:p>
      <text:p text:style-name="Standard"><text:s text:c="2"/>- ignorar bullets de restricciones</text:p>
      <text:p text:style-name="Standard"><text:s text:c="2"/>- ignorar bullets de validacion</text:p>
      <text:p text:style-name="Standard"><text:s text:c="2"/>- ignorar bullets negativos tipo "no crear", "no tocar", "no trabajar"</text:p>
      <text:p text:style-name="Standard"><text:s text:c="2"/>- priorizar bullets de entregables y trabajo real</text:p>
      <text:p text:style-name="Standard"><text:s text:c="2"/>- mantener salida compatible con contracts.py y schemas/</text:p>
      <text:p text:style-name="Standard"/>
      <text:p text:style-name="Standard"><text:s text:c="2"/>2. BUG EN `orchestrator/task_queue.py`</text:p>
      <text:p text:style-name="Standard"><text:s text:c="2"/>Problema:</text:p>
      <text:p text:style-name="Standard"><text:s text:c="2"/>`save_queue()` no funciona bien en bootstrap porque instancia</text:p>
      <text:p text:style-name="Standard"><text:s text:c="2"/>`TaskQueue(store)` y el constructor exige que `runtime/task_queue.json` ya</text:p>
      <text:p text:style-name="Standard"><text:s text:c="2"/>exista.</text:p>
      <text:p text:style-name="Standard"><text:s text:c="2"/>Eso rompe el caso de inicializacion sobre un runtime nuevo.</text:p>
      <text:p text:style-name="Standard"><text:soft-page-break/></text:p>
      <text:p text:style-name="Standard"><text:s text:c="2"/>Correccion esperada:</text:p>
      <text:p text:style-name="Standard"><text:s text:c="2"/>- permitir bootstrap limpio de la cola</text:p>
      <text:p text:style-name="Standard"><text:s text:c="2"/>- `save_queue()` debe poder crear y guardar una cola valida aunque</text:p>
      <text:p text:style-name="Standard"><text:s text:c="2"/>`task_queue.json` aun no exista</text:p>
      <text:p text:style-name="Standard"><text:s text:c="2"/>- no romper las validaciones existentes</text:p>
      <text:p text:style-name="Standard"><text:s text:c="2"/>- mantener compatibilidad con `state_store.py`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orchestrator/planner.py</text:p>
      <text:p text:style-name="Standard"><text:s text:c="2"/>- orchestrator/task_queue.py</text:p>
      <text:p text:style-name="Standard"><text:s text:c="2"/>- tests acotados de Sprint 2 si decides agregarlos</text:p>
      <text:p text:style-name="Standard"><text:s text:c="2"/>- ajustes minimos estrictamente necesarios en Sprint 1 solo si son inevitables</text:p>
      <text:p text:style-name="Standard"/>
      <text:p text:style-name="Standard"><text:s text:c="2"/>RESTRICCIONES DURAS</text:p>
      <text:p text:style-name="Standard"><text:s text:c="2"/>- no implementar Sprint 3</text:p>
      <text:p text:style-name="Standard"><text:s text:c="2"/>- no crear executor.py</text:p>
      <text:p text:style-name="Standard"><text:s text:c="2"/>- no crear validator.py</text:p>
      <text:p text:style-name="Standard"><text:s text:c="2"/>- no crear recovery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El planner ya no convierte en tareas:</text:p>
      <text:p text:style-name="Standard"><text:s text:c="2"/>- restricciones</text:p>
      <text:p text:style-name="Standard"><text:s text:c="2"/>- validaciones</text:p>
      <text:p text:style-name="Standard"><text:s text:c="2"/>- bullets negativos</text:p>
      <text:p text:style-name="Standard"/>
      <text:p text:style-name="Standard"><text:s text:c="2"/>2. El planner si genera tareas reales a partir de entregables o trabajo</text:p>
      <text:p text:style-name="Standard"><text:s text:c="2"/>concreto.</text:p>
      <text:p text:style-name="Standard"/>
      <text:p text:style-name="Standard"><text:s text:c="2"/>3. `save_queue()` funciona sobre un runtime nuevo sin `task_queue.json`</text:p>
      <text:p text:style-name="Standard"><text:s text:c="2"/>preexistente.</text:p>
      <text:p text:style-name="Standard"/>
      <text:p text:style-name="Standard"><text:s text:c="2"/>4. La cola sigue respetando:</text:p>
      <text:p text:style-name="Standard"><text:s text:c="2"/>- prioridad</text:p>
      <text:p text:style-name="Standard"><text:s text:c="2"/>- dependencias</text:p>
      <text:p text:style-name="Standard"><text:s text:c="2"/>- orden estable</text:p>
      <text:p text:style-name="Standard"><text:s text:c="2"/>- validacion contractual</text:p>
      <text:p text:style-name="Standard"/>
      <text:p text:style-name="Standard"><text:s text:c="2"/>SI AGREGAS TESTS</text:p>
      <text:p text:style-name="Standard"><text:s text:c="2"/>Mantenlos pequenos y enfocados solo en estos bugs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oft-page-break/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/>
      <text:p text:style-name="Standard"><text:s text:c="2"/>Cuando termine, yo te hago la revisión otra vez.</text:p>
      <text:p text:style-name="Standard"/>
      <text:p text:style-name="Standard"/>
      <text:p text:style-name="Standard">› ya termino el otro agente</text:p>
      <text:p text:style-name="Standard"/>
      <text:p text:style-name="Standard"/>
      <text:p text:style-name="Standard">• Voy a verificar si realmente corrigió los dos bugs de Sprint 2 y si la fase ya</text:p>
      <text:p text:style-name="Standard"><text:s text:c="2"/>queda aprobable.</text:p>
      <text:p text:style-name="Standard"/>
      <text:p text:style-name="Standard">• Los cambios apuntan a corregir justo los dos bugs. Ahora hago las mismas</text:p>
      <text:p text:style-name="Standard"><text:s text:c="2"/>pruebas que fallaron antes y una validación de cola para cerrar el veredicto.</text:p>
      <text:p text:style-name="Standard"/>
      <text:p text:style-name="Standard">• Las pruebas que antes fallaban ya pasaron. Hago una última comprobación rápida</text:p>
      <text:p text:style-name="Standard"><text:s text:c="2"/>del estado persistido y de si dejaron tests nuevos o no, para cerrar el</text:p>
      <text:p text:style-name="Standard"><text:s text:c="2"/>informe.</text:p>
      <text:p text:style-name="Standard"/>
      <text:p text:style-name="Standard">• Sí. Ahora sí doy Sprint 2 por aprobado.</text:p>
      <text:p text:style-name="Standard"/>
      <text:p text:style-name="Standard"><text:s text:c="2"/>Estado:</text:p>
      <text:p text:style-name="Standard"/>
      <text:p text:style-name="Standard"><text:s text:c="2"/>- orchestrator/planner.py ya no convierte restricciones o validaciones en</text:p>
      <text:p text:style-name="Standard"><text:s text:c="4"/>tareas. Repetí la prueba con un prompt tipo sprint y ahora solo genera:</text:p>
      <text:p text:style-name="Standard"><text:s text:c="6"/>- Implementar orchestrator/planner.py</text:p>
      <text:p text:style-name="Standard"><text:s text:c="6"/>- Implementar orchestrator/task_queue.py</text:p>
      <text:p text:style-name="Standard"><text:s text:c="2"/>- orchestrator/task_queue.py ya soporta bootstrap limpio. Repetí la prueba que</text:p>
      <text:p text:style-name="Standard"><text:s text:c="4"/>antes fallaba y save_queue() funcionó sobre un runtime temporal sin</text:p>
      <text:p text:style-name="Standard"><text:s text:c="4"/>task_queue.json previo.</text:p>
      <text:p text:style-name="Standard"/>
      <text:p text:style-name="Standard"><text:s text:c="2"/>Validación real que hice:</text:p>
      <text:p text:style-name="Standard"/>
      <text:p text:style-name="Standard"><text:s text:c="2"/>- py_compile de planner.py y task_queue.py: pasó</text:p>
      <text:p text:style-name="Standard"><text:s text:c="2"/>- prueba de planner con prompt de sprint: pasó</text:p>
      <text:p text:style-name="Standard"><text:s text:c="2"/>- prueba de persistencia/cola en runtime temporal: pasó</text:p>
      <text:p text:style-name="Standard"><text:s text:c="2"/>- next_ready_task() respetó dependencias:</text:p>
      <text:p text:style-name="Standard"><text:s text:c="6"/>- antes de completar TASK-001 devuelve TASK-001</text:p>
      <text:p text:style-name="Standard"><text:s text:c="6"/>- después devuelve TASK-002</text:p>
      <text:p text:style-name="Standard"/>
      <text:p text:style-name="Standard"><text:s text:c="2"/>Límites residuales:</text:p>
      <text:p text:style-name="Standard"/>
      <text:p text:style-name="Standard"><text:s text:c="2"/>- runtime/task_queue.json en el repo quedó vacío, lo cual no es un bug por sí</text:p>
      <text:p text:style-name="Standard"><text:s text:c="4"/>mismo</text:p>
      <text:p text:style-name="Standard"><text:s text:c="2"/>- no veo tests nuevos persistidos para Sprint 2; sería bueno añadirlos en el</text:p>
      <text:p text:style-name="Standard"><text:s text:c="4"/>siguiente tramo o como hardening posterior</text:p>
      <text:p text:style-name="Standard"/>
      <text:p text:style-name="Standard"><text:s text:c="2"/>Conclusión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oft-page-break/><text:s text:c="2"/>- ya podemos pasar al prompt de Sprint 3 cuando quieras.</text:p>
      <text:p text:style-name="Standard"/>
      <text:p text:style-name="Standard"/>
      <text:p text:style-name="Standard">› ok dam el promt para la tercera face</text:p>
      <text:p text:style-name="Standard"/>
      <text:p text:style-name="Standard"/>
      <text:p text:style-name="Standard">• Usa este prompt para Sprint 3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Implementar SOLO Sprint 3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workers/codex_worker.py</text:p>
      <text:p text:style-name="Standard"><text:s text:c="2"/>- orchestrator/executor.py</text:p>
      <text:p text:style-name="Standard"/>
      <text:p text:style-name="Standard"><text:s text:c="2"/>Puedes hacer ajustes minimos en Sprint 1 o Sprint 2 solo si son estrictamente</text:p>
      <text:p text:style-name="Standard"><text:s text:c="2"/>necesarios para consistencia, pero no avances Sprint 4 o posteriores.</text:p>
      <text:p text:style-name="Standard"/>
      <text:p text:style-name="Standard"><text:s text:c="2"/>OBJETIVO FUNCIONAL DE SPRINT 3</text:p>
      <text:p text:style-name="Standard"><text:s text:c="2"/>Pasar de planner + queue a ejecucion acotada por tarea.</text:p>
      <text:p text:style-name="Standard"/>
      <text:p text:style-name="Standard"><text:s text:c="2"/>REQUISITOS FUNCIONALES</text:p>
      <text:p text:style-name="Standard"/>
      <text:p text:style-name="Standard"><text:s text:c="2"/>1. `workers/codex_worker.py` debe poder:</text:p>
      <text:p text:style-name="Standard"><text:s text:c="2"/>- ejecutar una sola tarea a la vez</text:p>
      <text:p text:style-name="Standard"><text:s text:c="2"/>- recibir una tarea valida del contrato existente</text:p>
      <text:p text:style-name="Standard"><text:s text:c="2"/>- trabajar sobre una carpeta objetivo explicitada</text:p>
      <text:p text:style-name="Standard"><text:s text:c="2"/>- lanzar un proceso por tarea</text:p>
      <text:p text:style-name="Standard"><text:s text:c="2"/>- imponer timeout por tarea</text:p>
      <text:p text:style-name="Standard"><text:s text:c="2"/>- capturar stdout, stderr, returncode y duracion</text:p>
      <text:p text:style-name="Standard"><text:s text:c="2"/>- devolver un resultado estructurado y claro</text:p>
      <text:p text:style-name="Standard"><text:s text:c="2"/>- no depender de una sesion larga</text:p>
      <text:p text:style-name="Standard"><text:soft-page-break/><text:s text:c="2"/>- no acoplar fuerte el sistema a una sola estrategia interna</text:p>
      <text:p text:style-name="Standard"/>
      <text:p text:style-name="Standard"><text:s text:c="2"/>2. `orchestrator/executor.py` debe poder:</text:p>
      <text:p text:style-name="Standard"><text:s text:c="2"/>- recibir una tarea valida</text:p>
      <text:p text:style-name="Standard"><text:s text:c="2"/>- lanzar un worker para esa tarea</text:p>
      <text:p text:style-name="Standard"><text:s text:c="2"/>- esperar exito, error o timeout</text:p>
      <text:p text:style-name="Standard"><text:s text:c="2"/>- devolver un resultado estructurado compatible con el runtime</text:p>
      <text:p text:style-name="Standard"><text:s text:c="2"/>- dejar listo el camino para Sprint 4 sin fingir validacion completa</text:p>
      <text:p text:style-name="Standard"><text:s text:c="2"/>- tratar una tarea como una unidad de ejecucion aislada</text:p>
      <text:p text:style-name="Standard"/>
      <text:p text:style-name="Standard"><text:s text:c="2"/>3. El resultado de ejecucion debe incluir como minimo:</text:p>
      <text:p text:style-name="Standard"><text:s text:c="2"/>- task_id</text:p>
      <text:p text:style-name="Standard"><text:s text:c="2"/>- completed</text:p>
      <text:p text:style-name="Standard"><text:s text:c="2"/>- files_created</text:p>
      <text:p text:style-name="Standard"><text:s text:c="2"/>- files_modified</text:p>
      <text:p text:style-name="Standard"><text:s text:c="2"/>- validation_ran</text:p>
      <text:p text:style-name="Standard"><text:s text:c="2"/>- validation_passed</text:p>
      <text:p text:style-name="Standard"><text:s text:c="2"/>- blockers</text:p>
      <text:p text:style-name="Standard"><text:s text:c="2"/>- next_recommendation</text:p>
      <text:p text:style-name="Standard"/>
      <text:p text:style-name="Standard"><text:s text:c="2"/>4. Reglas de ejecucion</text:p>
      <text:p text:style-name="Standard"><text:s text:c="2"/>- una tarea equivale a un proceso</text:p>
      <text:p text:style-name="Standard"><text:s text:c="2"/>- debe existir timeout por tarea</text:p>
      <text:p text:style-name="Standard"><text:s text:c="2"/>- si el proceso termina con error, devolver resultado estructurado y no</text:p>
      <text:p text:style-name="Standard"><text:s text:c="2"/>colapsar la arquitectura</text:p>
      <text:p text:style-name="Standard"><text:s text:c="2"/>- si el proceso excede timeout, marcar timeout claramente</text:p>
      <text:p text:style-name="Standard"><text:s text:c="2"/>- dejar trazabilidad util en disco si hace falta</text:p>
      <text:p text:style-name="Standard"><text:s text:c="2"/>- no inventar exito si no hay evidencia</text:p>
      <text:p text:style-name="Standard"/>
      <text:p text:style-name="Standard"><text:s text:c="2"/>5. Diseno pragmatico</text:p>
      <text:p text:style-name="Standard"><text:s text:c="2"/>- no intentes resolver todavia validator.py</text:p>
      <text:p text:style-name="Standard"><text:s text:c="2"/>- no intentes resolver todavia recovery.py</text:p>
      <text:p text:style-name="Standard"><text:s text:c="2"/>- no intentes conectar todavia toda la migracion de agent_runtime.py</text:p>
      <text:p text:style-name="Standard"><text:s text:c="2"/>- concentra el sprint en la capacidad de ejecutar una tarea aislada con</text:p>
      <text:p text:style-name="Standard"><text:s text:c="2"/>resultado estructurado</text:p>
      <text:p text:style-name="Standard"/>
      <text:p text:style-name="Standard"><text:s text:c="2"/>PREFERENCIAS DE DISENO</text:p>
      <text:p text:style-name="Standard"><text:s text:c="2"/>- si necesitas separar tipos o helpers pequenos, hazlo con moderacion</text:p>
      <text:p text:style-name="Standard"><text:s text:c="2"/>- si necesitas `workers/__init__.py`, puedes crearlo</text:p>
      <text:p text:style-name="Standard"><text:s text:c="2"/>- si necesitas logs o artifacts minimos dentro de `runtime/`, puedes dejarlos</text:p>
      <text:p text:style-name="Standard"><text:s text:c="2"/>listos sin invadir sprints futuros</text:p>
      <text:p text:style-name="Standard"><text:s text:c="2"/>- si necesitas pasar una instruccion adicional al worker fuera del contrato</text:p>
      <text:p text:style-name="Standard"><text:s text:c="2"/>Task, hazlo sin romper los contratos actuales de Sprint 1</text:p>
      <text:p text:style-name="Standard"/>
      <text:p text:style-name="Standard"><text:s text:c="2"/>ENTREGABLES OBLIGATORIOS</text:p>
      <text:p text:style-name="Standard"><text:s text:c="2"/>- workers/codex_worker.py</text:p>
      <text:p text:style-name="Standard"><text:s text:c="2"/>- orchestrator/executor.py</text:p>
      <text:p text:style-name="Standard"/>
      <text:p text:style-name="Standard"><text:s text:c="2"/>SI NECESITAS APOYO MINIMO</text:p>
      <text:p text:style-name="Standard"><text:s text:c="2"/>Puedes agregar stubs pequenos y seguros solo si son inevitables para dejar</text:p>
      <text:p text:style-name="Standard"><text:s text:c="2"/>Sprint 3 coherente, pero no implementes todavia:</text:p>
      <text:p text:style-name="Standard"><text:s text:c="2"/>- orchestrator/validator.py</text:p>
      <text:p text:style-name="Standard"><text:soft-page-break/><text:s text:c="2"/>- orchestrator/recovery.py</text:p>
      <text:p text:style-name="Standard"><text:s text:c="2"/>- orchestrator/benchmark.py</text:p>
      <text:p text:style-name="Standard"><text:s text:c="2"/>- directive generator completo</text:p>
      <text:p text:style-name="Standard"><text:s text:c="2"/>- integracion final con HABLA BASIC</text:p>
      <text:p text:style-name="Standard"><text:s text:c="2"/>- migracion completa de agent_runtime.py</text:p>
      <text:p text:style-name="Standard"/>
      <text:p text:style-name="Standard"><text:s text:c="2"/>RESTRICCIONES DURAS</text:p>
      <text:p text:style-name="Standard"><text:s text:c="2"/>- no implementar Sprint 4 ni posteriores</text:p>
      <text:p text:style-name="Standard"><text:s text:c="2"/>- no crear validator.py</text:p>
      <text:p text:style-name="Standard"><text:s text:c="2"/>- no crear recovery.py</text:p>
      <text:p text:style-name="Standard"><text:s text:c="2"/>- no crear benchmark.py</text:p>
      <text:p text:style-name="Standard"><text:s text:c="2"/>- no rehace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3 queda correcto si:</text:p>
      <text:p text:style-name="Standard"><text:s text:c="2"/>- existe `workers/codex_worker.py`</text:p>
      <text:p text:style-name="Standard"><text:s text:c="2"/>- existe `orchestrator/executor.py`</text:p>
      <text:p text:style-name="Standard"><text:s text:c="2"/>- una tarea se ejecuta como un proceso aislado</text:p>
      <text:p text:style-name="Standard"><text:s text:c="2"/>- existe timeout por tarea</text:p>
      <text:p text:style-name="Standard"><text:s text:c="2"/>- el resultado vuelve estructurado</text:p>
      <text:p text:style-name="Standard"><text:s text:c="2"/>- el sistema distingue exito, fallo y timeout</text:p>
      <text:p text:style-name="Standard"><text:s text:c="2"/>- queda preparado el camino para Sprint 4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><text:s text:c="2"/>- se puede ejecutar una tarea simple con exito</text:p>
      <text:p text:style-name="Standard"><text:s text:c="2"/>- se puede capturar un fallo de tarea sin romper el runtime</text:p>
      <text:p text:style-name="Standard"><text:s text:c="2"/>- se puede detectar timeout de tarea</text:p>
      <text:p text:style-name="Standard"><text:s text:c="2"/>- el resultado devuelto conserva estructura util para TaskResult o una forma</text:p>
      <text:p text:style-name="Standard"><text:s text:c="2"/>compatible con TaskResult</text:p>
      <text:p text:style-name="Standard"><text:s text:c="2"/>- el executor funciona sobre una tarea aislada y no sobre una sesion</text:p>
      <text:p text:style-name="Standard"><text:s text:c="2"/>monolitica</text:p>
      <text:p text:style-name="Standard"/>
      <text:p text:style-name="Standard"><text:s text:c="2"/>SI AGREGAS TESTS</text:p>
      <text:p text:style-name="Standard"><text:s text:c="2"/>Mantenlos pequenos y enfocados solo en Sprint 3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4</text:p>
      <text:p text:style-name="Standard"/>
      <text:p text:style-name="Standard"><text:s text:c="2"/>Cuando termine, yo te hago la auditoría igual que en los dos sprints</text:p>
      <text:p text:style-name="Standard"><text:s text:c="2"/>anteriores.</text:p>
      <text:p text:style-name="Standard"/>
      <text:p text:style-name="Standard"/>
      <text:p text:style-name="Standard">› ya termino <text:s/>la 3</text:p>
      <text:p text:style-name="Standard"/>
      <text:p text:style-name="Standard"><text:soft-page-break/></text:p>
      <text:p text:style-name="Standard">• Voy a revisar si Sprint 3 quedó en el alcance correcto y si codex_worker.py y</text:p>
      <text:p text:style-name="Standard"><text:s text:c="2"/>executor.py funcionan de verdad con éxito, fallo y timeout.</text:p>
      <text:p text:style-name="Standard"/>
      <text:p text:style-name="Standard">• Los archivos de Sprint 3 sí están donde deben y no se salió a Sprint 4. Ahora</text:p>
      <text:p text:style-name="Standard"><text:s text:c="2"/>reviso la implementación y corro pruebas reales de éxito, fallo y timeout.</text:p>
      <text:p text:style-name="Standard"/>
      <text:p text:style-name="Standard">• Voy a ejecutar tres pruebas reales del executor: una tarea exitosa, una</text:p>
      <text:p text:style-name="Standard"><text:s text:c="2"/>fallida y una con timeout. Si algo queda raro en la estructura de salida, ahí</text:p>
      <text:p text:style-name="Standard"><text:s text:c="2"/>sale.</text:p>
      <text:p text:style-name="Standard"/>
      <text:p text:style-name="Standard">• Acabo de ver una zona delicada: necesito probar si marca éxito aunque el</text:p>
      <text:p text:style-name="Standard"><text:s text:c="2"/>comando no cree los expected_files. Eso sería una regresión seria contra “no</text:p>
      <text:p text:style-name="Standard"><text:s text:c="2"/>inventar éxito sin evidencia”.</text:p>
      <text:p text:style-name="Standard"/>
      <text:p text:style-name="Standard">• Ya encontré un bug real de aceptación: una tarea puede salir completed=True</text:p>
      <text:p text:style-name="Standard"><text:s text:c="2"/>aunque no produzca los expected_files. Voy a sacar referencias exactas y</text:p>
      <text:p text:style-name="Standard"><text:s text:c="2"/>cerrar la revisión con findings.</text:p>
      <text:p text:style-name="Standard"/>
      <text:p text:style-name="Standard">• Findings</text:p>
      <text:p text:style-name="Standard"/>
      <text:p text:style-name="Standard"><text:s text:c="2"/>- Alta: workers/codex_worker.py:107 / workers/codex_worker.py:121 marcan una</text:p>
      <text:p text:style-name="Standard"><text:s text:c="4"/>tarea como completed=True aunque no exista ningún expected_file al terminar.</text:p>
      <text:p text:style-name="Standard"><text:s text:c="4"/>_snapshot_expected_files() solo toma foto de existencia, pero nunca</text:p>
      <text:p text:style-name="Standard"><text:s text:c="4"/>convierte la ausencia final en blocker; _diff_expected_files() devuelve</text:p>
      <text:p text:style-name="Standard"><text:s text:c="4"/>files_created=[] y aun así completed queda verdadero si el proceso sale 0.</text:p>
      <text:p text:style-name="Standard"><text:s text:c="4"/>Lo reproduje con una tarea que esperaba expected.txt y ejecutaba solo</text:p>
      <text:p text:style-name="Standard"><text:s text:c="4"/>python3 -c 'print("ok")': devolvió completed=True, files_created=[],</text:p>
      <text:p text:style-name="Standard"><text:s text:c="4"/>blockers=[]. Eso viola la regla de no inventar éxito sin evidencia real.</text:p>
      <text:p text:style-name="Standard"/>
      <text:p text:style-name="Standard"><text:s text:c="2"/>Estado</text:p>
      <text:p text:style-name="Standard"><text:s text:c="2"/>El sprint quedó bien acotado:</text:p>
      <text:p text:style-name="Standard"/>
      <text:p text:style-name="Standard"><text:s text:c="2"/>- existen workers/codex_worker.py y orchestrator/executor.py</text:p>
      <text:p text:style-name="Standard"><text:s text:c="2"/>- no se crearon validator.py, recovery.py ni benchmark.py</text:p>
      <text:p text:style-name="Standard"><text:s text:c="2"/>- probé éxito, fallo y timeout; esas rutas básicas sí funcionan</text:p>
      <text:p text:style-name="Standard"/>
      <text:p text:style-name="Standard"><text:s text:c="2"/>Riesgo residual:</text:p>
      <text:p text:style-name="Standard"/>
      <text:p text:style-name="Standard"><text:s text:c="2"/>- no vi tests nuevos persistidos para Sprint 3, así que este bug habría pasado</text:p>
      <text:p text:style-name="Standard"><text:s text:c="4"/>sin red de seguridad</text:p>
      <text:p text:style-name="Standard"/>
      <text:p text:style-name="Standard"><text:s text:c="2"/>Conclusión:</text:p>
      <text:p text:style-name="Standard"/>
      <text:p text:style-name="Standard"><text:s text:c="2"/>- Sprint 3 está bien encaminado, pero yo no lo aprobaría todavía hasta</text:p>
      <text:p text:style-name="Standard"><text:s text:c="4"/>corregir ese bug de evidencia/expected_files. Si quieres, te doy el prompt</text:p>
      <text:p text:style-name="Standard"><text:s text:c="4"/>exacto para que el otro agente lo arregle.</text:p>
      <text:p text:style-name="Standard"/>
      <text:p text:style-name="Standard"/>
      <text:p text:style-name="Standard">› dame el promt para corregir</text:p>
      <text:p text:style-name="Standard"/>
      <text:p text:style-name="Standard"/>
      <text:p text:style-name="Standard"><text:soft-page-break/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Corregir unicamente el bug detectado en Sprint 3.</text:p>
      <text:p text:style-name="Standard"><text:s text:c="2"/>No avances Sprint 4.</text:p>
      <text:p text:style-name="Standard"/>
      <text:p text:style-name="Standard"><text:s text:c="2"/>BUG A CORREGIR</text:p>
      <text:p text:style-name="Standard"/>
      <text:p text:style-name="Standard"><text:s text:c="2"/>BUG EN `workers/codex_worker.py`</text:p>
      <text:p text:style-name="Standard"><text:s text:c="2"/>Problema:</text:p>
      <text:p text:style-name="Standard"><text:s text:c="2"/>Hoy una tarea puede quedar con `completed = true` aunque no produzca la</text:p>
      <text:p text:style-name="Standard"><text:s text:c="2"/>evidencia real esperada en `expected_files`.</text:p>
      <text:p text:style-name="Standard"/>
      <text:p text:style-name="Standard"><text:s text:c="2"/>Caso reproducido:</text:p>
      <text:p text:style-name="Standard"><text:s text:c="2"/>- la tarea espera `expected.txt`</text:p>
      <text:p text:style-name="Standard"><text:s text:c="2"/>- el comando termina con codigo 0</text:p>
      <text:p text:style-name="Standard"><text:s text:c="2"/>- pero no crea `expected.txt`</text:p>
      <text:p text:style-name="Standard"><text:s text:c="2"/>- el worker devuelve:</text:p>
      <text:p text:style-name="Standard"><text:s text:c="4"/>- `completed = true`</text:p>
      <text:p text:style-name="Standard"><text:s text:c="4"/>- `files_created = []`</text:p>
      <text:p text:style-name="Standard"><text:s text:c="4"/>- `blockers = []`</text:p>
      <text:p text:style-name="Standard"/>
      <text:p text:style-name="Standard"><text:s text:c="2"/>Eso es incorrecto.</text:p>
      <text:p text:style-name="Standard"><text:s text:c="2"/>Viola la regla del sistema:</text:p>
      <text:p text:style-name="Standard"><text:s text:c="2"/>- no inventar exito sin evidencia real en disco</text:p>
      <text:p text:style-name="Standard"/>
      <text:p text:style-name="Standard"><text:s text:c="2"/>CORRECCION ESPERADA</text:p>
      <text:p text:style-name="Standard"><text:s text:c="2"/>- si al terminar faltan archivos de `expected_files`, la tarea NO puede quedar</text:p>
      <text:p text:style-name="Standard"><text:s text:c="2"/>`completed = true`</text:p>
      <text:p text:style-name="Standard"><text:s text:c="2"/>- la ausencia de evidencia esperada debe convertirse en blocker estructurado</text:p>
      <text:p text:style-name="Standard"><text:s text:c="2"/>- el resultado debe dejar claro cuales archivos esperados faltaron</text:p>
      <text:p text:style-name="Standard"><text:s text:c="2"/>- mantener compatibilidad con la estructura actual de `task_result`</text:p>
      <text:p text:style-name="Standard"><text:s text:c="2"/>- no romper los caminos ya funcionales:</text:p>
      <text:p text:style-name="Standard"><text:soft-page-break/><text:s text:c="4"/>- exito real</text:p>
      <text:p text:style-name="Standard"><text:s text:c="4"/>- fallo del proceso</text:p>
      <text:p text:style-name="Standard"><text:s text:c="4"/>- timeout</text:p>
      <text:p text:style-name="Standard"><text:s text:c="2"/>- si el archivo esperado ya existia antes y no fue creado ni modificado, la</text:p>
      <text:p text:style-name="Standard"><text:s text:c="2"/>logica debe seguir siendo razonable y no fingir evidencia nueva</text:p>
      <text:p text:style-name="Standard"><text:s text:c="2"/>- no conviertas Sprint 3 en Sprint 4; esto sigue siendo verificacion minima de</text:p>
      <text:p text:style-name="Standard"><text:s text:c="2"/>evidencia esperada, no validator.py completo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workers/codex_worker.py</text:p>
      <text:p text:style-name="Standard"><text:s text:c="2"/>- orchestrator/executor.py solo si es estrictamente necesario para</text:p>
      <text:p text:style-name="Standard"><text:s text:c="2"/>consistencia</text:p>
      <text:p text:style-name="Standard"><text:s text:c="2"/>- tests pequenos de Sprint 3 si decides agregarlos</text:p>
      <text:p text:style-name="Standard"/>
      <text:p text:style-name="Standard"><text:s text:c="2"/>RESTRICCIONES DURAS</text:p>
      <text:p text:style-name="Standard"><text:s text:c="2"/>- no implementar Sprint 4</text:p>
      <text:p text:style-name="Standard"><text:s text:c="2"/>- no crear validator.py</text:p>
      <text:p text:style-name="Standard"><text:s text:c="2"/>- no crear recovery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Caso de exito real</text:p>
      <text:p text:style-name="Standard"><text:s text:c="2"/>- si el comando crea el archivo esperado, `completed = true`</text:p>
      <text:p text:style-name="Standard"/>
      <text:p text:style-name="Standard"><text:s text:c="2"/>2. Caso de falso exito corregido</text:p>
      <text:p text:style-name="Standard"><text:s text:c="2"/>- si el comando termina con codigo 0 pero NO crea el archivo esperado,</text:p>
      <text:p text:style-name="Standard"><text:s text:c="2"/>`completed = false`</text:p>
      <text:p text:style-name="Standard"><text:s text:c="2"/>- debe existir blocker claro indicando que falta evidencia esperada</text:p>
      <text:p text:style-name="Standard"/>
      <text:p text:style-name="Standard"><text:s text:c="2"/>3. Caso de fallo</text:p>
      <text:p text:style-name="Standard"><text:s text:c="2"/>- si el proceso falla, sigue devolviendo `completed = false`</text:p>
      <text:p text:style-name="Standard"/>
      <text:p text:style-name="Standard"><text:s text:c="2"/>4. Caso de timeout</text:p>
      <text:p text:style-name="Standard"><text:s text:c="2"/>- si el proceso excede timeout, sigue devolviendo `completed = false`</text:p>
      <text:p text:style-name="Standard"/>
      <text:p text:style-name="Standard"><text:s text:c="2"/>SI AGREGAS TESTS</text:p>
      <text:p text:style-name="Standard"><text:s text:c="2"/>Mantenlos pequenos y enfocados solo en este bug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 corregido</text:p>
      <text:p text:style-name="Standard"><text:s text:c="2"/>3. validaciones ejecutadas</text:p>
      <text:p text:style-name="Standard"><text:s text:c="2"/>4. riesgos reales restantes</text:p>
      <text:p text:style-name="Standard"/>
      <text:p text:style-name="Standard"><text:soft-page-break/><text:s text:c="2"/>Cuando termine, yo te lo vuelvo a revisar.</text:p>
      <text:p text:style-name="Standard"/>
      <text:p text:style-name="Standard"/>
      <text:p text:style-name="Standard">› ya termino la correccion</text:p>
      <text:p text:style-name="Standard"/>
      <text:p text:style-name="Standard"/>
      <text:p text:style-name="Standard">• Voy a verificar si la corrección realmente cerró el falso éxito sin evidencia</text:p>
      <text:p text:style-name="Standard"><text:s text:c="2"/>y si no rompió los caminos de éxito, fallo y timeout.</text:p>
      <text:p text:style-name="Standard"/>
      <text:p text:style-name="Standard">• La corrección quedó localizada en el worker. Ahora voy a repetir exactamente</text:p>
      <text:p text:style-name="Standard"><text:s text:c="2"/>los cuatro escenarios: éxito real, falso éxito, fallo y timeout.</text:p>
      <text:p text:style-name="Standard"/>
      <text:p text:style-name="Standard">• Estoy esperando el resultado agregado de las cuatro pruebas; si alguna sigue</text:p>
      <text:p text:style-name="Standard"><text:s text:c="2"/>saliendo inconsistente, ahí mismo se ve.</text:p>
      <text:p text:style-name="Standard"/>
      <text:p text:style-name="Standard">• No encontré hallazgos bloqueantes. Doy la corrección por buena y con eso</text:p>
      <text:p text:style-name="Standard"><text:s text:c="2"/>Sprint 3 queda aprobado.</text:p>
      <text:p text:style-name="Standard"/>
      <text:p text:style-name="Standard"><text:s text:c="2"/>Verifiqué workers/codex_worker.py y repetí los 4 escenarios reales:</text:p>
      <text:p text:style-name="Standard"/>
      <text:p text:style-name="Standard"><text:s text:c="2"/>- éxito real: crea ok.txt y devuelve completed=True</text:p>
      <text:p text:style-name="Standard"><text:s text:c="2"/>- falso éxito: comando sale 0 pero no crea expected.txt, y ahora devuelve</text:p>
      <text:p text:style-name="Standard"><text:s text:c="4"/>completed=False con blocker Missing expected evidence files: expected.txt</text:p>
      <text:p text:style-name="Standard"><text:s text:c="2"/>- fallo: devuelve completed=False</text:p>
      <text:p text:style-name="Standard"><text:s text:c="2"/>- timeout: devuelve completed=False</text:p>
      <text:p text:style-name="Standard"/>
      <text:p text:style-name="Standard"><text:s text:c="2"/>También py_compile pasó para workers/codex_worker.py y orchestrator/</text:p>
      <text:p text:style-name="Standard"><text:s text:c="2"/>executor.py. La única reserva menor es que no veo tests nuevos persistidos</text:p>
      <text:p text:style-name="Standard"><text:s text:c="2"/>para este sprint, así que la corrección quedó validada por prueba manual</text:p>
      <text:p text:style-name="Standard"><text:s text:c="2"/>reproducible, no por suite automatizada.</text:p>
      <text:p text:style-name="Standard"/>
      <text:p text:style-name="Standard"><text:s text:c="2"/>Conclusión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/>
      <text:p text:style-name="Standard"><text:s text:c="2"/>Si quieres, te doy ya el prompt blindado para Sprint 4.</text:p>
      <text:p text:style-name="Standard"/>
      <text:p text:style-name="Standard"/>
      <text:p text:style-name="Standard">› dame el promt para la siguientre tarea <text:s/>sprint 4</text:p>
      <text:p text:style-name="Standard"/>
      <text:p text:style-name="Standard"/>
      <text:p text:style-name="Standard">• Usa este prompt para Sprint 4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oft-page-break/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Implementar SOLO Sprint 4.</text:p>
      <text:p text:style-name="Standard"/>
      <text:p text:style-name="Standard"><text:s text:c="2"/>ALCANCE EXACTO</text:p>
      <text:p text:style-name="Standard"><text:s text:c="2"/>Debes crear o dejar listo unicamente este elemento:</text:p>
      <text:p text:style-name="Standard"><text:s text:c="2"/>- orchestrator/validator.py</text:p>
      <text:p text:style-name="Standard"/>
      <text:p text:style-name="Standard"><text:s text:c="2"/>Puedes hacer ajustes minimos en Sprint 1, 2 o 3 solo si son estrictamente</text:p>
      <text:p text:style-name="Standard"><text:s text:c="2"/>necesarios para consistencia, pero no avances Sprint 5 o posteriores.</text:p>
      <text:p text:style-name="Standard"/>
      <text:p text:style-name="Standard"><text:s text:c="2"/>OBJETIVO FUNCIONAL DE SPRINT 4</text:p>
      <text:p text:style-name="Standard"><text:s text:c="2"/>Agregar validacion real por tarea con evidencia en disco y comandos</text:p>
      <text:p text:style-name="Standard"><text:s text:c="2"/>declarados.</text:p>
      <text:p text:style-name="Standard"/>
      <text:p text:style-name="Standard"><text:s text:c="2"/>REQUISITOS FUNCIONALES</text:p>
      <text:p text:style-name="Standard"/>
      <text:p text:style-name="Standard"><text:s text:c="2"/>1. `orchestrator/validator.py` debe poder:</text:p>
      <text:p text:style-name="Standard"><text:s text:c="2"/>- recibir una Task valida</text:p>
      <text:p text:style-name="Standard"><text:s text:c="2"/>- recibir un TaskResult o resultado de ejecucion compatible</text:p>
      <text:p text:style-name="Standard"><text:s text:c="2"/>- validar evidencia real en disco contra `expected_files`</text:p>
      <text:p text:style-name="Standard"><text:s text:c="2"/>- ejecutar `validation_commands` de la tarea</text:p>
      <text:p text:style-name="Standard"><text:s text:c="2"/>- capturar por cada validacion:</text:p>
      <text:p text:style-name="Standard"><text:s text:c="4"/>- comando</text:p>
      <text:p text:style-name="Standard"><text:s text:c="4"/>- returncode</text:p>
      <text:p text:style-name="Standard"><text:s text:c="4"/>- stdout</text:p>
      <text:p text:style-name="Standard"><text:s text:c="4"/>- stderr</text:p>
      <text:p text:style-name="Standard"><text:s text:c="4"/>- duracion</text:p>
      <text:p text:style-name="Standard"><text:s text:c="4"/>- timeout si ocurre</text:p>
      <text:p text:style-name="Standard"><text:s text:c="2"/>- decidir si la tarea pasa o falla</text:p>
      <text:p text:style-name="Standard"><text:s text:c="2"/>- devolver un resultado estructurado, claro y util para el runtime</text:p>
      <text:p text:style-name="Standard"/>
      <text:p text:style-name="Standard"><text:s text:c="2"/>2. La validacion debe cubrir como minimo:</text:p>
      <text:p text:style-name="Standard"><text:s text:c="2"/>- evidencia de `expected_files`</text:p>
      <text:p text:style-name="Standard"><text:s text:c="2"/>- consistencia minima con `files_created` y `files_modified`</text:p>
      <text:p text:style-name="Standard"><text:s text:c="2"/>- comandos de `validation_commands`</text:p>
      <text:p text:style-name="Standard"><text:s text:c="2"/>- estado final de validacion:</text:p>
      <text:p text:style-name="Standard"><text:s text:c="4"/>- `validation_passed = true` solo si la evidencia real existe y las</text:p>
      <text:p text:style-name="Standard"><text:s text:c="2"/>validaciones pasan</text:p>
      <text:p text:style-name="Standard"><text:s text:c="4"/>- `validation_passed = false` si falta evidencia o falla cualquier comando</text:p>
      <text:p text:style-name="Standard"/>
      <text:p text:style-name="Standard"><text:soft-page-break/><text:s text:c="2"/>3. Debe existir timeout para comandos de validacion.</text:p>
      <text:p text:style-name="Standard"><text:s text:c="2"/>- no dejar comandos colgados</text:p>
      <text:p text:style-name="Standard"><text:s text:c="2"/>- si un comando excede timeout, reportarlo como fallo estructurado</text:p>
      <text:p text:style-name="Standard"><text:s text:c="2"/>- no reventar el runtime completo por una validacion fallida</text:p>
      <text:p text:style-name="Standard"/>
      <text:p text:style-name="Standard"><text:s text:c="2"/>4. La salida del validator debe dejar claro:</text:p>
      <text:p text:style-name="Standard"><text:s text:c="2"/>- task_id</text:p>
      <text:p text:style-name="Standard"><text:s text:c="2"/>- validation_ran</text:p>
      <text:p text:style-name="Standard"><text:s text:c="2"/>- validation_passed</text:p>
      <text:p text:style-name="Standard"><text:s text:c="2"/>- blockers</text:p>
      <text:p text:style-name="Standard"><text:s text:c="2"/>- evidencia encontrada o faltante</text:p>
      <text:p text:style-name="Standard"><text:s text:c="2"/>- recomendacion siguiente</text:p>
      <text:p text:style-name="Standard"/>
      <text:p text:style-name="Standard"><text:s text:c="2"/>5. Integracion esperada con Sprint 3</text:p>
      <text:p text:style-name="Standard"><text:s text:c="2"/>- no reescribir el worker</text:p>
      <text:p text:style-name="Standard"><text:s text:c="2"/>- no reescribir el executor completo</text:p>
      <text:p text:style-name="Standard"><text:s text:c="2"/>- el validator debe poder trabajar sobre el resultado de una tarea ya</text:p>
      <text:p text:style-name="Standard"><text:s text:c="2"/>ejecutada</text:p>
      <text:p text:style-name="Standard"><text:s text:c="2"/>- debe quedar listo el camino para que Sprint 5 use esta informacion en</text:p>
      <text:p text:style-name="Standard"><text:s text:c="2"/>recovery</text:p>
      <text:p text:style-name="Standard"/>
      <text:p text:style-name="Standard"><text:s text:c="2"/>DISENO PRAGMATICO</text:p>
      <text:p text:style-name="Standard"><text:s text:c="2"/>- no intentes meter todavia recovery.py</text:p>
      <text:p text:style-name="Standard"><text:s text:c="2"/>- no intentes meter benchmarks</text:p>
      <text:p text:style-name="Standard"><text:s text:c="2"/>- no intentes migrar agent_runtime.py</text:p>
      <text:p text:style-name="Standard"><text:s text:c="2"/>- no conviertas validator.py en un framework gigante</text:p>
      <text:p text:style-name="Standard"><text:s text:c="2"/>- mantenlo pequeno, claro y orientado a evidencia real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4 coherente, pero no implementes todavia:</text:p>
      <text:p text:style-name="Standard"><text:s text:c="2"/>- orchestrator/recovery.py</text:p>
      <text:p text:style-name="Standard"><text:s text:c="2"/>- orchestrator/benchmark.py</text:p>
      <text:p text:style-name="Standard"><text:s text:c="2"/>- integracion final con directive generator</text:p>
      <text:p text:style-name="Standard"><text:s text:c="2"/>- migracion completa de agent_runtime.py</text:p>
      <text:p text:style-name="Standard"/>
      <text:p text:style-name="Standard"><text:s text:c="2"/>RESTRICCIONES DURAS</text:p>
      <text:p text:style-name="Standard"><text:s text:c="2"/>- no implementar Sprint 5 ni posteriores</text:p>
      <text:p text:style-name="Standard"><text:s text:c="2"/>- no crear recovery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4 queda correcto si:</text:p>
      <text:p text:style-name="Standard"><text:s text:c="2"/>- existe `orchestrator/validator.py`</text:p>
      <text:p text:style-name="Standard"><text:s text:c="2"/>- valida evidencia real en disco</text:p>
      <text:p text:style-name="Standard"><text:s text:c="2"/>- ejecuta `validation_commands`</text:p>
      <text:p text:style-name="Standard"><text:s text:c="2"/>- distingue exito, fallo y timeout de validacion</text:p>
      <text:p text:style-name="Standard"><text:s text:c="2"/>- devuelve resultado estructurado util para el runtime</text:p>
      <text:p text:style-name="Standard"><text:soft-page-break/><text:s text:c="2"/>- deja listo el camino para Sprint 5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Caso valido</text:p>
      <text:p text:style-name="Standard"><text:s text:c="2"/>- una tarea con archivo esperado real y comando de validacion exitoso queda</text:p>
      <text:p text:style-name="Standard"><text:s text:c="2"/>con `validation_passed = true`</text:p>
      <text:p text:style-name="Standard"/>
      <text:p text:style-name="Standard"><text:s text:c="2"/>2. Caso de evidencia faltante</text:p>
      <text:p text:style-name="Standard"><text:s text:c="2"/>- si falta un `expected_file`, `validation_passed = false`</text:p>
      <text:p text:style-name="Standard"/>
      <text:p text:style-name="Standard"><text:s text:c="2"/>3. Caso de comando fallido</text:p>
      <text:p text:style-name="Standard"><text:s text:c="2"/>- si un `validation_command` falla, `validation_passed = false`</text:p>
      <text:p text:style-name="Standard"/>
      <text:p text:style-name="Standard"><text:s text:c="2"/>4. Caso de timeout</text:p>
      <text:p text:style-name="Standard"><text:s text:c="2"/>- si un `validation_command` excede timeout, `validation_passed = false`</text:p>
      <text:p text:style-name="Standard"/>
      <text:p text:style-name="Standard"><text:s text:c="2"/>5. Compatibilidad</text:p>
      <text:p text:style-name="Standard"><text:s text:c="2"/>- el validator puede trabajar con la estructura producida por Sprint 3 sin</text:p>
      <text:p text:style-name="Standard"><text:s text:c="2"/>romper contratos existentes</text:p>
      <text:p text:style-name="Standard"/>
      <text:p text:style-name="Standard"><text:s text:c="2"/>SI AGREGAS TESTS</text:p>
      <text:p text:style-name="Standard"><text:s text:c="2"/>Mantenlos pequenos y enfocados solo en Sprint 4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5</text:p>
      <text:p text:style-name="Standard"/>
      <text:p text:style-name="Standard"><text:s text:c="2"/>Cuando termine, yo te hago la revisión.</text:p>
      <text:p text:style-name="Standard"/>
      <text:p text:style-name="Standard"/>
      <text:p text:style-name="Standard">› ya tewrmino</text:p>
      <text:p text:style-name="Standard"/>
      <text:p text:style-name="Standard"/>
      <text:p text:style-name="Standard">• Voy a revisar si Sprint 4 quedó acotado, si validator.py funciona de verdad</text:p>
      <text:p text:style-name="Standard"><text:s text:c="2"/>con evidencia, comando fallido y timeout, y si no se desvió hacia Sprint 5.</text:p>
      <text:p text:style-name="Standard"/>
      <text:p text:style-name="Standard">• El validator quedó en un solo archivo y no invadió Sprint 5. Ahora voy a</text:p>
      <text:p text:style-name="Standard"><text:s text:c="2"/>correr cuatro pruebas reales: caso válido, evidencia faltante, comando fallido</text:p>
      <text:p text:style-name="Standard"><text:s text:c="2"/>y timeout.</text:p>
      <text:p text:style-name="Standard"/>
      <text:p text:style-name="Standard">• Las cuatro rutas principales pasaron. Voy a hacer una comprobación fina:</text:p>
      <text:p text:style-name="Standard"><text:s text:c="2"/>consistencia con files_created/files_modified reportados y si hay alguna</text:p>
      <text:p text:style-name="Standard"><text:s text:c="2"/>validación nueva persistida en tests.</text:p>
      <text:p text:style-name="Standard"/>
      <text:p text:style-name="Standard">• No encontré hallazgos bloqueantes. Doy Sprint 4 por aprobado.</text:p>
      <text:p text:style-name="Standard"/>
      <text:p text:style-name="Standard"><text:s text:c="2"/>Qué verifiqué en orchestrator/validator.py:</text:p>
      <text:p text:style-name="Standard"><text:soft-page-break/></text:p>
      <text:p text:style-name="Standard"><text:s text:c="2"/>- caso válido: expected_file real + validation_command exitoso =&gt;</text:p>
      <text:p text:style-name="Standard"><text:s text:c="4"/>validation_passed=True</text:p>
      <text:p text:style-name="Standard"><text:s text:c="2"/>- evidencia faltante =&gt; validation_passed=False</text:p>
      <text:p text:style-name="Standard"><text:s text:c="2"/>- comando fallido =&gt; validation_passed=False</text:p>
      <text:p text:style-name="Standard"><text:s text:c="2"/>- timeout de validación =&gt; validation_passed=False</text:p>
      <text:p text:style-name="Standard"><text:s text:c="2"/>- inconsistencia en files_created/files_modified reportados =&gt; blocker</text:p>
      <text:p text:style-name="Standard"><text:s text:c="4"/>estructurado</text:p>
      <text:p text:style-name="Standard"><text:s text:c="2"/>- no se creó recovery.py ni benchmark.py</text:p>
      <text:p text:style-name="Standard"/>
      <text:p text:style-name="Standard"><text:s text:c="2"/>Validación real que corrí:</text:p>
      <text:p text:style-name="Standard"/>
      <text:p text:style-name="Standard"><text:s text:c="2"/>- py_compile del validator pasó</text:p>
      <text:p text:style-name="Standard"><text:s text:c="2"/>- pruebas manuales de los 4 escenarios principales pasaron</text:p>
      <text:p text:style-name="Standard"><text:s text:c="2"/>- prueba adicional de inconsistencia de archivos reportados también pasó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4, así que la</text:p>
      <text:p text:style-name="Standard"><text:s text:c="4"/>cobertura quedó validada por ejecución manual reproducible, no por suite</text:p>
      <text:p text:style-name="Standard"><text:s text:c="4"/>dedicada</text:p>
      <text:p text:style-name="Standard"/>
      <text:p text:style-name="Standard"><text:s text:c="2"/>Estado global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/>
      <text:p text:style-name="Standard"><text:s text:c="2"/>Si quieres, te doy ahora el prompt blindado para Sprint 5.</text:p>
      <text:p text:style-name="Standard"/>
      <text:p text:style-name="Standard"/>
      <text:p text:style-name="Standard">› si</text:p>
      <text:p text:style-name="Standard"/>
      <text:p text:style-name="Standard"/>
      <text:p text:style-name="Standard">• Usa este prompt para Sprint 5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oft-page-break/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Implementar SOLO Sprint 5.</text:p>
      <text:p text:style-name="Standard"/>
      <text:p text:style-name="Standard"><text:s text:c="2"/>ALCANCE EXACTO</text:p>
      <text:p text:style-name="Standard"><text:s text:c="2"/>Debes crear o dejar listo unicamente este elemento:</text:p>
      <text:p text:style-name="Standard"><text:s text:c="2"/>- orchestrator/recovery.py</text:p>
      <text:p text:style-name="Standard"/>
      <text:p text:style-name="Standard"><text:s text:c="2"/>Puedes hacer ajustes minimos en Sprint 1, 2, 3 o 4 solo si son estrictamente</text:p>
      <text:p text:style-name="Standard"><text:s text:c="2"/>necesarios para consistencia, pero no avances benchmarks ni integraciones</text:p>
      <text:p text:style-name="Standard"><text:s text:c="2"/>posteriores.</text:p>
      <text:p text:style-name="Standard"/>
      <text:p text:style-name="Standard"><text:s text:c="2"/>OBJETIVO FUNCIONAL DE SPRINT 5</text:p>
      <text:p text:style-name="Standard"><text:s text:c="2"/>Agregar recovery robusto por tarea, con registro de fallos, checkpoints,</text:p>
      <text:p text:style-name="Standard"><text:s text:c="2"/>reintento limpio, bloqueo por limite y cierre garantizado de procesos.</text:p>
      <text:p text:style-name="Standard"/>
      <text:p text:style-name="Standard"><text:s text:c="2"/>REQUISITOS FUNCIONALES</text:p>
      <text:p text:style-name="Standard"/>
      <text:p text:style-name="Standard"><text:s text:c="2"/>1. `orchestrator/recovery.py` debe poder:</text:p>
      <text:p text:style-name="Standard"><text:s text:c="2"/>- registrar el fallo de una tarea en `runtime/failures.jsonl`</text:p>
      <text:p text:style-name="Standard"><text:s text:c="2"/>- crear checkpoint en `runtime/checkpoints/`</text:p>
      <text:p text:style-name="Standard"><text:s text:c="2"/>- decidir accion de recovery por tarea</text:p>
      <text:p text:style-name="Standard"><text:s text:c="2"/>- soportar acciones al menos de este tipo:</text:p>
      <text:p text:style-name="Standard"><text:s text:c="4"/>- retry</text:p>
      <text:p text:style-name="Standard"><text:s text:c="4"/>- block</text:p>
      <text:p text:style-name="Standard"><text:s text:c="4"/>- split</text:p>
      <text:p text:style-name="Standard"><text:s text:c="4"/>- noop</text:p>
      <text:p text:style-name="Standard"><text:s text:c="2"/>- dejar resultado estructurado y claro para el runtime</text:p>
      <text:p text:style-name="Standard"/>
      <text:p text:style-name="Standard"><text:s text:c="2"/>2. Debe existir un helper de cierre garantizado de procesos:</text:p>
      <text:p text:style-name="Standard"><text:s text:c="2"/>- `terminate()`</text:p>
      <text:p text:style-name="Standard"><text:s text:c="2"/>- `wait`</text:p>
      <text:p text:style-name="Standard"><text:s text:c="2"/>- `kill()` si el proceso sigue vivo</text:p>
      <text:p text:style-name="Standard"><text:s text:c="2"/>- devolver trazabilidad estructurada del cierre</text:p>
      <text:p text:style-name="Standard"><text:s text:c="2"/>- no dejar procesos zombies si el cierre normal falla</text:p>
      <text:p text:style-name="Standard"/>
      <text:p text:style-name="Standard"><text:s text:c="2"/>3. Politica minima de recovery</text:p>
      <text:p text:style-name="Standard"><text:s text:c="2"/>- si una tarea falla pero aun no supera `max_retries`, puede ir a retry</text:p>
      <text:p text:style-name="Standard"><text:s text:c="2"/>- si supera `max_retries`, debe quedar bloqueada</text:p>
      <text:p text:style-name="Standard"><text:s text:c="2"/>- si el fallo sugiere tarea demasiado grande, debe poder proponer split</text:p>
      <text:p text:style-name="Standard"><text:s text:c="2"/>- si la tarea ya estaba bien validada, no inventar recovery innecesario</text:p>
      <text:p text:style-name="Standard"/>
      <text:p text:style-name="Standard"><text:s text:c="2"/>4. Reintento limpio</text:p>
      <text:p text:style-name="Standard"><text:s text:c="2"/>- no depender de una sesion larga</text:p>
      <text:p text:style-name="Standard"><text:s text:c="2"/>- el recovery debe trabajar sobre estado persistido y resultados estructurados</text:p>
      <text:p text:style-name="Standard"><text:s text:c="2"/>- debe dejar claro por que se reintenta</text:p>
      <text:p text:style-name="Standard"><text:s text:c="2"/>- debe dejar claro desde que checkpoint se retoma</text:p>
      <text:p text:style-name="Standard"/>
      <text:p text:style-name="Standard"><text:s text:c="2"/>5. Split minimo pragmatico</text:p>
      <text:p text:style-name="Standard"><text:soft-page-break/><text:s text:c="2"/>- no necesitas hacer inteligencia total</text:p>
      <text:p text:style-name="Standard"><text:s text:c="2"/>- pero si el fallo es por timeout o por bloqueo de alcance, debe poder generar</text:p>
      <text:p text:style-name="Standard"><text:s text:c="2"/>una propuesta simple y determinista de subtareas</text:p>
      <text:p text:style-name="Standard"><text:s text:c="2"/>- si usas una heuristica, mantenla pequena y explicita</text:p>
      <text:p text:style-name="Standard"><text:s text:c="2"/>- ejemplo aceptable:</text:p>
      <text:p text:style-name="Standard"><text:s text:c="4"/>- dividir por `expected_files`</text:p>
      <text:p text:style-name="Standard"><text:s text:c="4"/>- dividir por segmentos del `goal`</text:p>
      <text:p text:style-name="Standard"><text:s text:c="4"/>- dividir por unidades concretas y verificables</text:p>
      <text:p text:style-name="Standard"/>
      <text:p text:style-name="Standard"><text:s text:c="2"/>6. Integracion con sprints anteriores</text:p>
      <text:p text:style-name="Standard"><text:s text:c="2"/>- usar `state_store.py`</text:p>
      <text:p text:style-name="Standard"><text:s text:c="2"/>- usar contratos existentes</text:p>
      <text:p text:style-name="Standard"><text:s text:c="2"/>- ser compatible con `planner.py`, `task_queue.py`, `executor.py` y</text:p>
      <text:p text:style-name="Standard"><text:s text:c="2"/>`validator.py`</text:p>
      <text:p text:style-name="Standard"><text:s text:c="2"/>- no migrar todavia `agent_runtime.py`</text:p>
      <text:p text:style-name="Standard"/>
      <text:p text:style-name="Standard"><text:s text:c="2"/>DISENO PRAGMATICO</text:p>
      <text:p text:style-name="Standard"><text:s text:c="2"/>- no implementar benchmark.py</text:p>
      <text:p text:style-name="Standard"><text:s text:c="2"/>- no implementar directive generator todavia</text:p>
      <text:p text:style-name="Standard"><text:s text:c="2"/>- no implementar integracion final con HABLA BASIC todavia</text:p>
      <text:p text:style-name="Standard"><text:s text:c="2"/>- no convertir recovery.py en un framework enorme</text:p>
      <text:p text:style-name="Standard"><text:s text:c="2"/>- mantenlo pequeno, claro, estructurado y usable</text:p>
      <text:p text:style-name="Standard"/>
      <text:p text:style-name="Standard"><text:s text:c="2"/>SI NECESITAS APOYO MINIMO</text:p>
      <text:p text:style-name="Standard"><text:s text:c="2"/>Puedes agregar stubs pequenos y seguros solo si son inevitables para dejar</text:p>
      <text:p text:style-name="Standard"><text:s text:c="2"/>Sprint 5 coherente, pero no implementes todavia:</text:p>
      <text:p text:style-name="Standard"><text:s text:c="2"/>- orchestrator/benchmark.py</text:p>
      <text:p text:style-name="Standard"><text:s text:c="2"/>- integracion final con AGENTS/PLANS como loader operativo</text:p>
      <text:p text:style-name="Standard"><text:s text:c="2"/>- directive generator</text:p>
      <text:p text:style-name="Standard"><text:s text:c="2"/>- migracion completa de agent_runtime.py</text:p>
      <text:p text:style-name="Standard"/>
      <text:p text:style-name="Standard"><text:s text:c="2"/>RESTRICCIONES DURAS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5 queda correcto si:</text:p>
      <text:p text:style-name="Standard"><text:s text:c="2"/>- existe `orchestrator/recovery.py`</text:p>
      <text:p text:style-name="Standard"><text:s text:c="2"/>- registra fallos en `runtime/failures.jsonl`</text:p>
      <text:p text:style-name="Standard"><text:s text:c="2"/>- crea checkpoints</text:p>
      <text:p text:style-name="Standard"><text:s text:c="2"/>- decide retry vs block de forma clara</text:p>
      <text:p text:style-name="Standard"><text:s text:c="2"/>- soporta split simple para tareas demasiado grandes</text:p>
      <text:p text:style-name="Standard"><text:s text:c="2"/>- existe helper de cierre garantizado `terminate -&gt; wait -&gt; kill`</text:p>
      <text:p text:style-name="Standard"><text:s text:c="2"/>- deja resultado estructurado util para el runtime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Registro de fallo</text:p>
      <text:p text:style-name="Standard"><text:soft-page-break/><text:s text:c="2"/>- un fallo produce entrada en `failures.jsonl`</text:p>
      <text:p text:style-name="Standard"/>
      <text:p text:style-name="Standard"><text:s text:c="2"/>2. Checkpoint</text:p>
      <text:p text:style-name="Standard"><text:s text:c="2"/>- el recovery guarda un checkpoint real en disco</text:p>
      <text:p text:style-name="Standard"/>
      <text:p text:style-name="Standard"><text:s text:c="2"/>3. Retry</text:p>
      <text:p text:style-name="Standard"><text:s text:c="2"/>- una tarea fallida por debajo de `max_retries` produce decision `retry`</text:p>
      <text:p text:style-name="Standard"/>
      <text:p text:style-name="Standard"><text:s text:c="2"/>4. Block</text:p>
      <text:p text:style-name="Standard"><text:s text:c="2"/>- una tarea que supera `max_retries` produce decision `block`</text:p>
      <text:p text:style-name="Standard"/>
      <text:p text:style-name="Standard"><text:s text:c="2"/>5. Split</text:p>
      <text:p text:style-name="Standard"><text:s text:c="2"/>- una tarea marcada como demasiado grande o con timeout puede producir una</text:p>
      <text:p text:style-name="Standard"><text:s text:c="2"/>propuesta simple de subtareas</text:p>
      <text:p text:style-name="Standard"/>
      <text:p text:style-name="Standard"><text:s text:c="2"/>6. Cierre garantizado</text:p>
      <text:p text:style-name="Standard"><text:s text:c="2"/>- el helper intenta `terminate`</text:p>
      <text:p text:style-name="Standard"><text:s text:c="2"/>- espera</text:p>
      <text:p text:style-name="Standard"><text:s text:c="2"/>- y si hace falta usa `kill`</text:p>
      <text:p text:style-name="Standard"><text:s text:c="2"/>- deja resultado estructurado de ese cierre</text:p>
      <text:p text:style-name="Standard"/>
      <text:p text:style-name="Standard"><text:s text:c="2"/>SI AGREGAS TESTS</text:p>
      <text:p text:style-name="Standard"><text:s text:c="2"/>Mantenlos pequenos y enfocados solo en Sprint 5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la siguiente etapa</text:p>
      <text:p text:style-name="Standard"/>
      <text:p text:style-name="Standard"><text:s text:c="2"/>Cuando termine, yo te lo audito.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verificar si Sprint 5 quedó en alcance, si recovery.py funciona de</text:p>
      <text:p text:style-name="Standard"><text:s text:c="2"/>verdad con retry, block, split y registro en disco, y si no se desvió a</text:p>
      <text:p text:style-name="Standard"><text:s text:c="2"/>benchmarks o etapas posteriores.</text:p>
      <text:p text:style-name="Standard"/>
      <text:p text:style-name="Standard">• No apareció recovery.py en la ruta correcta. Voy a comprobar si el agente lo</text:p>
      <text:p text:style-name="Standard"><text:s text:c="2"/>dejó en otro lugar o si simplemente no materializó nada de Sprint 5.</text:p>
      <text:p text:style-name="Standard"/>
      <text:p text:style-name="Standard">• Voy a hacer una comprobación final del runtime/ para confirmar si al menos</text:p>
      <text:p text:style-name="Standard"><text:s text:c="2"/>dejó evidencia de fallos o checkpoints de Sprint 5, porque por código no</text:p>
      <text:p text:style-name="Standard"><text:s text:c="2"/>apareció ningún módulo nuevo.</text:p>
      <text:p text:style-name="Standard"/>
      <text:p text:style-name="Standard">• No. Sprint 5 no quedó hecho.</text:p>
      <text:p text:style-name="Standard"/>
      <text:p text:style-name="Standard"><text:s text:c="2"/>Hallazgo principal:</text:p>
      <text:p text:style-name="Standard"/>
      <text:p text:style-name="Standard"><text:soft-page-break/><text:s text:c="2"/>- Falta por completo orchestrator/recovery.py. En la revisión de hoy, 12 de</text:p>
      <text:p text:style-name="Standard"><text:s text:c="4"/>mayo de 2026, no existe ese archivo en la raíz del repo, así que el sprint</text:p>
      <text:p text:style-name="Standard"><text:s text:c="4"/>no puede aprobarse.</text:p>
      <text:p text:style-name="Standard"/>
      <text:p text:style-name="Standard"><text:s text:c="2"/>Evidencia:</text:p>
      <text:p text:style-name="Standard"/>
      <text:p text:style-name="Standard"><text:s text:c="2"/>- En orchestrator/ solo están contracts.py, executor.py, planner.py,</text:p>
      <text:p text:style-name="Standard"><text:s text:c="4"/>state_store.py, task_queue.py y validator.py.</text:p>
      <text:p text:style-name="Standard"><text:s text:c="2"/>- No apareció benchmark.py, lo cual está bien.</text:p>
      <text:p text:style-name="Standard"><text:s text:c="2"/>- Los únicos archivos nuevos o tocados en este tramo fueron validator.py y</text:p>
      <text:p text:style-name="Standard"><text:s text:c="4"/>codex_worker.py, no recovery.py.</text:p>
      <text:p text:style-name="Standard"><text:s text:c="2"/>- runtime/failures.jsonl sigue vacío.</text:p>
      <text:p text:style-name="Standard"><text:s text:c="2"/>- runtime/task_history.jsonl sigue vacío.</text:p>
      <text:p text:style-name="Standard"><text:s text:c="2"/>- runtime/checkpoints/ existe como carpeta, pero no vi evidencia nueva de</text:p>
      <text:p text:style-name="Standard"><text:s text:c="4"/>checkpoints del sprint.</text:p>
      <text:p text:style-name="Standard"/>
      <text:p text:style-name="Standard"><text:s text:c="2"/>Conclusión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><text:s text:c="2"/>- Sprint 5: rechazado por incompleto</text:p>
      <text:p text:style-name="Standard"/>
      <text:p text:style-name="Standard"><text:s text:c="2"/>Si quieres, te doy ahora mismo un prompt correctivo, corto y duro, para que el</text:p>
      <text:p text:style-name="Standard"><text:s text:c="2"/>otro agente haga solo recovery.py y no vuelva a desviarse.</text:p>
      <text:p text:style-name="Standard"/>
      <text:p text:style-name="Standard"/>
      <text:p text:style-name="Standard">› si</text:p>
      <text:p text:style-name="Standard"/>
      <text:p text:style-name="Standard"/>
      <text:p text:style-name="Standard">• Usa este prompt correctivo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/>
      <text:p text:style-name="Standard"><text:soft-page-break/><text:s text:c="2"/>ESTADO REAL</text:p>
      <text:p text:style-name="Standard"><text:s text:c="2"/>Sprint 5 NO quedó hecho.</text:p>
      <text:p text:style-name="Standard"><text:s text:c="2"/>Falta por completo:</text:p>
      <text:p text:style-name="Standard"><text:s text:c="2"/>- orchestrator/recovery.py</text:p>
      <text:p text:style-name="Standard"/>
      <text:p text:style-name="Standard"><text:s text:c="2"/>OBJETIVO DE ESTA CORRIDA</text:p>
      <text:p text:style-name="Standard"><text:s text:c="2"/>Implementar SOLO `orchestrator/recovery.py` para cerrar Sprint 5.</text:p>
      <text:p text:style-name="Standard"><text:s text:c="2"/>No avances nada posterior.</text:p>
      <text:p text:style-name="Standard"/>
      <text:p text:style-name="Standard"><text:s text:c="2"/>ALCANCE EXACTO</text:p>
      <text:p text:style-name="Standard"><text:s text:c="2"/>Debes crear:</text:p>
      <text:p text:style-name="Standard"><text:s text:c="2"/>- orchestrator/recovery.py</text:p>
      <text:p text:style-name="Standard"/>
      <text:p text:style-name="Standard"><text:s text:c="2"/>Puedes hacer ajustes minimos en archivos anteriores solo si son estrictamente</text:p>
      <text:p text:style-name="Standard"><text:s text:c="2"/>inevitables para consistencia, pero el foco real es `recovery.py`.</text:p>
      <text:p text:style-name="Standard"/>
      <text:p text:style-name="Standard"><text:s text:c="2"/>REQUISITOS FUNCIONALES OBLIGATORIOS</text:p>
      <text:p text:style-name="Standard"/>
      <text:p text:style-name="Standard"><text:s text:c="2"/>1. Registro de fallo</text:p>
      <text:p text:style-name="Standard"><text:s text:c="2"/>Debes poder registrar un fallo en:</text:p>
      <text:p text:style-name="Standard"><text:s text:c="2"/>- runtime/failures.jsonl</text:p>
      <text:p text:style-name="Standard"/>
      <text:p text:style-name="Standard"><text:s text:c="2"/>2. Checkpoint</text:p>
      <text:p text:style-name="Standard"><text:s text:c="2"/>Debes poder guardar un checkpoint real en:</text:p>
      <text:p text:style-name="Standard"><text:s text:c="2"/>- runtime/checkpoints/</text:p>
      <text:p text:style-name="Standard"/>
      <text:p text:style-name="Standard"><text:s text:c="2"/>3. Decisión de recovery</text:p>
      <text:p text:style-name="Standard"><text:s text:c="2"/>Debes soportar al menos estas decisiones estructuradas:</text:p>
      <text:p text:style-name="Standard"><text:s text:c="2"/>- retry</text:p>
      <text:p text:style-name="Standard"><text:s text:c="2"/>- block</text:p>
      <text:p text:style-name="Standard"><text:s text:c="2"/>- split</text:p>
      <text:p text:style-name="Standard"><text:s text:c="2"/>- noop</text:p>
      <text:p text:style-name="Standard"/>
      <text:p text:style-name="Standard"><text:s text:c="2"/>4. Política mínima</text:p>
      <text:p text:style-name="Standard"><text:s text:c="2"/>- si una tarea falla y `retry_count &lt; max_retries`, decisión = `retry`</text:p>
      <text:p text:style-name="Standard"><text:s text:c="2"/>- si `retry_count &gt;= max_retries`, decisión = `block`</text:p>
      <text:p text:style-name="Standard"><text:s text:c="2"/>- si el fallo sugiere tarea demasiado grande o timeout, debe poder proponer</text:p>
      <text:p text:style-name="Standard"><text:s text:c="2"/>`split`</text:p>
      <text:p text:style-name="Standard"><text:s text:c="2"/>- si no hace falta acción, puede devolver `noop`</text:p>
      <text:p text:style-name="Standard"/>
      <text:p text:style-name="Standard"><text:s text:c="2"/>5. Split pragmático</text:p>
      <text:p text:style-name="Standard"><text:s text:c="2"/>No intentes inteligencia total.</text:p>
      <text:p text:style-name="Standard"><text:s text:c="2"/>Una heurística simple y explícita es suficiente.</text:p>
      <text:p text:style-name="Standard"><text:s text:c="2"/>Ejemplos aceptables:</text:p>
      <text:p text:style-name="Standard"><text:s text:c="2"/>- dividir por `expected_files`</text:p>
      <text:p text:style-name="Standard"><text:s text:c="2"/>- dividir por partes del `goal`</text:p>
      <text:p text:style-name="Standard"><text:s text:c="2"/>- dividir en subtareas pequeñas y verificables</text:p>
      <text:p text:style-name="Standard"/>
      <text:p text:style-name="Standard"><text:s text:c="2"/>6. Cierre garantizado de procesos</text:p>
      <text:p text:style-name="Standard"><text:s text:c="2"/>Debes incluir helper que haga:</text:p>
      <text:p text:style-name="Standard"><text:s text:c="2"/>- terminate()</text:p>
      <text:p text:style-name="Standard"><text:s text:c="2"/>- wait</text:p>
      <text:p text:style-name="Standard"><text:soft-page-break/><text:s text:c="2"/>- kill() si sigue vivo</text:p>
      <text:p text:style-name="Standard"><text:s text:c="2"/>Y debe devolver resultado estructurado del cierre.</text:p>
      <text:p text:style-name="Standard"/>
      <text:p text:style-name="Standard"><text:s text:c="2"/>7. Compatibilidad</text:p>
      <text:p text:style-name="Standard"><text:s text:c="2"/>Debe ser compatible con:</text:p>
      <text:p text:style-name="Standard"><text:s text:c="2"/>- state_store.py</text:p>
      <text:p text:style-name="Standard"><text:s text:c="2"/>- contracts.py</text:p>
      <text:p text:style-name="Standard"><text:s text:c="2"/>- planner.py</text:p>
      <text:p text:style-name="Standard"><text:s text:c="2"/>- task_queue.py</text:p>
      <text:p text:style-name="Standard"><text:s text:c="2"/>- executor.py</text:p>
      <text:p text:style-name="Standard"><text:s text:c="2"/>- validator.py</text:p>
      <text:p text:style-name="Standard"/>
      <text:p text:style-name="Standard"><text:s text:c="2"/>RESTRICCIONES DURAS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modificar otros sprints salvo ajuste minimo inevitable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un fallo produce entrada en `runtime/failures.jsonl`</text:p>
      <text:p text:style-name="Standard"><text:s text:c="2"/>2. se crea un checkpoint real en `runtime/checkpoints/`</text:p>
      <text:p text:style-name="Standard"><text:s text:c="2"/>3. una tarea con retries disponibles devuelve `retry`</text:p>
      <text:p text:style-name="Standard"><text:s text:c="2"/>4. una tarea que supera `max_retries` devuelve `block`</text:p>
      <text:p text:style-name="Standard"><text:s text:c="2"/>5. una tarea por timeout o tarea demasiado grande puede producir `split`</text:p>
      <text:p text:style-name="Standard"><text:s text:c="2"/>6. el helper de cierre garantizado intenta `terminate`, espera y usa `kill` si</text:p>
      <text:p text:style-name="Standard"><text:s text:c="2"/>hace falta</text:p>
      <text:p text:style-name="Standard"><text:s text:c="2"/>7. todo eso devuelve estructura clara y util para el runtime</text:p>
      <text:p text:style-name="Standard"/>
      <text:p text:style-name="Standard"><text:s text:c="2"/>SI AGREGAS TESTS</text:p>
      <text:p text:style-name="Standard"><text:s text:c="2"/>Mantenlos pequenos y enfocados solo en Sprint 5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 restantes</text:p>
      <text:p text:style-name="Standard"><text:s text:c="2"/>4. confirmacion explicita de que `orchestrator/recovery.py` existe en la raiz</text:p>
      <text:p text:style-name="Standard"><text:s text:c="2"/>del repo</text:p>
      <text:p text:style-name="Standard"/>
      <text:p text:style-name="Standard"><text:s text:c="2"/>Cuando termine, yo te lo vuelvo a auditar.</text:p>
      <text:p text:style-name="Standard"/>
      <text:p text:style-name="Standard"/>
      <text:p text:style-name="Standard">› ya termino y esto dijo Sprint 5 quedó implementado. Confirmación explícita:</text:p>
      <text:p text:style-name="Standard"><text:s text:c="2"/>orchestrator/recovery.py existe en la raíz del repo.</text:p>
      <text:p text:style-name="Standard"/>
      <text:p text:style-name="Standard"><text:s text:c="4"/>Archivos Tocados</text:p>
      <text:p text:style-name="Standard"/>
      <text:p text:style-name="Standard"><text:s text:c="4"/>- [orchestrator/recovery.py](/home/neurodriver/BASE</text:p>
      <text:p text:style-name="Standard"><text:soft-page-break/><text:s text:c="2"/>_METACOGNICION_COLOMBIA/vista_IA/architecture-react-three-flask-socketio/</text:p>
      <text:p text:style-name="Standard"><text:s text:c="2"/>orchestrator/recovery.py)</text:p>
      <text:p text:style-name="Standard"><text:s text:c="4"/>- [runtime/failures.jsonl](/home/neurodriver/BASE _METACOGNICION_COLOMBIA/</text:p>
      <text:p text:style-name="Standard"><text:s text:c="2"/>vista_IA/architecture-react-three-flask-socketio/runtime/failures.jsonl)</text:p>
      <text:p text:style-name="Standard"><text:s text:c="4"/>- [runtime/checkpoints/sprint5-validation-b87ef09d4226.json](/home/</text:p>
      <text:p text:style-name="Standard"><text:s text:c="2"/>neurodriver/BASE _METACOGNICION_COLOMBIA/vista_IA/architecture-react-three-</text:p>
      <text:p text:style-name="Standard"><text:s text:c="2"/>flask-socketio/runtime/checkpoints/</text:p>
      <text:p text:style-name="Standard"><text:s text:c="6"/>sprint5-validation-b87ef09d4226.json)</text:p>
      <text:p text:style-name="Standard"><text:s text:c="4"/>- [runtime/checkpoints/sprint5-validation-dc5c81bd40dc.json](/home/</text:p>
      <text:p text:style-name="Standard"><text:s text:c="2"/>neurodriver/BASE _METACOGNICION_COLOMBIA/vista_IA/architecture-react-three-</text:p>
      <text:p text:style-name="Standard"><text:s text:c="2"/>flask-socketio/runtime/checkpoints/</text:p>
      <text:p text:style-name="Standard"><text:s text:c="6"/>sprint5-validation-dc5c81bd40dc.json)</text:p>
      <text:p text:style-name="Standard"/>
      <text:p text:style-name="Standard"><text:s text:c="4"/>Validaciones Ejecutadas</text:p>
      <text:p text:style-name="Standard"/>
      <text:p text:style-name="Standard"><text:s text:c="4"/>- recovery_python_syntax_ast_ok</text:p>
      <text:p text:style-name="Standard"><text:s text:c="4"/>- recovery_failure_checkpoint_retry_block_split_noop_close_ok sprint5-</text:p>
      <text:p text:style-name="Standard"><text:s text:c="2"/>validation-b87ef09d4226</text:p>
      <text:p text:style-name="Standard"><text:s text:c="4"/>- failures_jsonl_lines 2</text:p>
      <text:p text:style-name="Standard"><text:s text:c="4"/>- last_failure_present True</text:p>
      <text:p text:style-name="Standard"><text:s text:c="4"/>- checkpoint_real_json_ok</text:p>
      <text:p text:style-name="Standard"><text:s text:c="4"/>- runtime_core_json_ok</text:p>
      <text:p text:style-name="Standard"><text:s text:c="4"/>- Verificado que no se creó orchestrator/benchmark.py.</text:p>
      <text:p text:style-name="Standard"/>
      <text:p text:style-name="Standard"><text:s text:c="4"/>Implementado</text:p>
      <text:p text:style-name="Standard"/>
      <text:p text:style-name="Standard"><text:s text:c="4"/>- Registro de fallos en runtime/failures.jsonl.</text:p>
      <text:p text:style-name="Standard"><text:s text:c="4"/>- Checkpoints reales en runtime/checkpoints/.</text:p>
      <text:p text:style-name="Standard"><text:s text:c="4"/>- Decisiones estructuradas: retry, block, split, noop.</text:p>
      <text:p text:style-name="Standard"><text:s text:c="4"/>- Política mínima por retry_count y max_retries.</text:p>
      <text:p text:style-name="Standard"><text:s text:c="4"/>- Split simple por expected_files o partes del goal.</text:p>
      <text:p text:style-name="Standard"><text:s text:c="4"/>- Helper terminate_wait_kill() con terminate() -&gt; wait -&gt; kill().</text:p>
      <text:p text:style-name="Standard"/>
      <text:p text:style-name="Standard"><text:s text:c="4"/>Riesgos Reales Restantes</text:p>
      <text:p text:style-name="Standard"/>
      <text:p text:style-name="Standard"><text:s text:c="4"/>- El split es heurístico; no intenta entender semánticamente el proyecto.</text:p>
      <text:p text:style-name="Standard"><text:s text:c="4"/>- Recovery todavía no está integrado al flujo automático de cola/ejecutor.</text:p>
      <text:p text:style-name="Standard"><text:s text:c="4"/>- Se dejaron artefactos reales de validación en runtime/, como pide el</text:p>
      <text:p text:style-name="Standard"><text:s text:c="2"/>sprint para evidencia en disco.</text:p>
      <text:p text:style-name="Standard"/>
      <text:p text:style-name="Standard"/>
      <text:p text:style-name="Standard">• Voy a verificar si recovery.py realmente existe, si funciona en disco como</text:p>
      <text:p text:style-name="Standard"><text:s text:c="2"/>reportó el agente y si no dejó inconsistencias con el alcance del sprint.</text:p>
      <text:p text:style-name="Standard"/>
      <text:p text:style-name="Standard">• recovery.py sí apareció y dejó artefactos reales. Ahora voy a probar retry,</text:p>
      <text:p text:style-name="Standard"><text:s text:c="2"/>block, split, registro de fallo, checkpoint y cierre garantizado con procesos</text:p>
      <text:p text:style-name="Standard"><text:s text:c="2"/>reales o simulados.</text:p>
      <text:p text:style-name="Standard"/>
      <text:p text:style-name="Standard">• La ruta principal de recovery sí funciona, pero voy a hacer una comprobación</text:p>
      <text:p text:style-name="Standard"><text:s text:c="2"/>de borde sobre el helper de cierre garantizado para asegurarme de que también</text:p>
      <text:p text:style-name="Standard"><text:s text:c="2"/>es robusto cuando kill() no coopera o el proceso no cae fácil.</text:p>
      <text:p text:style-name="Standard"/>
      <text:p text:style-name="Standard"><text:soft-page-break/>• Encontré un caso de borde que sí rompe la promesa de “cierre garantizado”. Voy</text:p>
      <text:p text:style-name="Standard"><text:s text:c="2"/>a sacar la referencia exacta para cerrarte la auditoría con precisión.</text:p>
      <text:p text:style-name="Standard"/>
      <text:p text:style-name="Standard">• Encontré 1 hallazgo bloqueante.</text:p>
      <text:p text:style-name="Standard"/>
      <text:p text:style-name="Standard"><text:s text:c="2"/>- Alta: orchestrator/recovery.py:229 no garantiza cierre estructurado si</text:p>
      <text:p text:style-name="Standard"><text:s text:c="4"/>kill() falla o si el proceso sigue sin cerrar después del kill. En el except</text:p>
      <text:p text:style-name="Standard"><text:s text:c="4"/>subprocess.TimeoutExpired, llama process.kill() y luego hace process.wait()</text:p>
      <text:p text:style-name="Standard"><text:s text:c="4"/>sin timeout ni manejo de error en recovery.py:237. Lo reproduje con un</text:p>
      <text:p text:style-name="Standard"><text:s text:c="4"/>proceso falso donde wait() sigue lanzando TimeoutExpired y kill() falla: el</text:p>
      <text:p text:style-name="Standard"><text:s text:c="4"/>helper no devuelve resultado estructurado, sino que explota con</text:p>
      <text:p text:style-name="Standard"><text:s text:c="4"/>TimeoutExpired. Eso rompe justo la promesa del sprint: terminate -&gt; wait -&gt;</text:p>
      <text:p text:style-name="Standard"><text:s text:c="4"/>kill con trazabilidad robusta.</text:p>
      <text:p text:style-name="Standard"/>
      <text:p text:style-name="Standard"><text:s text:c="2"/>Estado general:</text:p>
      <text:p text:style-name="Standard"/>
      <text:p text:style-name="Standard"><text:s text:c="2"/>- orchestrator/recovery.py sí existe en la raíz correcta.</text:p>
      <text:p text:style-name="Standard"><text:s text:c="2"/>- benchmark.py no fue creado.</text:p>
      <text:p text:style-name="Standard"><text:s text:c="2"/>- retry, block, split, noop, registro en failures.jsonl y checkpoints sí</text:p>
      <text:p text:style-name="Standard"><text:s text:c="4"/>aparecen implementados.</text:p>
      <text:p text:style-name="Standard"><text:s text:c="2"/>- Pero yo no aprobaría todavía Sprint 5 hasta corregir ese bug del cierre</text:p>
      <text:p text:style-name="Standard"><text:s text:c="4"/>garantizado.</text:p>
      <text:p text:style-name="Standard"/>
      <text:p text:style-name="Standard"><text:s text:c="2"/>Si quieres, te doy el prompt exacto para que el otro agente arregle solo ese</text:p>
      <text:p text:style-name="Standard"><text:s text:c="2"/>punto sin tocar lo demás.</text:p>
      <text:p text:style-name="Standard"/>
      <text:p text:style-name="Standard"/>
      <text:p text:style-name="Standard">› ok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/>
      <text:p text:style-name="Standard"><text:s text:c="2"/>OBJETIVO DE ESTA CORRIDA</text:p>
      <text:p text:style-name="Standard"><text:s text:c="2"/>Corregir unicamente el bug restante de Sprint 5.</text:p>
      <text:p text:style-name="Standard"><text:s text:c="2"/>No avances nada posterior.</text:p>
      <text:p text:style-name="Standard"><text:soft-page-break/></text:p>
      <text:p text:style-name="Standard"><text:s text:c="2"/>BUG A CORREGIR</text:p>
      <text:p text:style-name="Standard"/>
      <text:p text:style-name="Standard"><text:s text:c="2"/>BUG EN `orchestrator/recovery.py`</text:p>
      <text:p text:style-name="Standard"><text:s text:c="2"/>Problema:</text:p>
      <text:p text:style-name="Standard"><text:s text:c="2"/>`terminate_wait_kill()` no cumple de forma robusta la promesa de cierre</text:p>
      <text:p text:style-name="Standard"><text:s text:c="2"/>garantizado.</text:p>
      <text:p text:style-name="Standard"/>
      <text:p text:style-name="Standard"><text:s text:c="2"/>Caso reproducido:</text:p>
      <text:p text:style-name="Standard"><text:s text:c="2"/>- `process.wait(timeout=...)` lanza `TimeoutExpired`</text:p>
      <text:p text:style-name="Standard"><text:s text:c="2"/>- luego `process.kill()` puede fallar o no resolver el proceso</text:p>
      <text:p text:style-name="Standard"><text:s text:c="2"/>- después el helper hace `process.wait()` sin timeout ni manejo robusto</text:p>
      <text:p text:style-name="Standard"><text:s text:c="2"/>- en ese caso el helper puede explotar con `TimeoutExpired` y NO devolver</text:p>
      <text:p text:style-name="Standard"><text:s text:c="2"/>resultado estructurado</text:p>
      <text:p text:style-name="Standard"/>
      <text:p text:style-name="Standard"><text:s text:c="2"/>Eso es incorrecto.</text:p>
      <text:p text:style-name="Standard"><text:s text:c="2"/>El helper debe:</text:p>
      <text:p text:style-name="Standard"><text:s text:c="2"/>- intentar `terminate()`</text:p>
      <text:p text:style-name="Standard"><text:s text:c="2"/>- esperar</text:p>
      <text:p text:style-name="Standard"><text:s text:c="2"/>- intentar `kill()` si sigue vivo</text:p>
      <text:p text:style-name="Standard"><text:s text:c="2"/>- volver a esperar de forma controlada</text:p>
      <text:p text:style-name="Standard"><text:s text:c="2"/>- y SIEMPRE devolver estructura clara con errores acumulados</text:p>
      <text:p text:style-name="Standard"><text:s text:c="2"/>- no debe reventar hacia afuera en esos casos de cierre problemático</text:p>
      <text:p text:style-name="Standard"/>
      <text:p text:style-name="Standard"><text:s text:c="2"/>CORRECCION ESPERADA</text:p>
      <text:p text:style-name="Standard"><text:s text:c="2"/>- si `terminate()` falla, registrar el error y continuar la estrategia</text:p>
      <text:p text:style-name="Standard"><text:s text:c="2"/>- si `wait()` tras terminate expira, intentar `kill()`</text:p>
      <text:p text:style-name="Standard"><text:s text:c="2"/>- si `kill()` falla, registrar el error</text:p>
      <text:p text:style-name="Standard"><text:s text:c="2"/>- si el `wait()` posterior a `kill()` vuelve a expirar, registrar el error</text:p>
      <text:p text:style-name="Standard"><text:s text:c="2"/>- el helper debe devolver estructura clara incluso en ese peor caso</text:p>
      <text:p text:style-name="Standard"><text:s text:c="2"/>- no asumir que `kill()` siempre arregla todo</text:p>
      <text:p text:style-name="Standard"><text:s text:c="2"/>- no bloquear indefinidamente</text:p>
      <text:p text:style-name="Standard"><text:s text:c="2"/>- no lanzar `TimeoutExpired` al llamador en este flujo normal de cierre</text:p>
      <text:p text:style-name="Standard"><text:s text:c="2"/>problemático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orchestrator/recovery.py</text:p>
      <text:p text:style-name="Standard"><text:s text:c="2"/>- tests pequenos de Sprint 5 si decides agregarlos</text:p>
      <text:p text:style-name="Standard"/>
      <text:p text:style-name="Standard"><text:s text:c="2"/>RESTRICCIONES DURAS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modificar otros sprints salvo ajuste minimo inevitable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Caso normal</text:p>
      <text:p text:style-name="Standard"><text:soft-page-break/><text:s text:c="2"/>- proceso vivo</text:p>
      <text:p text:style-name="Standard"><text:s text:c="2"/>- terminate funciona</text:p>
      <text:p text:style-name="Standard"><text:s text:c="2"/>- helper devuelve resultado estructurado</text:p>
      <text:p text:style-name="Standard"/>
      <text:p text:style-name="Standard"><text:s text:c="2"/>2. Caso terminate timeout -&gt; kill</text:p>
      <text:p text:style-name="Standard"><text:s text:c="2"/>- wait tras terminate expira</text:p>
      <text:p text:style-name="Standard"><text:s text:c="2"/>- kill se ejecuta</text:p>
      <text:p text:style-name="Standard"><text:s text:c="2"/>- helper devuelve resultado estructurado</text:p>
      <text:p text:style-name="Standard"/>
      <text:p text:style-name="Standard"><text:s text:c="2"/>3. Caso kill problematico</text:p>
      <text:p text:style-name="Standard"><text:s text:c="2"/>- kill falla o el proceso sigue sin cerrar</text:p>
      <text:p text:style-name="Standard"><text:s text:c="2"/>- helper NO explota</text:p>
      <text:p text:style-name="Standard"><text:s text:c="2"/>- helper devuelve resultado estructurado con errores acumulados</text:p>
      <text:p text:style-name="Standard"/>
      <text:p text:style-name="Standard"><text:s text:c="2"/>4. El helper nunca se queda esperando indefinidamente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 corregido</text:p>
      <text:p text:style-name="Standard"><text:s text:c="2"/>3. validaciones ejecutadas</text:p>
      <text:p text:style-name="Standard"><text:s text:c="2"/>4. riesgos reales restantes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verificar la corrección puntual del helper de cierre garantizado y</text:p>
      <text:p text:style-name="Standard"><text:s text:c="2"/>repetir el caso de borde que antes lo rompía.</text:p>
      <text:p text:style-name="Standard"/>
      <text:p text:style-name="Standard">• La forma del helper cambió justo donde estaba el bug. Ahora repito el caso</text:p>
      <text:p text:style-name="Standard"><text:s text:c="2"/>patológico y también un caso normal con proceso real para asegurar que</text:p>
      <text:p text:style-name="Standard"><text:s text:c="2"/>devuelve estructura en ambos.</text:p>
      <text:p text:style-name="Standard"/>
      <text:p text:style-name="Standard">• Sí. Con esta corrección, Sprint 5 queda aprobado.</text:p>
      <text:p text:style-name="Standard"/>
      <text:p text:style-name="Standard"><text:s text:c="2"/>Verifiqué orchestrator/recovery.py y repetí justo el caso que antes rompía el</text:p>
      <text:p text:style-name="Standard"><text:s text:c="2"/>helper:</text:p>
      <text:p text:style-name="Standard"/>
      <text:p text:style-name="Standard"><text:s text:c="2"/>- proceso falso donde wait() expira siempre y kill() falla</text:p>
      <text:p text:style-name="Standard"><text:s text:c="2"/>- ahora terminate_wait_kill() no explota</text:p>
      <text:p text:style-name="Standard"><text:s text:c="2"/>- devuelve estructura con:</text:p>
      <text:p text:style-name="Standard"><text:s text:c="6"/>- wait_after_terminate_timed_out = True</text:p>
      <text:p text:style-name="Standard"><text:s text:c="6"/>- wait_after_kill_timed_out = True</text:p>
      <text:p text:style-name="Standard"><text:s text:c="6"/>- still_running = True</text:p>
      <text:p text:style-name="Standard"><text:s text:c="6"/>- errores acumulados</text:p>
      <text:p text:style-name="Standard"/>
      <text:p text:style-name="Standard"><text:s text:c="2"/>También probé un proceso real:</text:p>
      <text:p text:style-name="Standard"/>
      <text:p text:style-name="Standard"><text:s text:c="2"/>- terminate() funciona</text:p>
      <text:p text:style-name="Standard"><text:s text:c="2"/>- devuelve estructura limpia</text:p>
      <text:p text:style-name="Standard"><text:s text:c="2"/>- no necesitó kill()</text:p>
      <text:p text:style-name="Standard"><text:soft-page-break/></text:p>
      <text:p text:style-name="Standard"><text:s text:c="2"/>Estado final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><text:s text:c="2"/>- Sprint 5: aprobado</text:p>
      <text:p text:style-name="Standard"/>
      <text:p text:style-name="Standard"><text:s text:c="2"/>Reserva menor:</text:p>
      <text:p text:style-name="Standard"/>
      <text:p text:style-name="Standard"><text:s text:c="2"/>- sigo sin ver tests automatizados nuevos persistidos para este sprint, así</text:p>
      <text:p text:style-name="Standard"><text:s text:c="4"/>que la validación quedó por prueba manual reproducible, no por suite</text:p>
      <text:p text:style-name="Standard"><text:s text:c="4"/>dedicada.</text:p>
      <text:p text:style-name="Standard"/>
      <text:p text:style-name="Standard"><text:s text:c="2"/>Si quieres, el siguiente paso ya no es otro sprint base: te ayudo a planear la</text:p>
      <text:p text:style-name="Standard"><text:s text:c="2"/>integración que sigue, donde entra lo de AGENTS.md + PLANS.md + HABLA BASIC +</text:p>
      <text:p text:style-name="Standard"><text:s text:c="2"/>generador de directivas.</text:p>
      <text:p text:style-name="Standard"/>
      <text:p text:style-name="Standard"/>
      <text:p text:style-name="Standard">› pero espera esyoy dijo alo ultimo <text:s text:c="2"/>Cubrió:</text:p>
      <text:p text:style-name="Standard"/>
      <text:p text:style-name="Standard"><text:s text:c="4"/>- proceso normal cerrado con terminate</text:p>
      <text:p text:style-name="Standard"><text:s text:c="4"/>- proceso que ignora SIGTERM y requiere kill</text:p>
      <text:p text:style-name="Standard"><text:s text:c="4"/>- proceso problemático simulado donde terminate, kill y waits fallan sin</text:p>
      <text:p text:style-name="Standard"><text:s text:c="6"/>explotar</text:p>
      <text:p text:style-name="Standard"/>
      <text:p text:style-name="Standard"><text:s text:c="4"/>Riesgos Reales Restantes</text:p>
      <text:p text:style-name="Standard"/>
      <text:p text:style-name="Standard"><text:s text:c="4"/>- Si un proceso real no muere ni con kill, el helper lo reporta como</text:p>
      <text:p text:style-name="Standard"><text:s text:c="6"/>still_running = true; no puede garantizar cierre del sistema operativo.</text:p>
      <text:p text:style-name="Standard"><text:s text:c="4"/>- El helper es robusto ante errores del objeto proceso, pero no reemplaza</text:p>
      <text:p text:style-name="Standard"><text:s text:c="6"/>supervisión externa de procesos huérfanos.</text:p>
      <text:p text:style-name="Standard"/>
      <text:p text:style-name="Standard"/>
      <text:p text:style-name="Standard">• Sí, eso está bien y no contradice la aprobación.</text:p>
      <text:p text:style-name="Standard"/>
      <text:p text:style-name="Standard"><text:s text:c="2"/>Lo que el agente dijo al final es una limitación real del sistema operativo,</text:p>
      <text:p text:style-name="Standard"><text:s text:c="2"/>no un bug del sprint.</text:p>
      <text:p text:style-name="Standard"/>
      <text:p text:style-name="Standard"><text:s text:c="2"/>La diferencia es esta:</text:p>
      <text:p text:style-name="Standard"/>
      <text:p text:style-name="Standard"><text:s text:c="2"/>- Antes el helper fallaba como código:</text:p>
      <text:p text:style-name="Standard"><text:s text:c="4"/>explotaba con TimeoutExpired y no devolvía estructura.</text:p>
      <text:p text:style-name="Standard"><text:s text:c="2"/>- Ahora el helper se comporta correctamente como software:</text:p>
      <text:p text:style-name="Standard"><text:s text:c="4"/>intenta terminate</text:p>
      <text:p text:style-name="Standard"><text:s text:c="4"/>luego wait</text:p>
      <text:p text:style-name="Standard"><text:s text:c="4"/>luego kill</text:p>
      <text:p text:style-name="Standard"><text:s text:c="4"/>luego wait otra vez</text:p>
      <text:p text:style-name="Standard"><text:s text:c="4"/>acumula errores</text:p>
      <text:p text:style-name="Standard"><text:s text:c="4"/>y si aun así el proceso sigue vivo, devuelve:</text:p>
      <text:p text:style-name="Standard"><text:s text:c="6"/>- still_running = true</text:p>
      <text:p text:style-name="Standard"><text:soft-page-break/></text:p>
      <text:p text:style-name="Standard"><text:s text:c="2"/>Eso es exactamente lo correcto.</text:p>
      <text:p text:style-name="Standard"/>
      <text:p text:style-name="Standard"><text:s text:c="2"/>Ningún programa en Python puede prometer de forma absoluta:</text:p>
      <text:p text:style-name="Standard"/>
      <text:p text:style-name="Standard"><text:s text:c="2"/>- “voy a matar cualquier proceso del sistema sí o sí”</text:p>
      <text:p text:style-name="Standard"><text:s text:c="4"/>porque hay casos reales donde:</text:p>
      <text:p text:style-name="Standard"><text:s text:c="2"/>- el proceso está zombificado,</text:p>
      <text:p text:style-name="Standard"><text:s text:c="2"/>- el kernel no lo libera aún,</text:p>
      <text:p text:style-name="Standard"><text:s text:c="2"/>- hay permisos,</text:p>
      <text:p text:style-name="Standard"><text:s text:c="2"/>- hay estado D/uninterruptible sleep,</text:p>
      <text:p text:style-name="Standard"><text:s text:c="2"/>- o el objeto process es defectuoso/simulado.</text:p>
      <text:p text:style-name="Standard"/>
      <text:p text:style-name="Standard"><text:s text:c="2"/>Entonces el criterio correcto de Sprint 5 no era:</text:p>
      <text:p text:style-name="Standard"/>
      <text:p text:style-name="Standard"><text:s text:c="2"/>- “garantía metafísica de matar cualquier proceso”</text:p>
      <text:p text:style-name="Standard"/>
      <text:p text:style-name="Standard"><text:s text:c="2"/>Era:</text:p>
      <text:p text:style-name="Standard"/>
      <text:p text:style-name="Standard"><text:s text:c="2"/>- hacer el mejor cierre posible</text:p>
      <text:p text:style-name="Standard"><text:s text:c="2"/>- no colgarse</text:p>
      <text:p text:style-name="Standard"><text:s text:c="2"/>- no explotar</text:p>
      <text:p text:style-name="Standard"><text:s text:c="2"/>- devolver trazabilidad estructurada</text:p>
      <text:p text:style-name="Standard"/>
      <text:p text:style-name="Standard"><text:s text:c="2"/>Y eso sí quedó cumplido.</text:p>
      <text:p text:style-name="Standard"/>
      <text:p text:style-name="Standard"><text:s text:c="2"/>La frase correcta sería:</text:p>
      <text:p text:style-name="Standard"/>
      <text:p text:style-name="Standard"><text:s text:c="2"/>- garantiza el protocolo de cierre del runtime</text:p>
      <text:p text:style-name="Standard"><text:s text:c="2"/>- no garantiza dominio absoluto sobre cualquier proceso del sistema operativo</text:p>
      <text:p text:style-name="Standard"/>
      <text:p text:style-name="Standard"><text:s text:c="2"/>Eso es totalmente aceptable para aprobar el sprint.</text:p>
      <text:p text:style-name="Standard"/>
      <text:p text:style-name="Standard"><text:s text:c="2"/>En resumen:</text:p>
      <text:p text:style-name="Standard"/>
      <text:p text:style-name="Standard"><text:s text:c="2"/>- lo que reportó el agente como “riesgo restante” es real</text:p>
      <text:p text:style-name="Standard"><text:s text:c="2"/>- no invalida el sprint</text:p>
      <text:p text:style-name="Standard"><text:s text:c="2"/>- más bien muestra que la implementación fue honesta y técnicamente correcta</text:p>
      <text:p text:style-name="Standard"/>
      <text:p text:style-name="Standard"><text:s text:c="2"/>Si quieres, el siguiente paso ya es que planeemos la capa nueva que sigue</text:p>
      <text:p text:style-name="Standard"><text:s text:c="2"/>encima de estos 5 sprints base.</text:p>
      <text:p text:style-name="Standard"/>
      <text:p text:style-name="Standard"/>
      <text:p text:style-name="Standard">› ok hagamolo</text:p>
      <text:p text:style-name="Standard"/>
      <text:p text:style-name="Standard"/>
      <text:p text:style-name="Standard">• Voy a ubicar dónde dejar el plan siguiente dentro del repo y revisar la</text:p>
      <text:p text:style-name="Standard"><text:s text:c="2"/>nomenclatura que ya existe, para que esta capa nueva quede documentada de</text:p>
      <text:p text:style-name="Standard"><text:s text:c="2"/>forma coherente con lo que ya construimos.</text:p>
      <text:p text:style-name="Standard"/>
      <text:p text:style-name="Standard">• Ya tengo claro dónde encaja la siguiente capa. Voy a dejarlo formalizado en el</text:p>
      <text:p text:style-name="Standard"><text:s text:c="2"/>repo: actualizaré el roadmap para que el siguiente tramo quede explícito y,</text:p>
      <text:p text:style-name="Standard"><text:soft-page-break/><text:s text:c="2"/>además, crearé un diseño operativo para la integración de AGENTS.md + PLANS.md</text:p>
      <text:p text:style-name="Standard"><text:s text:c="2"/>+ HABLA BASIC + generador de directivas.</text:p>
      <text:p text:style-name="Standard"/>
      <text:p text:style-name="Standard">• Voy a abrir el tramo final de PLANS.md para extenderlo sin romper la lógica de</text:p>
      <text:p text:style-name="Standard"><text:s text:c="2"/>fases que ya definimos.</text:p>
      <text:p text:style-name="Standard"/>
      <text:p text:style-name="Standard">• Voy a dejar esto ya incorporado al roadmap: ampliaré PLANS.md, ajustaré</text:p>
      <text:p text:style-name="Standard"><text:s text:c="2"/>AGENTS.md para que el runtime reconozca la capa de directivas como parte del</text:p>
      <text:p text:style-name="Standard"><text:s text:c="2"/>diseño objetivo, y crearé un documento técnico dedicado a esa integración con</text:p>
      <text:p text:style-name="Standard"><text:s text:c="2"/>HABLA.</text:p>
      <text:p text:style-name="Standard"/>
      <text:p text:style-name="Standard">• La capa nueva ya quedó plasmada en los documentos del repo. Voy a hacer una</text:p>
      <text:p text:style-name="Standard"><text:s text:c="2"/>verificación corta de los cambios y luego te resumo exactamente qué voy a</text:p>
      <text:p text:style-name="Standard"><text:s text:c="2"/>construir en esa siguiente etapa.</text:p>
      <text:p text:style-name="Standard"/>
      <text:p text:style-name="Standard">• Ya lo dejé formalizado en el repo.</text:p>
      <text:p text:style-name="Standard"/>
      <text:p text:style-name="Standard"><text:s text:c="2"/>Actualicé AGENTS.md para que la capa de directivas quede como parte explícita</text:p>
      <text:p text:style-name="Standard"><text:s text:c="2"/>de la arquitectura objetivo: AGENTS.md + PLANS.md + estado persistido + HABLA</text:p>
      <text:p text:style-name="Standard"><text:s text:c="2"/>BASIC -&gt; directiva operativa por tarea. También amplié PLANS.md para que los</text:p>
      <text:p text:style-name="Standard"><text:s text:c="2"/>siguientes sprints ya no sean solo agent_runtime + benchmarks, sino esta</text:p>
      <text:p text:style-name="Standard"><text:s text:c="2"/>secuencia:</text:p>
      <text:p text:style-name="Standard"/>
      <text:p text:style-name="Standard"><text:s text:c="2"/>- Sprint 6: policy_loader.py y plan_loader.py</text:p>
      <text:p text:style-name="Standard"><text:s text:c="2"/>- Sprint 7: directive_context.py y habla_adapter.py</text:p>
      <text:p text:style-name="Standard"><text:s text:c="2"/>- Sprint 8: directive_generator.py y runtime/directives/</text:p>
      <text:p text:style-name="Standard"><text:s text:c="2"/>- Sprint 9: integración controlada con agent_runtime.py</text:p>
      <text:p text:style-name="Standard"><text:s text:c="2"/>- Sprint 10: benchmarks y puerta de despliegue</text:p>
      <text:p text:style-name="Standard"/>
      <text:p text:style-name="Standard"><text:s text:c="2"/>Además dejé el diseño operativo detallado en Fase 3 - Capa de Directivas y</text:p>
      <text:p text:style-name="Standard"><text:s text:c="2"/>HABLA.md. Ahí quedó claro qué voy a construir encima del harness base, qué</text:p>
      <text:p text:style-name="Standard"><text:s text:c="2"/>entra en cada módulo nuevo y por qué PROMPT_SPRINT_1.txt debe terminar siendo</text:p>
      <text:p text:style-name="Standard"><text:s text:c="2"/>solo bootstrap humano, no mecanismo final del sistema.</text:p>
      <text:p text:style-name="Standard"/>
      <text:p text:style-name="Standard"><text:s text:c="2"/>No corrí tests porque en este paso solo formalicé arquitectura y roadmap. Si</text:p>
      <text:p text:style-name="Standard"><text:s text:c="2"/>quieres, el siguiente movimiento lógico es que te prepare el prompt blindado</text:p>
      <text:p text:style-name="Standard"><text:s text:c="2"/>para Sprint 6.</text:p>
      <text:p text:style-name="Standard"/>
      <text:p text:style-name="Standard"/>
      <text:p text:style-name="Standard">› ok</text:p>
      <text:p text:style-name="Standard"/>
      <text:p text:style-name="Standard"/>
      <text:p text:style-name="Standard">• Cuando quieras, te doy el prompt de Sprint 6 y sigo auditando igual que en los</text:p>
      <text:p text:style-name="Standard"><text:s text:c="2"/>sprints anteriores.</text:p>
      <text:p text:style-name="Standard"/>
      <text:p text:style-name="Standard"/>
      <text:p text:style-name="Standard">› si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><text:soft-page-break/></text:p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6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policy_loader.py</text:p>
      <text:p text:style-name="Standard"><text:s text:c="2"/>- orchestrator/plan_loader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7 o posteriores.</text:p>
      <text:p text:style-name="Standard"/>
      <text:p text:style-name="Standard"><text:s text:c="2"/>OBJETIVO FUNCIONAL DE SPRINT 6</text:p>
      <text:p text:style-name="Standard"><text:s text:c="2"/>Integrar politica y plan como entradas permanentes del control plane.</text:p>
      <text:p text:style-name="Standard"/>
      <text:p text:style-name="Standard"><text:s text:c="2"/>REQUISITOS FUNCIONALES</text:p>
      <text:p text:style-name="Standard"/>
      <text:p text:style-name="Standard"><text:s text:c="2"/>1. `orchestrator/policy_loader.py` debe poder:</text:p>
      <text:p text:style-name="Standard"><text:s text:c="2"/>- cargar `AGENTS.md`</text:p>
      <text:p text:style-name="Standard"><text:s text:c="2"/>- leer el archivo desde la raiz real del repo</text:p>
      <text:p text:style-name="Standard"><text:s text:c="2"/>- devolver una estructura normalizada y util para maquina</text:p>
      <text:p text:style-name="Standard"><text:s text:c="2"/>- extraer al menos:</text:p>
      <text:p text:style-name="Standard"><text:s text:c="4"/>- propósito del repositorio</text:p>
      <text:p text:style-name="Standard"><text:s text:c="4"/>- tesis central</text:p>
      <text:p text:style-name="Standard"><text:s text:c="4"/>- reglas maestras</text:p>
      <text:p text:style-name="Standard"><text:s text:c="4"/>- reglas duras del runtime</text:p>
      <text:p text:style-name="Standard"><text:s text:c="4"/>- política de directivas operativas</text:p>
      <text:p text:style-name="Standard"><text:s text:c="4"/>- estructura esperada del proyecto</text:p>
      <text:p text:style-name="Standard"><text:s text:c="4"/>- benchmarks obligatorios</text:p>
      <text:p text:style-name="Standard"><text:s text:c="2"/>- dejar la salida suficientemente estructurada para uso posterior por</text:p>
      <text:p text:style-name="Standard"><text:s text:c="2"/>`directive_context.py` y `directive_generator.py`</text:p>
      <text:p text:style-name="Standard"/>
      <text:p text:style-name="Standard"><text:s text:c="2"/>2. `orchestrator/plan_loader.py` debe poder:</text:p>
      <text:p text:style-name="Standard"><text:s text:c="2"/>- cargar `PLANS.md`</text:p>
      <text:p text:style-name="Standard"><text:s text:c="2"/>- leer el archivo desde la raiz real del repo</text:p>
      <text:p text:style-name="Standard"><text:s text:c="2"/>- devolver una estructura normalizada y util para maquina</text:p>
      <text:p text:style-name="Standard"><text:soft-page-break/><text:s text:c="2"/>- extraer al menos:</text:p>
      <text:p text:style-name="Standard"><text:s text:c="4"/>- visión del proyecto</text:p>
      <text:p text:style-name="Standard"><text:s text:c="4"/>- fases</text:p>
      <text:p text:style-name="Standard"><text:s text:c="4"/>- módulos y responsabilidades</text:p>
      <text:p text:style-name="Standard"><text:s text:c="4"/>- sprints</text:p>
      <text:p text:style-name="Standard"><text:s text:c="4"/>- entregables</text:p>
      <text:p text:style-name="Standard"><text:s text:c="4"/>- criterios de aceptación</text:p>
      <text:p text:style-name="Standard"><text:s text:c="4"/>- benchmarks oficiales</text:p>
      <text:p text:style-name="Standard"><text:s text:c="2"/>- dejar la salida suficientemente estructurada para que el runtime pueda</text:p>
      <text:p text:style-name="Standard"><text:s text:c="2"/>consultar:</text:p>
      <text:p text:style-name="Standard"><text:s text:c="4"/>- qué sprint sigue</text:p>
      <text:p text:style-name="Standard"><text:s text:c="4"/>- qué archivos pertenecen a ese sprint</text:p>
      <text:p text:style-name="Standard"><text:s text:c="4"/>- qué está fuera de alcance</text:p>
      <text:p text:style-name="Standard"/>
      <text:p text:style-name="Standard"><text:s text:c="2"/>3. Ambas cargas deben ser:</text:p>
      <text:p text:style-name="Standard"><text:s text:c="2"/>- deterministas</text:p>
      <text:p text:style-name="Standard"><text:s text:c="2"/>- claras</text:p>
      <text:p text:style-name="Standard"><text:s text:c="2"/>- auditables</text:p>
      <text:p text:style-name="Standard"><text:s text:c="2"/>- sin depender de memoria implícita</text:p>
      <text:p text:style-name="Standard"><text:s text:c="2"/>- sin necesidad de prompts manuales</text:p>
      <text:p text:style-name="Standard"/>
      <text:p text:style-name="Standard"><text:s text:c="2"/>4. Debe existir una forma simple de consultar:</text:p>
      <text:p text:style-name="Standard"><text:s text:c="2"/>- política actual</text:p>
      <text:p text:style-name="Standard"><text:s text:c="2"/>- plan actual</text:p>
      <text:p text:style-name="Standard"><text:s text:c="2"/>- sprint actual o siguiente</text:p>
      <text:p text:style-name="Standard"><text:s text:c="2"/>- entregables del sprint</text:p>
      <text:p text:style-name="Standard"><text:s text:c="2"/>- criterios de aceptación del sprint</text:p>
      <text:p text:style-name="Standard"/>
      <text:p text:style-name="Standard"><text:s text:c="2"/>5. Compatibilidad</text:p>
      <text:p text:style-name="Standard"><text:s text:c="2"/>- no romper los sprints 1 al 5 ya aprobados</text:p>
      <text:p text:style-name="Standard"><text:s text:c="2"/>- mantener compatibilidad con el resto del orquestador actual</text:p>
      <text:p text:style-name="Standard"><text:s text:c="2"/>- preparar el camino para `directive_context.py`</text:p>
      <text:p text:style-name="Standard"/>
      <text:p text:style-name="Standard"><text:s text:c="2"/>DISENO PRAGMATICO</text:p>
      <text:p text:style-name="Standard"><text:s text:c="2"/>- no intentes parser perfecto de markdown universal</text:p>
      <text:p text:style-name="Standard"><text:s text:c="2"/>- usa una estrategia explícita y mantenible</text:p>
      <text:p text:style-name="Standard"><text:s text:c="2"/>- si necesitas heurísticas, que sean pequeñas, trazables y orientadas a estos</text:p>
      <text:p text:style-name="Standard"><text:s text:c="2"/>documentos reales</text:p>
      <text:p text:style-name="Standard"><text:s text:c="2"/>- no conviertas esto en framework gigante</text:p>
      <text:p text:style-name="Standard"><text:s text:c="2"/>- privilegia claridad y utilidad real sobre “generalidad bonita”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6 coherente, pero no implementes todavia:</text:p>
      <text:p text:style-name="Standard"><text:s text:c="2"/>- orchestrator/directive_context.py</text:p>
      <text:p text:style-name="Standard"><text:s text:c="2"/>- orchestrator/habla_adapter.py</text:p>
      <text:p text:style-name="Standard"><text:s text:c="2"/>- orchestrator/directive_generator.py</text:p>
      <text:p text:style-name="Standard"><text:s text:c="2"/>- orchestrator/benchmark.py</text:p>
      <text:p text:style-name="Standard"><text:s text:c="2"/>- migracion de agent_runtime.py</text:p>
      <text:p text:style-name="Standard"/>
      <text:p text:style-name="Standard"><text:s text:c="2"/>RESTRICCIONES DURAS</text:p>
      <text:p text:style-name="Standard"><text:s text:c="2"/>- no implementar Sprint 7 ni posteriores</text:p>
      <text:p text:style-name="Standard"><text:soft-page-break/><text:s text:c="2"/>- no crear directive_context.py</text:p>
      <text:p text:style-name="Standard"><text:s text:c="2"/>- no crear habla_adapter.py</text:p>
      <text:p text:style-name="Standard"><text:s text:c="2"/>- no crear directive_generator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6 queda correcto si:</text:p>
      <text:p text:style-name="Standard"><text:s text:c="2"/>- existe `orchestrator/policy_loader.py`</text:p>
      <text:p text:style-name="Standard"><text:s text:c="2"/>- existe `orchestrator/plan_loader.py`</text:p>
      <text:p text:style-name="Standard"><text:s text:c="2"/>- `AGENTS.md` se puede cargar como política estructurada</text:p>
      <text:p text:style-name="Standard"><text:s text:c="2"/>- `PLANS.md` se puede cargar como roadmap estructurado</text:p>
      <text:p text:style-name="Standard"><text:s text:c="2"/>- el runtime puede consultar sprint, entregables y criterios de aceptación</text:p>
      <text:p text:style-name="Standard"><text:s text:c="2"/>- queda preparado el camino para Sprint 7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`policy_loader.py`</text:p>
      <text:p text:style-name="Standard"><text:s text:c="2"/>- carga `AGENTS.md`</text:p>
      <text:p text:style-name="Standard"><text:s text:c="2"/>- devuelve estructura útil</text:p>
      <text:p text:style-name="Standard"><text:s text:c="2"/>- contiene reglas duras y benchmarks</text:p>
      <text:p text:style-name="Standard"/>
      <text:p text:style-name="Standard"><text:s text:c="2"/>2. `plan_loader.py`</text:p>
      <text:p text:style-name="Standard"><text:s text:c="2"/>- carga `PLANS.md`</text:p>
      <text:p text:style-name="Standard"><text:s text:c="2"/>- devuelve estructura útil</text:p>
      <text:p text:style-name="Standard"><text:s text:c="2"/>- identifica sprints, entregables y aceptación</text:p>
      <text:p text:style-name="Standard"/>
      <text:p text:style-name="Standard"><text:s text:c="2"/>3. Consulta operativa</text:p>
      <text:p text:style-name="Standard"><text:s text:c="2"/>- se puede consultar al menos un sprint concreto y obtener:</text:p>
      <text:p text:style-name="Standard"><text:s text:c="4"/>- objetivo</text:p>
      <text:p text:style-name="Standard"><text:s text:c="4"/>- entregables</text:p>
      <text:p text:style-name="Standard"><text:s text:c="4"/>- criterios de aceptación</text:p>
      <text:p text:style-name="Standard"/>
      <text:p text:style-name="Standard"><text:s text:c="2"/>4. Robustez mínima</text:p>
      <text:p text:style-name="Standard"><text:s text:c="2"/>- si falta el archivo o está mal formado, la salida debe fallar de forma clara</text:p>
      <text:p text:style-name="Standard"><text:s text:c="2"/>y estructurada</text:p>
      <text:p text:style-name="Standard"/>
      <text:p text:style-name="Standard"><text:s text:c="2"/>SI AGREGAS TESTS</text:p>
      <text:p text:style-name="Standard"><text:s text:c="2"/>Mantenlos pequeños y enfocados solo en Sprint 6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7</text:p>
      <text:p text:style-name="Standard"/>
      <text:p text:style-name="Standard"/>
      <text:p text:style-name="Standard"><text:soft-page-break/>› ya termino</text:p>
      <text:p text:style-name="Standard"/>
      <text:p text:style-name="Standard"/>
      <text:p text:style-name="Standard">• Voy a verificar Sprint 6 como en los anteriores: existencia, alcance,</text:p>
      <text:p text:style-name="Standard"><text:s text:c="2"/>comportamiento real y posibles desvíos antes de darte el veredicto.</text:p>
      <text:p text:style-name="Standard"/>
      <text:p text:style-name="Standard">• Voy a probar los loaders con consultas reales del roadmap y de la política,</text:p>
      <text:p text:style-name="Standard"><text:s text:c="2"/>además de validar los caminos de error estructurado antes de darte el</text:p>
      <text:p text:style-name="Standard"><text:s text:c="2"/>veredicto final.</text:p>
      <text:p text:style-name="Standard"/>
      <text:p text:style-name="Standard">• Context compacted</text:p>
      <text:p text:style-name="Standard"/>
      <text:p text:style-name="Standard">• Voy a revisar Sprint 6 en la raíz del repo, validar los loaders y confirmar si</text:p>
      <text:p text:style-name="Standard"><text:s text:c="2"/>quedó aprobado o si dejó huecos concretos.</text:p>
      <text:p text:style-name="Standard"/>
      <text:p text:style-name="Standard">• Ya vi los dos loaders en disco y no se salieron del alcance. Ahora voy a vali</text:p>
      <text:p text:style-name="Standard"><text:s text:c="2"/>dar comportamiento real: compilación, carga de AGENTS.md/PLANS.md, consulta de</text:p>
      <text:p text:style-name="Standard"><text:s text:c="2"/>sprint y fallos estructurados si faltan archivos.</text:p>
      <text:p text:style-name="Standard"/>
      <text:p text:style-name="Standard">• La carga básica pasó. Estoy mirando una cosa más fina en plan_loader: la lista</text:p>
      <text:p text:style-name="Standard"><text:s text:c="2"/>“fuera de alcance” trae elementos raros para Sprint 7, y quiero confirmar si</text:p>
      <text:p text:style-name="Standard"><text:s text:c="2"/>es un bug real de parsing o solo cómo está escrito PLANS.md.</text:p>
      <text:p text:style-name="Standard"/>
      <text:p text:style-name="Standard">• La parte rara de scope7 viene de cómo está escrito Sprint 9 en PLANS.md; no es</text:p>
      <text:p text:style-name="Standard"><text:s text:c="2"/>una fuga del parser. Voy a cerrar la auditoría comprobando también el caso</text:p>
      <text:p text:style-name="Standard"><text:s text:c="2"/>“archivo presente pero mal formado”, que era requisito del sprint.</text:p>
      <text:p text:style-name="Standard"/>
      <text:p text:style-name="Standard">• No encontré hallazgos bloqueantes. Doy Sprint 6 por aprobado.</text:p>
      <text:p text:style-name="Standard"/>
      <text:p text:style-name="Standard"><text:s text:c="2"/>Verifiqué policy_loader.py y plan_loader.py. Quedaron en la raíz correcta, no</text:p>
      <text:p text:style-name="Standard"><text:s text:c="2"/>se adelantó Sprint 7, y la carga real funciona sobre AGENTS.md y PLANS.md.</text:p>
      <text:p text:style-name="Standard"/>
      <text:p text:style-name="Standard"><text:s text:c="2"/>Validación real que corrí:</text:p>
      <text:p text:style-name="Standard"/>
      <text:p text:style-name="Standard"><text:s text:c="2"/>- py_compile de ambos loaders: pasó.</text:p>
      <text:p text:style-name="Standard"><text:s text:c="2"/>- load_policy() devolvió estructura útil, incluyendo runtime_hard_rules y</text:p>
      <text:p text:style-name="Standard"><text:s text:c="4"/>benchmarks oficiales.</text:p>
      <text:p text:style-name="Standard"><text:s text:c="2"/>- load_plan() devolvió fases, módulos y sprints.</text:p>
      <text:p text:style-name="Standard"><text:s text:c="2"/>- get_sprint(plan, 6) devolvió objetivo, entregables y aceptación correctos.</text:p>
      <text:p text:style-name="Standard"><text:s text:c="2"/>- get_next_sprint(..., completed_sprints=[1,2,3,4,5]) devolvió Sprint 6.</text:p>
      <text:p text:style-name="Standard"><text:s text:c="2"/>- sprint_scope(plan, 7) devolvió alcance útil para el siguiente tramo.</text:p>
      <text:p text:style-name="Standard"><text:s text:c="2"/>- Si faltan AGENTS.md o PLANS.md, falla con error estructurado.</text:p>
      <text:p text:style-name="Standard"><text:s text:c="2"/>- Si el archivo existe pero está malformado, también falla con error</text:p>
      <text:p text:style-name="Standard"><text:s text:c="4"/>estructurado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6; la validación</text:p>
      <text:p text:style-name="Standard"><text:s text:c="4"/>quedó bien por ejecución manual reproducible, pero no por suite dedicada.</text:p>
      <text:p text:style-name="Standard"/>
      <text:p text:style-name="Standard"><text:s text:c="2"/>Estado global:</text:p>
      <text:p text:style-name="Standard"/>
      <text:p text:style-name="Standard"><text:soft-page-break/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><text:s text:c="2"/>- Sprint 5: aprobado</text:p>
      <text:p text:style-name="Standard"><text:s text:c="2"/>- Sprint 6: aprobado</text:p>
      <text:p text:style-name="Standard"/>
      <text:p text:style-name="Standard"><text:s text:c="2"/>Si quieres, te doy ya el prompt blindado para Sprint 7.</text:p>
      <text:p text:style-name="Standard"/>
      <text:p text:style-name="Standard"/>
      <text:p text:style-name="Standard">› ok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7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directive_context.py</text:p>
      <text:p text:style-name="Standard"><text:s text:c="2"/>- orchestrator/habla_adapter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8 o posteriores.</text:p>
      <text:p text:style-name="Standard"/>
      <text:p text:style-name="Standard"><text:s text:c="2"/>OBJETIVO FUNCIONAL DE SPRINT 7</text:p>
      <text:p text:style-name="Standard"><text:s text:c="2"/>Construir el contexto procedural de tarea y conectar HABLA BASIC como capa</text:p>
      <text:p text:style-name="Standard"><text:s text:c="2"/>reusable del control plane.</text:p>
      <text:p text:style-name="Standard"/>
      <text:p text:style-name="Standard"><text:s text:c="2"/>REQUISITOS FUNCIONALES</text:p>
      <text:p text:style-name="Standard"/>
      <text:p text:style-name="Standard"><text:s text:c="2"/>1. `orchestrator/directive_context.py` debe poder:</text:p>
      <text:p text:style-name="Standard"><text:s text:c="2"/>- reunir en una sola estructura:</text:p>
      <text:p text:style-name="Standard"><text:soft-page-break/><text:s text:c="4"/>- política cargada desde `policy_loader.py`</text:p>
      <text:p text:style-name="Standard"><text:s text:c="4"/>- plan cargado desde `plan_loader.py`</text:p>
      <text:p text:style-name="Standard"><text:s text:c="4"/>- estado del proyecto</text:p>
      <text:p text:style-name="Standard"><text:s text:c="4"/>- cola de tareas</text:p>
      <text:p text:style-name="Standard"><text:s text:c="4"/>- historial</text:p>
      <text:p text:style-name="Standard"><text:s text:c="4"/>- fallos</text:p>
      <text:p text:style-name="Standard"><text:s text:c="4"/>- checkpoint actual o más reciente</text:p>
      <text:p text:style-name="Standard"><text:s text:c="4"/>- tarea activa o siguiente tarea ejecutable</text:p>
      <text:p text:style-name="Standard"><text:s text:c="2"/>- producir un contexto estructurado, determinista y auditable</text:p>
      <text:p text:style-name="Standard"><text:s text:c="2"/>- dejar claro:</text:p>
      <text:p text:style-name="Standard"><text:s text:c="4"/>- qué tarea se está preparando</text:p>
      <text:p text:style-name="Standard"><text:s text:c="4"/>- en qué sprint o fase cae</text:p>
      <text:p text:style-name="Standard"><text:s text:c="4"/>- qué reglas duras aplican</text:p>
      <text:p text:style-name="Standard"><text:s text:c="4"/>- qué entregables y aceptación la gobiernan</text:p>
      <text:p text:style-name="Standard"><text:s text:c="4"/>- qué evidencia previa existe</text:p>
      <text:p text:style-name="Standard"><text:s text:c="4"/>- qué bloqueos o fallos vienen acumulados</text:p>
      <text:p text:style-name="Standard"/>
      <text:p text:style-name="Standard"><text:s text:c="2"/>2. `orchestrator/habla_adapter.py` debe poder:</text:p>
      <text:p text:style-name="Standard"><text:s text:c="2"/>- tomar ese contexto estructurado</text:p>
      <text:p text:style-name="Standard"><text:s text:c="2"/>- convertirlo en una guía procedural inspirada en HABLA BASIC</text:p>
      <text:p text:style-name="Standard"><text:s text:c="2"/>- no como texto decorativo, sino como estructura reusable para el generador de</text:p>
      <text:p text:style-name="Standard"><text:s text:c="2"/>directivas</text:p>
      <text:p text:style-name="Standard"><text:s text:c="2"/>- incorporar al menos componentes como:</text:p>
      <text:p text:style-name="Standard"><text:s text:c="4"/>- objetivo operativo actual</text:p>
      <text:p text:style-name="Standard"><text:s text:c="4"/>- restricciones activas</text:p>
      <text:p text:style-name="Standard"><text:s text:c="4"/>- evidencia requerida</text:p>
      <text:p text:style-name="Standard"><text:s text:c="4"/>- validación esperada</text:p>
      <text:p text:style-name="Standard"><text:s text:c="4"/>- checkpoint de partida</text:p>
      <text:p text:style-name="Standard"><text:s text:c="4"/>- criterio de cierre</text:p>
      <text:p text:style-name="Standard"><text:s text:c="4"/>- riesgo o bloqueo conocido</text:p>
      <text:p text:style-name="Standard"><text:s text:c="2"/>- devolver una estructura clara, no solo prose libre</text:p>
      <text:p text:style-name="Standard"/>
      <text:p text:style-name="Standard"><text:s text:c="2"/>3. Integración mínima entre ambos</text:p>
      <text:p text:style-name="Standard"><text:s text:c="2"/>- `directive_context.py` debe producir un objeto utilizable por</text:p>
      <text:p text:style-name="Standard"><text:s text:c="2"/>`habla_adapter.py`</text:p>
      <text:p text:style-name="Standard"><text:s text:c="2"/>- `habla_adapter.py` debe aceptar ese contexto y devolver una estructura</text:p>
      <text:p text:style-name="Standard"><text:s text:c="2"/>procedural estable</text:p>
      <text:p text:style-name="Standard"><text:s text:c="2"/>- dejar listo el camino para `directive_generator.py` sin implementarlo</text:p>
      <text:p text:style-name="Standard"><text:s text:c="2"/>todavía</text:p>
      <text:p text:style-name="Standard"/>
      <text:p text:style-name="Standard"><text:s text:c="2"/>4. Consulta operativa mínima</text:p>
      <text:p text:style-name="Standard"><text:s text:c="2"/>Debe ser posible consultar al menos:</text:p>
      <text:p text:style-name="Standard"><text:s text:c="2"/>- tarea activa o siguiente tarea lista</text:p>
      <text:p text:style-name="Standard"><text:s text:c="2"/>- sprint asociado</text:p>
      <text:p text:style-name="Standard"><text:s text:c="2"/>- entregables del sprint</text:p>
      <text:p text:style-name="Standard"><text:s text:c="2"/>- reglas duras relevantes</text:p>
      <text:p text:style-name="Standard"><text:s text:c="2"/>- evidencia previa relevante</text:p>
      <text:p text:style-name="Standard"><text:s text:c="2"/>- guía HABLA derivada de esa situación</text:p>
      <text:p text:style-name="Standard"/>
      <text:p text:style-name="Standard"><text:s text:c="2"/>5. Compatibilidad</text:p>
      <text:p text:style-name="Standard"><text:s text:c="2"/>- usar `policy_loader.py`</text:p>
      <text:p text:style-name="Standard"><text:s text:c="2"/>- usar `plan_loader.py`</text:p>
      <text:p text:style-name="Standard"><text:soft-page-break/><text:s text:c="2"/>- usar estado persistido del runtime</text:p>
      <text:p text:style-name="Standard"><text:s text:c="2"/>- ser compatible con planner, task_queue, executor, validator y recovery</text:p>
      <text:p text:style-name="Standard"><text:s text:c="2"/>- no migrar todavía `agent_runtime.py`</text:p>
      <text:p text:style-name="Standard"/>
      <text:p text:style-name="Standard"><text:s text:c="2"/>DISENO PRAGMATICO</text:p>
      <text:p text:style-name="Standard"><text:s text:c="2"/>- no intentes resolver ya el prompt final del worker</text:p>
      <text:p text:style-name="Standard"><text:s text:c="2"/>- no conviertas HABLA en un ensayo largo</text:p>
      <text:p text:style-name="Standard"><text:s text:c="2"/>- usa estructuras pequenas, explicitas y reutilizables</text:p>
      <text:p text:style-name="Standard"><text:s text:c="2"/>- si necesitas helpers, mantenlos acotados</text:p>
      <text:p text:style-name="Standard"><text:s text:c="2"/>- el contexto debe servir para control plane, no solo para mostrar texto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7 coherente, pero no implementes todavia:</text:p>
      <text:p text:style-name="Standard"><text:s text:c="2"/>- orchestrator/directive_generator.py</text:p>
      <text:p text:style-name="Standard"><text:s text:c="2"/>- orchestrator/benchmark.py</text:p>
      <text:p text:style-name="Standard"><text:s text:c="2"/>- integracion final con agent_runtime.py</text:p>
      <text:p text:style-name="Standard"/>
      <text:p text:style-name="Standard"><text:s text:c="2"/>RESTRICCIONES DURAS</text:p>
      <text:p text:style-name="Standard"><text:s text:c="2"/>- no implementar Sprint 8 ni posteriores</text:p>
      <text:p text:style-name="Standard"><text:s text:c="2"/>- no crear directive_generator.py</text:p>
      <text:p text:style-name="Standard"><text:s text:c="2"/>- no crear benchmark.py</text:p>
      <text:p text:style-name="Standard"><text:s text:c="2"/>- no tocar agent_runtime.py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7 queda correcto si:</text:p>
      <text:p text:style-name="Standard"><text:s text:c="2"/>- existe `orchestrator/directive_context.py`</text:p>
      <text:p text:style-name="Standard"><text:s text:c="2"/>- existe `orchestrator/habla_adapter.py`</text:p>
      <text:p text:style-name="Standard"><text:s text:c="2"/>- el sistema puede reunir política, plan, estado, cola, historial, fallos y</text:p>
      <text:p text:style-name="Standard"><text:s text:c="2"/>checkpoint</text:p>
      <text:p text:style-name="Standard"><text:s text:c="2"/>- HABLA BASIC queda integrado como estructura procedural reusable</text:p>
      <text:p text:style-name="Standard"><text:s text:c="2"/>- queda preparado el camino para Sprint 8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`directive_context.py`</text:p>
      <text:p text:style-name="Standard"><text:s text:c="2"/>- puede construir contexto con datos reales del runtime</text:p>
      <text:p text:style-name="Standard"><text:s text:c="2"/>- identifica tarea activa o siguiente tarea lista</text:p>
      <text:p text:style-name="Standard"><text:s text:c="2"/>- identifica sprint, entregables y aceptación asociados</text:p>
      <text:p text:style-name="Standard"/>
      <text:p text:style-name="Standard"><text:s text:c="2"/>2. `habla_adapter.py`</text:p>
      <text:p text:style-name="Standard"><text:s text:c="2"/>- transforma ese contexto en estructura procedural clara</text:p>
      <text:p text:style-name="Standard"><text:s text:c="2"/>- incluye restricciones, evidencia requerida, validación, checkpoint y</text:p>
      <text:p text:style-name="Standard"><text:s text:c="2"/>criterio de cierre</text:p>
      <text:p text:style-name="Standard"/>
      <text:p text:style-name="Standard"><text:s text:c="2"/>3. Robustez mínima</text:p>
      <text:p text:style-name="Standard"><text:s text:c="2"/>- si faltan piezas del runtime, falla de forma clara o degrada de forma</text:p>
      <text:p text:style-name="Standard"><text:s text:c="2"/>estructurada</text:p>
      <text:p text:style-name="Standard"><text:soft-page-break/><text:s text:c="2"/>- no depende de memoria implícita</text:p>
      <text:p text:style-name="Standard"/>
      <text:p text:style-name="Standard"><text:s text:c="2"/>4. Compatibilidad</text:p>
      <text:p text:style-name="Standard"><text:s text:c="2"/>- la salida deja listo el camino para que Sprint 8 genere directivas</text:p>
      <text:p text:style-name="Standard"><text:s text:c="2"/>operativas reales</text:p>
      <text:p text:style-name="Standard"/>
      <text:p text:style-name="Standard"><text:s text:c="2"/>SI AGREGAS TESTS</text:p>
      <text:p text:style-name="Standard"><text:s text:c="2"/>Mantenlos pequenos y enfocados solo en Sprint 7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8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auditar Sprint 7 en la raíz del repo, validar contexto real del runtime</text:p>
      <text:p text:style-name="Standard"><text:s text:c="2"/>y comprobar que HABLA quedó como estructura reusable, no como texto suelto.</text:p>
      <text:p text:style-name="Standard"/>
      <text:p text:style-name="Standard">• Ya vi la forma general. Ahora voy a revisar el resto de directive_context.py y</text:p>
      <text:p text:style-name="Standard"><text:s text:c="2"/>luego lo voy a probar con runtime real y con un runtime degradado para ver si</text:p>
      <text:p text:style-name="Standard"><text:s text:c="2"/>cumple lo que prometió el sprint.</text:p>
      <text:p text:style-name="Standard"/>
      <text:p text:style-name="Standard">• Voy a probar el contexto con el runtime real y también con un runtime</text:p>
      <text:p text:style-name="Standard"><text:s text:c="2"/>sintético para forzar una tarea activa, historial, fallo y checkpoint. Así</text:p>
      <text:p text:style-name="Standard"><text:s text:c="2"/>puedo ver si Sprint 7 sirve de verdad para Sprint 8 o solo arma un diccionario</text:p>
      <text:p text:style-name="Standard"><text:s text:c="2"/>bonito.</text:p>
      <text:p text:style-name="Standard"/>
      <text:p text:style-name="Standard">• Voy a montar un runtime temporal con una tarea realista, checkpoint, historial</text:p>
      <text:p text:style-name="Standard"><text:s text:c="2"/>y fallo previo. Eso me deja ver si el contexto realmente encadena todo y si</text:p>
      <text:p text:style-name="Standard"><text:s text:c="2"/>HABLA recoge lo importante para la siguiente capa.</text:p>
      <text:p text:style-name="Standard"/>
      <text:p text:style-name="Standard">• Encontré una limitación del contrato de cola, no del sprint: la cola exige que</text:p>
      <text:p text:style-name="Standard"><text:s text:c="2"/>toda dependencia exista explícitamente en task_queue.json. Voy a repetir la</text:p>
      <text:p text:style-name="Standard"><text:s text:c="2"/>prueba con una tarea previa completada dentro de la cola para validar</text:p>
      <text:p text:style-name="Standard"><text:s text:c="2"/>directive_context y habla_adapter en un escenario contractual correcto.</text:p>
      <text:p text:style-name="Standard"/>
      <text:p text:style-name="Standard">• El escenario sintético fuerte sí pasó. Voy a hacer dos comprobaciones más:</text:p>
      <text:p text:style-name="Standard"><text:s text:c="2"/>degradación controlada cuando faltan piezas del runtime y modo strict, para</text:p>
      <text:p text:style-name="Standard"><text:s text:c="2"/>ver si falla limpio en vez de esconder huecos.</text:p>
      <text:p text:style-name="Standard"/>
      <text:p text:style-name="Standard">• Quiero mirar un detalle fino antes de cerrar: cómo resuelve el checkpoint</text:p>
      <text:p text:style-name="Standard"><text:s text:c="2"/>cuando no hay tarea activa. Si ahí mete un checkpoint ajeno sin contexto, eso</text:p>
      <text:p text:style-name="Standard"><text:s text:c="2"/>sí sería un bug de integración para Sprint 8.</text:p>
      <text:p text:style-name="Standard"/>
      <text:p text:style-name="Standard">• No encontré hallazgos bloqueantes. Doy Sprint 7 por aprobado.</text:p>
      <text:p text:style-name="Standard"/>
      <text:p text:style-name="Standard"><text:s text:c="2"/>Verifiqué directive_context.py y habla_adapter.py. Quedaron en la raíz</text:p>
      <text:p text:style-name="Standard"><text:soft-page-break/><text:s text:c="2"/>correcta, no se adelantó Sprint 8, y el flujo real sí arma contexto útil para</text:p>
      <text:p text:style-name="Standard"><text:s text:c="2"/>la siguiente capa.</text:p>
      <text:p text:style-name="Standard"/>
      <text:p text:style-name="Standard"><text:s text:c="2"/>Validación real que corrí:</text:p>
      <text:p text:style-name="Standard"/>
      <text:p text:style-name="Standard"><text:s text:c="2"/>- py_compile de ambos archivos: pasó.</text:p>
      <text:p text:style-name="Standard"><text:s text:c="2"/>- En un runtime sintético con tarea activa, checkpoint, historial y fallo</text:p>
      <text:p text:style-name="Standard"><text:s text:c="4"/>previo:</text:p>
      <text:p text:style-name="Standard"><text:s text:c="6"/>- seleccionó la tarea correcta,</text:p>
      <text:p text:style-name="Standard"><text:s text:c="6"/>- infirió Sprint 7,</text:p>
      <text:p text:style-name="Standard"><text:s text:c="6"/>- reunió política, plan, cola, historial, fallos y checkpoint,</text:p>
      <text:p text:style-name="Standard"><text:s text:c="6"/>- marcó la tarea futura como bloqueada por dependencia,</text:p>
      <text:p text:style-name="Standard"><text:s text:c="6"/>- y habla_adapter.py devolvió una guía procedural estable con objetivo,</text:p>
      <text:p text:style-name="Standard"><text:s text:c="8"/>restricciones, evidencia, validación, checkpoint y riesgos.</text:p>
      <text:p text:style-name="Standard"><text:s text:c="2"/>- En un runtime degradado:</text:p>
      <text:p text:style-name="Standard"><text:s text:c="6"/>- strict=False devolvió degradación estructurada con runtime_errors,</text:p>
      <text:p text:style-name="Standard"><text:s text:c="6"/>- strict=True falló limpio con DirectiveContextError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7; la validación</text:p>
      <text:p text:style-name="Standard"><text:s text:c="4"/>quedó bien por ejecución manual reproducible, no por suite dedicada.</text:p>
      <text:p text:style-name="Standard"><text:s text:c="2"/>- riesgo residual: si no hay tarea activa ni checkpoint asociado, el contexto</text:p>
      <text:p text:style-name="Standard"><text:s text:c="4"/>cae al checkpoint más reciente del runtime. No rompe este sprint, pero en</text:p>
      <text:p text:style-name="Standard"><text:s text:c="4"/>Sprint 8/9 conviene acotarlo mejor para no arrastrar contexto viejo a una</text:p>
      <text:p text:style-name="Standard"><text:s text:c="4"/>directiva nueva.</text:p>
      <text:p text:style-name="Standard"/>
      <text:p text:style-name="Standard"><text:s text:c="2"/>Estado global:</text:p>
      <text:p text:style-name="Standard"/>
      <text:p text:style-name="Standard"><text:s text:c="2"/>- Sprint 1: aprobado</text:p>
      <text:p text:style-name="Standard"><text:s text:c="2"/>- Sprint 2: aprobado</text:p>
      <text:p text:style-name="Standard"><text:s text:c="2"/>- Sprint 3: aprobado</text:p>
      <text:p text:style-name="Standard"><text:s text:c="2"/>- Sprint 4: aprobado</text:p>
      <text:p text:style-name="Standard"><text:s text:c="2"/>- Sprint 5: aprobado</text:p>
      <text:p text:style-name="Standard"><text:s text:c="2"/>- Sprint 6: aprobado</text:p>
      <text:p text:style-name="Standard"><text:s text:c="2"/>- Sprint 7: aprobado</text:p>
      <text:p text:style-name="Standard"/>
      <text:p text:style-name="Standard"><text:s text:c="2"/>Si quieres, te doy ya el prompt blindado para Sprint 8.</text:p>
      <text:p text:style-name="Standard"/>
      <text:p text:style-name="Standard"/>
      <text:p text:style-name="Standard">› so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oft-page-break/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8.</text:p>
      <text:p text:style-name="Standard"/>
      <text:p text:style-name="Standard"><text:s text:c="2"/>ALCANCE EXACTO</text:p>
      <text:p text:style-name="Standard"><text:s text:c="2"/>Debes crear o dejar listos unicamente estos elementos:</text:p>
      <text:p text:style-name="Standard"><text:s text:c="2"/>- orchestrator/directive_generator.py</text:p>
      <text:p text:style-name="Standard"><text:s text:c="2"/>- runtime/directives/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9 o posteriores.</text:p>
      <text:p text:style-name="Standard"/>
      <text:p text:style-name="Standard"><text:s text:c="2"/>OBJETIVO FUNCIONAL DE SPRINT 8</text:p>
      <text:p text:style-name="Standard"><text:s text:c="2"/>Generar directivas operativas por tarea a partir de política, plan, estado,</text:p>
      <text:p text:style-name="Standard"><text:s text:c="2"/>contexto y HABLA BASIC, y persistirlas en disco.</text:p>
      <text:p text:style-name="Standard"/>
      <text:p text:style-name="Standard"><text:s text:c="2"/>REQUISITOS FUNCIONALES</text:p>
      <text:p text:style-name="Standard"/>
      <text:p text:style-name="Standard"><text:s text:c="2"/>1. `orchestrator/directive_generator.py` debe poder:</text:p>
      <text:p text:style-name="Standard"><text:s text:c="2"/>- recibir un contexto de `directive_context.py`</text:p>
      <text:p text:style-name="Standard"><text:s text:c="2"/>- recibir la estructura procedural de `habla_adapter.py`</text:p>
      <text:p text:style-name="Standard"><text:s text:c="2"/>- construir una directiva operativa clara para el worker de la tarea actual</text:p>
      <text:p text:style-name="Standard"><text:s text:c="2"/>- no depender de prompts manuales permanentes</text:p>
      <text:p text:style-name="Standard"><text:s text:c="2"/>- producir una salida determinista y auditable</text:p>
      <text:p text:style-name="Standard"/>
      <text:p text:style-name="Standard"><text:s text:c="2"/>2. La directiva generada debe incorporar como minimo:</text:p>
      <text:p text:style-name="Standard"><text:s text:c="2"/>- identidad de la tarea</text:p>
      <text:p text:style-name="Standard"><text:s text:c="2"/>- objetivo operativo actual</text:p>
      <text:p text:style-name="Standard"><text:s text:c="2"/>- restricciones activas</text:p>
      <text:p text:style-name="Standard"><text:s text:c="2"/>- alcance controlado del sprint</text:p>
      <text:p text:style-name="Standard"><text:s text:c="2"/>- evidencia requerida</text:p>
      <text:p text:style-name="Standard"><text:s text:c="2"/>- validacion esperada</text:p>
      <text:p text:style-name="Standard"><text:s text:c="2"/>- checkpoint de partida</text:p>
      <text:p text:style-name="Standard"><text:s text:c="2"/>- riesgos o bloqueos conocidos</text:p>
      <text:p text:style-name="Standard"><text:s text:c="2"/>- criterio de cierre</text:p>
      <text:p text:style-name="Standard"><text:s text:c="2"/>- ruta obligatoria del repositorio</text:p>
      <text:p text:style-name="Standard"><text:s text:c="2"/>- prohibiciones de ruta</text:p>
      <text:p text:style-name="Standard"><text:s text:c="2"/>- entregables exactos del sprint actual</text:p>
      <text:p text:style-name="Standard"><text:s text:c="2"/>- fuera de alcance relevante</text:p>
      <text:p text:style-name="Standard"/>
      <text:p text:style-name="Standard"><text:s text:c="2"/>3. Persistencia obligatoria</text:p>
      <text:p text:style-name="Standard"><text:s text:c="2"/>Debes persistir la directiva generada en disco dentro de:</text:p>
      <text:p text:style-name="Standard"><text:soft-page-break/><text:s text:c="2"/>- `runtime/directives/`</text:p>
      <text:p text:style-name="Standard"/>
      <text:p text:style-name="Standard"><text:s text:c="2"/>La persistencia debe dejar al menos:</text:p>
      <text:p text:style-name="Standard"><text:s text:c="2"/>- una representacion estructurada de la directiva</text:p>
      <text:p text:style-name="Standard"><text:s text:c="2"/>- un artefacto facilmente auditable</text:p>
      <text:p text:style-name="Standard"><text:s text:c="2"/>- trazabilidad de:</text:p>
      <text:p text:style-name="Standard"><text:s text:c="4"/>- task_id</text:p>
      <text:p text:style-name="Standard"><text:s text:c="4"/>- sprint</text:p>
      <text:p text:style-name="Standard"><text:s text:c="4"/>- timestamp</text:p>
      <text:p text:style-name="Standard"><text:s text:c="4"/>- fuente del contexto o checkpoint si aplica</text:p>
      <text:p text:style-name="Standard"/>
      <text:p text:style-name="Standard"><text:s text:c="2"/>4. Diseño de salida</text:p>
      <text:p text:style-name="Standard"><text:s text:c="2"/>La directiva debe servir para un worker real.</text:p>
      <text:p text:style-name="Standard"><text:s text:c="2"/>Puede tener:</text:p>
      <text:p text:style-name="Standard"><text:s text:c="2"/>- forma estructurada principal para máquina</text:p>
      <text:p text:style-name="Standard"><text:s text:c="2"/>- y opcionalmente una representación textual derivada</text:p>
      <text:p text:style-name="Standard"><text:s text:c="2"/>Pero la parte estructurada es obligatoria.</text:p>
      <text:p text:style-name="Standard"/>
      <text:p text:style-name="Standard"><text:s text:c="2"/>5. Debe existir una API mínima util para el control plane</text:p>
      <text:p text:style-name="Standard"><text:s text:c="2"/>Ejemplos aceptables:</text:p>
      <text:p text:style-name="Standard"><text:s text:c="2"/>- `generate_directive(...)`</text:p>
      <text:p text:style-name="Standard"><text:s text:c="2"/>- `persist_directive(...)`</text:p>
      <text:p text:style-name="Standard"><text:s text:c="2"/>- `load_latest_directive(...)`</text:p>
      <text:p text:style-name="Standard"><text:s text:c="2"/>- `render_worker_instruction(...)`</text:p>
      <text:p text:style-name="Standard"/>
      <text:p text:style-name="Standard"><text:s text:c="2"/>6. Robustez mínima</text:p>
      <text:p text:style-name="Standard"><text:s text:c="2"/>- si no hay tarea activa, fallar de forma clara o degradar estructuradamente</text:p>
      <text:p text:style-name="Standard"><text:s text:c="2"/>- no inventar directivas para tareas inexistentes</text:p>
      <text:p text:style-name="Standard"><text:s text:c="2"/>- no depender de memoria implícita</text:p>
      <text:p text:style-name="Standard"><text:s text:c="2"/>- no escribir fuera de `runtime/directives/`</text:p>
      <text:p text:style-name="Standard"/>
      <text:p text:style-name="Standard"><text:s text:c="2"/>7. Compatibilidad</text:p>
      <text:p text:style-name="Standard"><text:s text:c="2"/>- usar `policy_loader.py`</text:p>
      <text:p text:style-name="Standard"><text:s text:c="2"/>- usar `plan_loader.py`</text:p>
      <text:p text:style-name="Standard"><text:s text:c="2"/>- usar `directive_context.py`</text:p>
      <text:p text:style-name="Standard"><text:s text:c="2"/>- usar `habla_adapter.py`</text:p>
      <text:p text:style-name="Standard"><text:s text:c="2"/>- preparar el camino para Sprint 9</text:p>
      <text:p text:style-name="Standard"><text:s text:c="2"/>- no integrar todavía de lleno con `agent_runtime.py`</text:p>
      <text:p text:style-name="Standard"/>
      <text:p text:style-name="Standard"><text:s text:c="2"/>DISENO PRAGMATICO</text:p>
      <text:p text:style-name="Standard"><text:s text:c="2"/>- no intentes todavía toda la integración con el runtime viejo</text:p>
      <text:p text:style-name="Standard"><text:s text:c="2"/>- no conviertas la directiva en un prompt kilométrico</text:p>
      <text:p text:style-name="Standard"><text:s text:c="2"/>- mantenla clara, fuerte y operativa</text:p>
      <text:p text:style-name="Standard"><text:s text:c="2"/>- la salida debe parecer una orden ejecutable por tarea, no un ensayo</text:p>
      <text:p text:style-name="Standard"><text:s text:c="2"/>- si generas texto final para worker, debe salir del contexto estructurado, no</text:p>
      <text:p text:style-name="Standard"><text:s text:c="2"/>de improvisación</text:p>
      <text:p text:style-name="Standard"/>
      <text:p text:style-name="Standard"><text:s text:c="2"/>SI NECESITAS APOYO MINIMO</text:p>
      <text:p text:style-name="Standard"><text:s text:c="2"/>Puedes crear stubs pequenos y seguros solo si son inevitables para dejar</text:p>
      <text:p text:style-name="Standard"><text:s text:c="2"/>Sprint 8 coherente, pero no implementes todavia:</text:p>
      <text:p text:style-name="Standard"><text:s text:c="2"/>- integracion completa con agent_runtime.py</text:p>
      <text:p text:style-name="Standard"><text:s text:c="2"/>- orchestrator/benchmark.py</text:p>
      <text:p text:style-name="Standard"><text:soft-page-break/></text:p>
      <text:p text:style-name="Standard"><text:s text:c="2"/>RESTRICCIONES DURAS</text:p>
      <text:p text:style-name="Standard"><text:s text:c="2"/>- no implementar Sprint 9 ni posteriores</text:p>
      <text:p text:style-name="Standard"><text:s text:c="2"/>- no crear benchmark.py</text:p>
      <text:p text:style-name="Standard"><text:s text:c="2"/>- no tocar agent_runtime.py salvo ajuste minimo inevitable y claramente</text:p>
      <text:p text:style-name="Standard"><text:s text:c="2"/>justificado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CRITERIOS DE ACEPTACION</text:p>
      <text:p text:style-name="Standard"><text:s text:c="2"/>Sprint 8 queda correcto si:</text:p>
      <text:p text:style-name="Standard"><text:s text:c="2"/>- existe `orchestrator/directive_generator.py`</text:p>
      <text:p text:style-name="Standard"><text:s text:c="2"/>- existe `runtime/directives/`</text:p>
      <text:p text:style-name="Standard"><text:s text:c="2"/>- el sistema puede generar una directiva por tarea a partir de contexto +</text:p>
      <text:p text:style-name="Standard"><text:s text:c="2"/>HABLA</text:p>
      <text:p text:style-name="Standard"><text:s text:c="2"/>- la directiva queda persistida y auditable</text:p>
      <text:p text:style-name="Standard"><text:s text:c="2"/>- queda preparado el camino para Sprint 9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Generación</text:p>
      <text:p text:style-name="Standard"><text:s text:c="2"/>- una tarea activa real o sintética puede producir una directiva válida</text:p>
      <text:p text:style-name="Standard"/>
      <text:p text:style-name="Standard"><text:s text:c="2"/>2. Persistencia</text:p>
      <text:p text:style-name="Standard"><text:s text:c="2"/>- la directiva queda escrita en `runtime/directives/`</text:p>
      <text:p text:style-name="Standard"><text:s text:c="2"/>- se puede identificar por task_id o timestamp</text:p>
      <text:p text:style-name="Standard"><text:s text:c="2"/>- se puede volver a cargar</text:p>
      <text:p text:style-name="Standard"/>
      <text:p text:style-name="Standard"><text:s text:c="2"/>3. Contenido mínimo</text:p>
      <text:p text:style-name="Standard"><text:s text:c="2"/>- la directiva contiene restricciones, evidencia, validación, checkpoint y</text:p>
      <text:p text:style-name="Standard"><text:s text:c="2"/>cierre</text:p>
      <text:p text:style-name="Standard"><text:s text:c="2"/>- la directiva contiene ruta obligatoria y rutas prohibidas</text:p>
      <text:p text:style-name="Standard"><text:s text:c="2"/>- la directiva refleja el sprint correcto</text:p>
      <text:p text:style-name="Standard"/>
      <text:p text:style-name="Standard"><text:s text:c="2"/>4. Robustez</text:p>
      <text:p text:style-name="Standard"><text:s text:c="2"/>- si no hay tarea activa, no inventa una directiva falsa</text:p>
      <text:p text:style-name="Standard"><text:s text:c="2"/>- el fallo o degradación quedan claros</text:p>
      <text:p text:style-name="Standard"/>
      <text:p text:style-name="Standard"><text:s text:c="2"/>SI AGREGAS TESTS</text:p>
      <text:p text:style-name="Standard"><text:s text:c="2"/>Mantenlos pequenos y enfocados solo en Sprint 8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9</text:p>
      <text:p text:style-name="Standard"/>
      <text:p text:style-name="Standard"/>
      <text:p text:style-name="Standard">› ya termino</text:p>
      <text:p text:style-name="Standard"><text:soft-page-break/></text:p>
      <text:p text:style-name="Standard"/>
      <text:p text:style-name="Standard">• Voy a auditar Sprint 8: revisar el generador, comprobar que persiste</text:p>
      <text:p text:style-name="Standard"><text:s text:c="2"/>directivas reales en runtime/directives/ y validar que no invente una tarea si</text:p>
      <text:p text:style-name="Standard"><text:s text:c="2"/>el contexto no la tiene.</text:p>
      <text:p text:style-name="Standard"/>
      <text:p text:style-name="Standard">• El generador y los artefactos existen. Ahora voy a revisar el resto del</text:p>
      <text:p text:style-name="Standard"><text:s text:c="2"/>archivo y luego lo voy a probar con casos reales: generación, persistencia,</text:p>
      <text:p text:style-name="Standard"><text:s text:c="2"/>recarga y fallo limpio sin tarea activa.</text:p>
      <text:p text:style-name="Standard"/>
      <text:p text:style-name="Standard">• La persistencia y la forma general se ven bien. Ahora voy a ejecutar pruebas</text:p>
      <text:p text:style-name="Standard"><text:s text:c="2"/>directas del API: generar con contexto real/sintético, cargar la última</text:p>
      <text:p text:style-name="Standard"><text:s text:c="2"/>directiva y confirmar que sin tarea activa falle limpio.</text:p>
      <text:p text:style-name="Standard"/>
      <text:p text:style-name="Standard">• No encontré hallazgos bloqueantes. Doy Sprint 8 por aprobado.</text:p>
      <text:p text:style-name="Standard"/>
      <text:p text:style-name="Standard"><text:s text:c="2"/>Verifiqué directive_generator.py y la persistencia real en runtime/directives.</text:p>
      <text:p text:style-name="Standard"><text:s text:c="2"/>También revisé los artefactos generados JSON y Markdown.</text:p>
      <text:p text:style-name="Standard"/>
      <text:p text:style-name="Standard"><text:s text:c="2"/>Validación real que corrí:</text:p>
      <text:p text:style-name="Standard"/>
      <text:p text:style-name="Standard"><text:s text:c="2"/>- py_compile del generador: pasó.</text:p>
      <text:p text:style-name="Standard"><text:s text:c="2"/>- En un runtime sintético con tarea activa, generó directiva válida para TASK-</text:p>
      <text:p text:style-name="Standard"><text:s text:c="4"/>S8-TEST.</text:p>
      <text:p text:style-name="Standard"><text:s text:c="2"/>- La persistencia escribió .json y .md dentro de runtime/directives/.</text:p>
      <text:p text:style-name="Standard"><text:s text:c="2"/>- load_latest_directive() recargó correctamente la directiva persistida.</text:p>
      <text:p text:style-name="Standard"><text:s text:c="2"/>- La directiva contiene root obligatorio, rutas prohibidas, sprint correcto,</text:p>
      <text:p text:style-name="Standard"><text:s text:c="4"/>evidencia, validación, checkpoint y cierre.</text:p>
      <text:p text:style-name="Standard"><text:s text:c="2"/>- En el runtime real sin tarea activa, generate_directive() falló limpio con</text:p>
      <text:p text:style-name="Standard"><text:s text:c="4"/>missing_active_task; no inventa una directiva falsa.</text:p>
      <text:p text:style-name="Standard"/>
      <text:p text:style-name="Standard"><text:s text:c="2"/>Reserva menor:</text:p>
      <text:p text:style-name="Standard"/>
      <text:p text:style-name="Standard"><text:s text:c="2"/>- no veo tests automatizados nuevos persistidos para Sprint 8; la validación</text:p>
      <text:p text:style-name="Standard"><text:s text:c="4"/>quedó bien por ejecución manual reproducible, no por suite dedicada.</text:p>
      <text:p text:style-name="Standard"/>
      <text:p text:style-name="Standard"><text:s text:c="2"/>Estado global:</text:p>
      <text:p text:style-name="Standard"/>
      <text:p text:style-name="Standard"><text:s text:c="2"/>- Sprint 1 a Sprint 8: aprobados</text:p>
      <text:p text:style-name="Standard"/>
      <text:p text:style-name="Standard"><text:s text:c="2"/>Si quieres, te doy ya el prompt blindado para Sprint 9.</text:p>
      <text:p text:style-name="Standard"/>
      <text:p text:style-name="Standard"/>
      <text:p text:style-name="Standard">› si dame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><text:soft-page-break/></text:p>
      <text:p text:style-name="Standard"><text:s text:c="2"/>Debes implement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9.</text:p>
      <text:p text:style-name="Standard"/>
      <text:p text:style-name="Standard"><text:s text:c="2"/>ALCANCE EXACTO</text:p>
      <text:p text:style-name="Standard"><text:s text:c="2"/>Debes integrar de forma controlada el runtime existente con el nuevo control</text:p>
      <text:p text:style-name="Standard"><text:s text:c="2"/>plane por tareas y directivas.</text:p>
      <text:p text:style-name="Standard"/>
      <text:p text:style-name="Standard"><text:s text:c="2"/>La implementacion de esta corrida debe centrarse en:</text:p>
      <text:p text:style-name="Standard"><text:s text:c="2"/>- modificación acotada de `backend/agent_runtime.py`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Sprint 10 ni posteriores.</text:p>
      <text:p text:style-name="Standard"/>
      <text:p text:style-name="Standard"><text:s text:c="2"/>OBJETIVO FUNCIONAL DE SPRINT 9</text:p>
      <text:p text:style-name="Standard"><text:s text:c="2"/>Hacer que el runtime existente deje de depender del modelo viejo de sesión</text:p>
      <text:p text:style-name="Standard"><text:s text:c="2"/>monolítica y pueda consumir directivas generadas por el nuevo control plane.</text:p>
      <text:p text:style-name="Standard"/>
      <text:p text:style-name="Standard"><text:s text:c="2"/>REQUISITOS FUNCIONALES</text:p>
      <text:p text:style-name="Standard"/>
      <text:p text:style-name="Standard"><text:s text:c="2"/>1. `backend/agent_runtime.py` debe poder:</text:p>
      <text:p text:style-name="Standard"><text:s text:c="2"/>- usar modos explícitos solamente:</text:p>
      <text:p text:style-name="Standard"><text:s text:c="4"/>- smoke</text:p>
      <text:p text:style-name="Standard"><text:s text:c="4"/>- build</text:p>
      <text:p text:style-name="Standard"><text:s text:c="4"/>- medium</text:p>
      <text:p text:style-name="Standard"><text:s text:c="4"/>- long-run</text:p>
      <text:p text:style-name="Standard"><text:s text:c="2"/>- dejar de inferir smoke por heurísticas frágiles</text:p>
      <text:p text:style-name="Standard"><text:s text:c="2"/>- tratar una sesión como contenedor de tareas, no como una sola corrida</text:p>
      <text:p text:style-name="Standard"><text:s text:c="2"/>monolítica</text:p>
      <text:p text:style-name="Standard"><text:s text:c="2"/>- cargar o construir una tarea activa desde la cola persistida</text:p>
      <text:p text:style-name="Standard"><text:s text:c="2"/>- construir contexto con `directive_context.py`</text:p>
      <text:p text:style-name="Standard"><text:s text:c="2"/>- construir guía procedural con `habla_adapter.py`</text:p>
      <text:p text:style-name="Standard"><text:s text:c="2"/>- generar directiva con `directive_generator.py`</text:p>
      <text:p text:style-name="Standard"><text:s text:c="2"/>- pasar esa directiva al worker como instrucción de ejecución</text:p>
      <text:p text:style-name="Standard"/>
      <text:p text:style-name="Standard"><text:s text:c="2"/>2. Integración mínima con el flujo existente</text:p>
      <text:p text:style-name="Standard"><text:s text:c="2"/>- no destruir de golpe toda la compatibilidad anterior</text:p>
      <text:p text:style-name="Standard"><text:s text:c="2"/>- la integración debe ser acotada y controlada</text:p>
      <text:p text:style-name="Standard"><text:s text:c="2"/>- si el nuevo flujo no puede ejecutarse, debe fallar de forma clara</text:p>
      <text:p text:style-name="Standard"><text:soft-page-break/><text:s text:c="2"/>- no volver a heurísticas viejas como escape silencioso</text:p>
      <text:p text:style-name="Standard"/>
      <text:p text:style-name="Standard"><text:s text:c="2"/>3. Timeout y modo</text:p>
      <text:p text:style-name="Standard"><text:s text:c="2"/>- el runtime debe manejar timeout por tarea o al menos respetar claramente el</text:p>
      <text:p text:style-name="Standard"><text:s text:c="2"/>timeout de la tarea activa</text:p>
      <text:p text:style-name="Standard"><text:s text:c="2"/>- `long-run` no debe comportarse igual que `smoke`</text:p>
      <text:p text:style-name="Standard"><text:s text:c="2"/>- el modo debe venir de configuración explícita o del contrato de tarea, no de</text:p>
      <text:p text:style-name="Standard"><text:s text:c="2"/>palabras del prompt</text:p>
      <text:p text:style-name="Standard"/>
      <text:p text:style-name="Standard"><text:s text:c="2"/>4. Evidencia y trazabilidad</text:p>
      <text:p text:style-name="Standard"><text:s text:c="2"/>- la tarea activa debe poder dejar:</text:p>
      <text:p text:style-name="Standard"><text:s text:c="4"/>- directiva persistida</text:p>
      <text:p text:style-name="Standard"><text:s text:c="4"/>- resultado estructurado</text:p>
      <text:p text:style-name="Standard"><text:s text:c="4"/>- validación</text:p>
      <text:p text:style-name="Standard"><text:s text:c="4"/>- checkpoint o fallo según corresponda</text:p>
      <text:p text:style-name="Standard"><text:s text:c="2"/>- el runtime no debe afirmar que ejecutó una tarea si no existe esa</text:p>
      <text:p text:style-name="Standard"><text:s text:c="2"/>trazabilidad</text:p>
      <text:p text:style-name="Standard"/>
      <text:p text:style-name="Standard"><text:s text:c="2"/>5. Degradación clara</text:p>
      <text:p text:style-name="Standard"><text:s text:c="2"/>- si falta cola, contexto o directiva, el runtime debe decirlo claramente</text:p>
      <text:p text:style-name="Standard"><text:s text:c="2"/>- no debe fingir una sesión buena cuando el control plane no pudo preparar la</text:p>
      <text:p text:style-name="Standard"><text:s text:c="2"/>tarea</text:p>
      <text:p text:style-name="Standard"/>
      <text:p text:style-name="Standard"><text:s text:c="2"/>6. Compatibilidad</text:p>
      <text:p text:style-name="Standard"><text:s text:c="2"/>- usar:</text:p>
      <text:p text:style-name="Standard"><text:s text:c="4"/>- `orchestrator/planner.py`</text:p>
      <text:p text:style-name="Standard"><text:s text:c="4"/>- `orchestrator/task_queue.py`</text:p>
      <text:p text:style-name="Standard"><text:s text:c="4"/>- `orchestrator/directive_context.py`</text:p>
      <text:p text:style-name="Standard"><text:s text:c="4"/>- `orchestrator/habla_adapter.py`</text:p>
      <text:p text:style-name="Standard"><text:s text:c="4"/>- `orchestrator/directive_generator.py`</text:p>
      <text:p text:style-name="Standard"><text:s text:c="4"/>- `workers/codex_worker.py`</text:p>
      <text:p text:style-name="Standard"><text:s text:c="4"/>- `orchestrator/validator.py`</text:p>
      <text:p text:style-name="Standard"><text:s text:c="4"/>- `orchestrator/recovery.py`</text:p>
      <text:p text:style-name="Standard"><text:s text:c="2"/>- no implementar aún `orchestrator/benchmark.py`</text:p>
      <text:p text:style-name="Standard"/>
      <text:p text:style-name="Standard"><text:s text:c="2"/>DISENO PRAGMATICO</text:p>
      <text:p text:style-name="Standard"><text:s text:c="2"/>- no intentes rehacer todo `agent_runtime.py` desde cero</text:p>
      <text:p text:style-name="Standard"><text:s text:c="2"/>- haz una migración controlada</text:p>
      <text:p text:style-name="Standard"><text:s text:c="2"/>- si necesitas adaptadores o helpers pequeños, mantenlos acotados</text:p>
      <text:p text:style-name="Standard"><text:s text:c="2"/>- evita “dualidad confusa” entre flujo viejo y nuevo</text:p>
      <text:p text:style-name="Standard"><text:s text:c="2"/>- el nuevo camino debe quedar identificable y auditable</text:p>
      <text:p text:style-name="Standard"/>
      <text:p text:style-name="Standard"><text:s text:c="2"/>SI NECESITAS APOYO MINIMO</text:p>
      <text:p text:style-name="Standard"><text:s text:c="2"/>Puedes crear helpers pequeños y seguros si son inevitables para integrar</text:p>
      <text:p text:style-name="Standard"><text:s text:c="2"/>Sprint 9, pero no implementes todavía:</text:p>
      <text:p text:style-name="Standard"><text:s text:c="2"/>- orchestrator/benchmark.py</text:p>
      <text:p text:style-name="Standard"><text:s text:c="2"/>- despliegue final de Sprint 10</text:p>
      <text:p text:style-name="Standard"/>
      <text:p text:style-name="Standard"><text:s text:c="2"/>RESTRICCIONES DURAS</text:p>
      <text:p text:style-name="Standard"><text:s text:c="2"/>- no implementar Sprint 10</text:p>
      <text:p text:style-name="Standard"><text:s text:c="2"/>- no crear benchmark.py</text:p>
      <text:p text:style-name="Standard"><text:s text:c="2"/>- no trabajar dentro de runtime_orquestador_codex_pack/</text:p>
      <text:p text:style-name="Standard"><text:soft-page-break/><text:s text:c="2"/>- no trabajar dentro de workspace/projects/</text:p>
      <text:p text:style-name="Standard"><text:s text:c="2"/>- no reportar exito sin evidencia real en disco</text:p>
      <text:p text:style-name="Standard"><text:s text:c="2"/>- no dejar el runtime mezclando humo con control plane real sin dejarlo claro</text:p>
      <text:p text:style-name="Standard"/>
      <text:p text:style-name="Standard"><text:s text:c="2"/>CRITERIOS DE ACEPTACION</text:p>
      <text:p text:style-name="Standard"><text:s text:c="2"/>Sprint 9 queda correcto si:</text:p>
      <text:p text:style-name="Standard"><text:s text:c="2"/>- `agent_runtime.py` consume el nuevo control plane</text:p>
      <text:p text:style-name="Standard"><text:s text:c="2"/>- el modo smoke ya no depende de heurísticas por palabras</text:p>
      <text:p text:style-name="Standard"><text:s text:c="2"/>- una tarea activa puede generar y usar una directiva real</text:p>
      <text:p text:style-name="Standard"><text:s text:c="2"/>- el runtime deja trazabilidad de esa directiva y del resultado</text:p>
      <text:p text:style-name="Standard"><text:s text:c="2"/>- queda listo el camino para Sprint 10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El runtime puede preparar una tarea activa desde el control plane</text:p>
      <text:p text:style-name="Standard"><text:s text:c="2"/>2. El runtime puede generar una directiva real para esa tarea</text:p>
      <text:p text:style-name="Standard"><text:s text:c="2"/>3. El runtime puede pasar esa directiva al worker</text:p>
      <text:p text:style-name="Standard"><text:s text:c="2"/>4. El flujo deja evidencia real en disco</text:p>
      <text:p text:style-name="Standard"><text:s text:c="2"/>5. Smoke ya no depende de palabras del prompt</text:p>
      <text:p text:style-name="Standard"><text:s text:c="2"/>6. Si falta una pieza del control plane, el fallo es claro y no engañoso</text:p>
      <text:p text:style-name="Standard"/>
      <text:p text:style-name="Standard"><text:s text:c="2"/>SI AGREGAS TESTS</text:p>
      <text:p text:style-name="Standard"><text:s text:c="2"/>Mantenlos pequeños y enfocados solo en Sprint 9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</text:p>
      <text:p text:style-name="Standard"><text:s text:c="2"/>4. que falta para Sprint 10</text:p>
      <text:p text:style-name="Standard"/>
      <text:p text:style-name="Standard"/>
      <text:p text:style-name="Standard">› ya termino</text:p>
      <text:p text:style-name="Standard"/>
      <text:p text:style-name="Standard"/>
      <text:p text:style-name="Standard">• Voy a auditar Sprint 9 sobre agent_runtime.py, revisar si realmente consume el</text:p>
      <text:p text:style-name="Standard"><text:s text:c="2"/>nuevo control plane y verificar el cambio de modos, directivas y trazabilidad.</text:p>
      <text:p text:style-name="Standard"/>
      <text:p text:style-name="Standard">• Ya veo la integración principal. Ahora voy a leer el flujo de sesión y</text:p>
      <text:p text:style-name="Standard"><text:s text:c="2"/>ejecución alrededor del control plane, porque ahí es donde suelen quedar</text:p>
      <text:p text:style-name="Standard"><text:s text:c="2"/>regresiones: modo, cola, worker y manejo de fallos.</text:p>
      <text:p text:style-name="Standard"/>
      <text:p text:style-name="Standard">• La ruta principal ya está clara. Ahora voy a buscar las pruebas y, sobre todo,</text:p>
      <text:p text:style-name="Standard"><text:s text:c="2"/>si quedaron restos del smoke heurístico vivos en caminos que todavía se</text:p>
      <text:p text:style-name="Standard"><text:s text:c="2"/>ejecuten.</text:p>
      <text:p text:style-name="Standard"/>
      <text:p text:style-name="Standard">• Ya confirmé que sí tocaron tests del backend. Voy a leer las pruebas nuevas de</text:p>
      <text:p text:style-name="Standard"><text:s text:c="2"/>agent_runtime para ver qué cubren y qué no cubren, porque ahí suele verse el</text:p>
      <text:p text:style-name="Standard"><text:s text:c="2"/>hueco real de integración.</text:p>
      <text:p text:style-name="Standard"/>
      <text:p text:style-name="Standard">• No vi cobertura nueva con ese filtro, así que voy a ubicar el tamaño real del</text:p>
      <text:p text:style-name="Standard"><text:soft-page-break/><text:s text:c="2"/>archivo y abrir los tramos donde seguramente cayeron los tests más recientes.</text:p>
      <text:p text:style-name="Standard"/>
      <text:p text:style-name="Standard">• No veo pruebas nuevas de Sprint 9, así que además de eso voy a buscar bugs</text:p>
      <text:p text:style-name="Standard"><text:s text:c="2"/>funcionales directos en el flujo integrado: bootstrap de cola, transición de</text:p>
      <text:p text:style-name="Standard"><text:s text:c="2"/>estado y ejecución del worker.</text:p>
      <text:p text:style-name="Standard"/>
      <text:p text:style-name="Standard">• Voy a mirar el executor y el worker una vez, porque Sprint 9 depende de que el</text:p>
      <text:p text:style-name="Standard"><text:s text:c="2"/>runtime les pase el comando y el timeout con el contrato correcto.</text:p>
      <text:p text:style-name="Standard"/>
      <text:p text:style-name="Standard">• Estoy buscando el fallo de integración real. Voy a probar el flujo control-</text:p>
      <text:p text:style-name="Standard"><text:s text:c="2"/>plane aislado en runtime temporal y revisar cómo trata retry/split, porque ahí</text:p>
      <text:p text:style-name="Standard"><text:s text:c="2"/>es donde suele quedarse la orquestación “a medias”.</text:p>
      <text:p text:style-name="Standard"/>
      <text:p text:style-name="Standard">• Encontré un punto sospechoso en recovery: parece devolver retry, pero el</text:p>
      <text:p text:style-name="Standard"><text:s text:c="2"/>runtime deja la tarea en failed. Voy a reproducirlo de punta a punta en un</text:p>
      <text:p text:style-name="Standard"><text:s text:c="2"/>runtime temporal, porque si eso se confirma el reintento quedó roto aunque la</text:p>
      <text:p text:style-name="Standard"><text:s text:c="2"/>integración “parezca” completa.</text:p>
      <text:p text:style-name="Standard"/>
      <text:p text:style-name="Standard">• Ya confirmé un bug serio de recovery/reintento. Voy a revisar un último</text:p>
      <text:p text:style-name="Standard"><text:s text:c="2"/>frente: si la heurística de smoke vieja quedó viva en otro camino público del</text:p>
      <text:p text:style-name="Standard"><text:s text:c="2"/>runtime, porque eso también invalidaría la migración.</text:p>
      <text:p text:style-name="Standard"/>
      <text:p text:style-name="Standard">• Hay otro hueco probable: split parece persistirse, pero no veo que el runtime</text:p>
      <text:p text:style-name="Standard"><text:s text:c="2"/>meta las subtareas nuevas en la cola. Lo voy a reproducir, porque si eso falla</text:p>
      <text:p text:style-name="Standard"><text:s text:c="2"/>el recovery quedó solo “documentado”, no operativo.</text:p>
      <text:p text:style-name="Standard"/>
      <text:p text:style-name="Standard">• La prueba del caso split sigue corriendo por el timeout intencional de la</text:p>
      <text:p text:style-name="Standard"><text:s text:c="2"/>tarea. Voy a esperar el resultado para confirmar si la cola realmente recibe</text:p>
      <text:p text:style-name="Standard"><text:s text:c="2"/>las subtareas o no.</text:p>
      <text:p text:style-name="Standard"/>
      <text:p text:style-name="Standard">• Ya tengo dos fallos funcionales reproducidos. Voy a sacar las líneas exactas</text:p>
      <text:p text:style-name="Standard"><text:s text:c="2"/>para dejar la auditoría bien anclada en código.</text:p>
      <text:p text:style-name="Standard"/>
      <text:p text:style-name="Standard">• Tengo los fallos. Voy a correr una verificación mínima de sintaxis del runtime</text:p>
      <text:p text:style-name="Standard"><text:s text:c="2"/>para separar “rompe el flujo” de “ni siquiera compila”, y ya cierro la</text:p>
      <text:p text:style-name="Standard"><text:s text:c="2"/>auditoría con severidad y evidencia.</text:p>
      <text:p text:style-name="Standard"/>
      <text:p text:style-name="Standard">• Findings</text:p>
      <text:p text:style-name="Standard"/>
      <text:p text:style-name="Standard"><text:s text:c="2"/>- Alta: el camino de retry quedó roto. En agent_runtime.py:2029 siempre se</text:p>
      <text:p text:style-name="Standard"><text:s text:c="4"/>llama recover_task(..., retry_count=0), y luego en agent_runtime.py:2040</text:p>
      <text:p text:style-name="Standard"><text:s text:c="4"/>cualquier acción distinta de block termina marcando la tarea como failed. Lo</text:p>
      <text:p text:style-name="Standard"><text:s text:c="4"/>reproduje en un runtime temporal: la primera falla devolvió decisión retry,</text:p>
      <text:p text:style-name="Standard"><text:s text:c="4"/>pero la cola quedó con la tarea en failed, y el siguiente prepare abortó con</text:p>
      <text:p text:style-name="Standard"><text:s text:c="4"/>control_plane_no_ready_task. Así, ni se acumula retry_count ni existe un</text:p>
      <text:p text:style-name="Standard"><text:s text:c="4"/>reintento ejecutable.</text:p>
      <text:p text:style-name="Standard"><text:s text:c="2"/>- Alta: las decisiones split no se aplican a la cola. El mismo bloque de</text:p>
      <text:p text:style-name="Standard"><text:s text:c="4"/>agent_runtime.py:2029 sí obtiene split_tasks desde recovery, pero en</text:p>
      <text:p text:style-name="Standard"><text:s text:c="4"/>agent_runtime.py:2041 solo cambia el estado de la tarea original y nunca</text:p>
      <text:p text:style-name="Standard"><text:s text:c="4"/>encola las subtareas. Lo reproduje con una tarea que forzó split: recovery</text:p>
      <text:p text:style-name="Standard"><text:s text:c="4"/>devolvió 2 subtareas, pero task_queue.json siguió con 1 sola entrada, la</text:p>
      <text:p text:style-name="Standard"><text:s text:c="4"/>original.</text:p>
      <text:p text:style-name="Standard"><text:soft-page-break/><text:s text:c="2"/>- Media: no encontré cobertura automatizada del nuevo camino de control plane</text:p>
      <text:p text:style-name="Standard"><text:s text:c="4"/>introducido en agent_runtime.py:1605, agent_runtime.py:1932 y</text:p>
      <text:p text:style-name="Standard"><text:s text:c="4"/>agent_runtime.py:3269. En test_agent_runtime_habla.py:1 no vi pruebas que</text:p>
      <text:p text:style-name="Standard"><text:s text:c="4"/>ejerzan ese flujo, y por eso los dos fallos anteriores pasan intactos.</text:p>
      <text:p text:style-name="Standard"/>
      <text:p text:style-name="Standard"><text:s text:c="2"/>Assumptions</text:p>
      <text:p text:style-name="Standard"/>
      <text:p text:style-name="Standard"><text:s text:c="2"/>- Estoy asumiendo que retry debe reencolar la misma tarea o al menos</text:p>
      <text:p text:style-name="Standard"><text:s text:c="4"/>devolverla a pending con retry_count persistido.</text:p>
      <text:p text:style-name="Standard"><text:s text:c="2"/>- También asumo que split debe materializar sus subtareas en task_queue.json,</text:p>
      <text:p text:style-name="Standard"><text:s text:c="4"/>no solo dejarlas dentro del checkpoint/recovery payload.</text:p>
      <text:p text:style-name="Standard"/>
      <text:p text:style-name="Standard"><text:s text:c="2"/>agent_runtime.py compila, y la parte de directivas sí existe, pero yo no</text:p>
      <text:p text:style-name="Standard"><text:s text:c="2"/>aprobaría Sprint 9 todavía. La integración con el control plane quedó a medio</text:p>
      <text:p text:style-name="Standard"><text:s text:c="2"/>camino: genera directivas, pero no puede recuperarse operativamente de fallos.</text:p>
      <text:p text:style-name="Standard"/>
      <text:p text:style-name="Standard"/>
      <text:p text:style-name="Standard">› entonces <text:s/>hagamos un prompt <text:s/>para que el agente corrija eso</text:p>
      <text:p text:style-name="Standard"/>
      <text:p text:style-name="Standard"/>
      <text:p text:style-name="Standard"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Corregir unicamente los bugs bloqueantes detectados en Sprint 9.</text:p>
      <text:p text:style-name="Standard"><text:s text:c="2"/>No avances Sprint 10.</text:p>
      <text:p text:style-name="Standard"/>
      <text:p text:style-name="Standard"><text:s text:c="2"/>BUGS A CORREGIR</text:p>
      <text:p text:style-name="Standard"/>
      <text:p text:style-name="Standard"><text:s text:c="2"/>1. BUG DE `retry` EN `backend/agent_runtime.py`</text:p>
      <text:p text:style-name="Standard"><text:s text:c="2"/>Problema real:</text:p>
      <text:p text:style-name="Standard"><text:s text:c="2"/>- cuando una tarea falla, `recover_task()` puede devolver decision `retry`</text:p>
      <text:p text:style-name="Standard"><text:s text:c="2"/>- pero el runtime deja la tarea en estado `failed`</text:p>
      <text:p text:style-name="Standard"><text:soft-page-break/><text:s text:c="2"/>- y en la siguiente preparación ya no existe tarea lista para ejecutar</text:p>
      <text:p text:style-name="Standard"/>
      <text:p text:style-name="Standard"><text:s text:c="2"/>Eso rompe el recovery operativo.</text:p>
      <text:p text:style-name="Standard"/>
      <text:p text:style-name="Standard"><text:s text:c="2"/>Correccion esperada:</text:p>
      <text:p text:style-name="Standard"><text:s text:c="2"/>- si recovery decide `retry`, la tarea no debe quedar muerta en `failed`</text:p>
      <text:p text:style-name="Standard"><text:s text:c="2"/>- debe quedar reencolada o al menos otra vez en `pending` de forma consistente</text:p>
      <text:p text:style-name="Standard"><text:s text:c="2"/>- el runtime debe poder volver a prepararla en una siguiente iteracion</text:p>
      <text:p text:style-name="Standard"><text:s text:c="2"/>- `retry_count` no puede quedarse siempre en `0`</text:p>
      <text:p text:style-name="Standard"><text:s text:c="2"/>- la trazabilidad del retry debe persistirse de forma clara</text:p>
      <text:p text:style-name="Standard"/>
      <text:p text:style-name="Standard"><text:s text:c="2"/>2. BUG DE `split` EN `backend/agent_runtime.py`</text:p>
      <text:p text:style-name="Standard"><text:s text:c="2"/>Problema real:</text:p>
      <text:p text:style-name="Standard"><text:s text:c="2"/>- cuando recovery decide `split`, el runtime recibe `split_tasks`</text:p>
      <text:p text:style-name="Standard"><text:s text:c="2"/>- pero no las inserta en `task_queue.json`</text:p>
      <text:p text:style-name="Standard"><text:s text:c="2"/>- la cola queda igual, con solo la tarea original</text:p>
      <text:p text:style-name="Standard"/>
      <text:p text:style-name="Standard"><text:s text:c="2"/>Eso vuelve inútil el split.</text:p>
      <text:p text:style-name="Standard"/>
      <text:p text:style-name="Standard"><text:s text:c="2"/>Correccion esperada:</text:p>
      <text:p text:style-name="Standard"><text:s text:c="2"/>- si recovery decide `split`, las subtareas deben persistirse en la cola</text:p>
      <text:p text:style-name="Standard"><text:s text:c="2"/>- la tarea original debe quedar en un estado coherente</text:p>
      <text:p text:style-name="Standard"><text:s text:c="2"/>- el sistema debe poder continuar con una de las subtareas en siguientes</text:p>
      <text:p text:style-name="Standard"><text:s text:c="2"/>iteraciones</text:p>
      <text:p text:style-name="Standard"><text:s text:c="2"/>- no dejar split solo como metadata muerta dentro del recovery payload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backend/agent_runtime.py</text:p>
      <text:p text:style-name="Standard"><text:s text:c="2"/>- ajustes minimos estrictamente necesarios en orchestrator/recovery.py o</text:p>
      <text:p text:style-name="Standard"><text:s text:c="2"/>task_queue.py si son inevitables para consistencia</text:p>
      <text:p text:style-name="Standard"><text:s text:c="2"/>- tests pequeños y enfocados del backend para cubrir estos 2 bugs</text:p>
      <text:p text:style-name="Standard"/>
      <text:p text:style-name="Standard"><text:s text:c="2"/>RESTRICCIONES DURAS</text:p>
      <text:p text:style-name="Standard"><text:s text:c="2"/>- no implementar Sprint 10</text:p>
      <text:p text:style-name="Standard"><text:s text:c="2"/>- no crear benchmark.py</text:p>
      <text:p text:style-name="Standard"><text:s text:c="2"/>- no rediseñar todo agent_runtime.py</text:p>
      <text:p text:style-name="Standard"><text:s text:c="2"/>- no tocar rutas fuera del repo raiz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Caso retry</text:p>
      <text:p text:style-name="Standard"><text:s text:c="2"/>- una tarea fallida con retries disponibles produce decision `retry`</text:p>
      <text:p text:style-name="Standard"><text:s text:c="2"/>- la tarea queda nuevamente ejecutable o pendiente de forma consistente</text:p>
      <text:p text:style-name="Standard"><text:s text:c="2"/>- una siguiente preparación del control plane puede volver a seleccionarla</text:p>
      <text:p text:style-name="Standard"><text:s text:c="2"/>- `retry_count` persiste y no queda clavado siempre en `0`</text:p>
      <text:p text:style-name="Standard"/>
      <text:p text:style-name="Standard"><text:s text:c="2"/>2. Caso split</text:p>
      <text:p text:style-name="Standard"><text:soft-page-break/><text:s text:c="2"/>- una tarea que dispara `split` produce subtareas reales</text:p>
      <text:p text:style-name="Standard"><text:s text:c="2"/>- esas subtareas quedan persistidas en `task_queue.json`</text:p>
      <text:p text:style-name="Standard"><text:s text:c="2"/>- la tarea original no queda compitiendo de forma incoherente con sus</text:p>
      <text:p text:style-name="Standard"><text:s text:c="2"/>subtareas</text:p>
      <text:p text:style-name="Standard"><text:s text:c="2"/>- una siguiente preparación puede continuar sobre las subtareas</text:p>
      <text:p text:style-name="Standard"/>
      <text:p text:style-name="Standard"><text:s text:c="2"/>3. Trazabilidad</text:p>
      <text:p text:style-name="Standard"><text:s text:c="2"/>- el runtime sigue dejando:</text:p>
      <text:p text:style-name="Standard"><text:s text:c="4"/>- directiva</text:p>
      <text:p text:style-name="Standard"><text:s text:c="4"/>- history</text:p>
      <text:p text:style-name="Standard"><text:s text:c="4"/>- validation</text:p>
      <text:p text:style-name="Standard"><text:s text:c="4"/>- recovery</text:p>
      <text:p text:style-name="Standard"><text:s text:c="4"/>- checkpoint</text:p>
      <text:p text:style-name="Standard"><text:s text:c="2"/>- sin inventar progreso falso</text:p>
      <text:p text:style-name="Standard"/>
      <text:p text:style-name="Standard"><text:s text:c="2"/>SI AGREGAS TESTS</text:p>
      <text:p text:style-name="Standard"><text:s text:c="2"/>Mantenlos pequeños y enfocados solo en estos bugs de Sprint 9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/>
      <text:p text:style-name="Standard"><text:s text:c="2"/>Cuando termine, yo te lo vuelvo a auditar.</text:p>
      <text:p text:style-name="Standard"/>
      <text:p text:style-name="Standard"/>
      <text:p text:style-name="Standard">› ok ya termino</text:p>
      <text:p text:style-name="Standard"/>
      <text:p text:style-name="Standard"/>
      <text:p text:style-name="Standard">• Voy a reauditar Sprint 9 sobre los dos bugs corregidos: retry operativo y</text:p>
      <text:p text:style-name="Standard"><text:s text:c="2"/>split persistido en la cola. Luego reproduzco ambos casos en runtime temporal</text:p>
      <text:p text:style-name="Standard"><text:s text:c="2"/>para confirmar que ya no quedaron solo “bonitos en código”.</text:p>
      <text:p text:style-name="Standard"/>
      <text:p text:style-name="Standard">• Ya veo cambios nuevos en agent_runtime.py. Quiero comprobar si además dejaron</text:p>
      <text:p text:style-name="Standard"><text:s text:c="2"/>tests de backend para estos casos, porque sin eso el fix sigue siendo frágil</text:p>
      <text:p text:style-name="Standard"><text:s text:c="2"/>aunque la lógica haya mejorado.</text:p>
      <text:p text:style-name="Standard"/>
      <text:p text:style-name="Standard">• La lógica nueva ya está en sitio. Ahora la voy a reejecutar en dos escenarios</text:p>
      <text:p text:style-name="Standard"><text:s text:c="2"/>reales: uno de retry y otro de split, para ver si la cola y el estado</text:p>
      <text:p text:style-name="Standard"><text:s text:c="2"/>persistido realmente siguen vivos después del fallo.</text:p>
      <text:p text:style-name="Standard"/>
      <text:p text:style-name="Standard">• El caso retry ya se sostuvo bien en la segunda iteración. Falta esperar el</text:p>
      <text:p text:style-name="Standard"><text:s text:c="2"/>caso split, porque ahí quiero confirmar no solo que encola subtareas, sino que</text:p>
      <text:p text:style-name="Standard"><text:s text:c="2"/>la siguiente preparación realmente avanza sobre ellas.</text:p>
      <text:p text:style-name="Standard"/>
      <text:p text:style-name="Standard">• Los dos casos funcionales ya pasaron en runtime temporal. Voy a revisar una</text:p>
      <text:p text:style-name="Standard"><text:s text:c="2"/>sola cosa de consistencia de estado y luego cierro: si después de retry quedó</text:p>
      <text:p text:style-name="Standard"><text:s text:c="2"/>alguna incoherencia persistida que nos vaya a explotar en UI o en la siguiente</text:p>
      <text:p text:style-name="Standard"><text:s text:c="2"/>iteración.</text:p>
      <text:p text:style-name="Standard"/>
      <text:p text:style-name="Standard"><text:soft-page-break/>• No encontré hallazgos bloqueantes. Con esta corrección, Sprint 9 queda</text:p>
      <text:p text:style-name="Standard"><text:s text:c="2"/>aprobado.</text:p>
      <text:p text:style-name="Standard"/>
      <text:p text:style-name="Standard"><text:s text:c="2"/>Validación real que corrí:</text:p>
      <text:p text:style-name="Standard"/>
      <text:p text:style-name="Standard"><text:s text:c="2"/>- py_compile de agent_runtime.py: pasó.</text:p>
      <text:p text:style-name="Standard"><text:s text:c="2"/>- Reproduje el caso retry en runtime temporal:</text:p>
      <text:p text:style-name="Standard"><text:s text:c="6"/>- la primera falla devolvió retry,</text:p>
      <text:p text:style-name="Standard"><text:s text:c="6"/>- la tarea volvió a pending,</text:p>
      <text:p text:style-name="Standard"><text:s text:c="6"/>- la siguiente preparación del control plane volvió a seleccionarla,</text:p>
      <text:p text:style-name="Standard"><text:s text:c="6"/>- y el segundo intento ya salió con retry_count = 1.</text:p>
      <text:p text:style-name="Standard"><text:s text:c="2"/>- Reproduje el caso split en runtime temporal:</text:p>
      <text:p text:style-name="Standard"><text:s text:c="6"/>- recovery devolvió split con 2 subtareas,</text:p>
      <text:p text:style-name="Standard"><text:s text:c="6"/>- ambas quedaron persistidas en task_queue.json,</text:p>
      <text:p text:style-name="Standard"><text:s text:c="6"/>- la tarea original quedó blocked,</text:p>
      <text:p text:style-name="Standard"><text:s text:c="6"/>- y la siguiente preparación avanzó sobre TASK-SPLIT-001-SPLIT-001.</text:p>
      <text:p text:style-name="Standard"/>
      <text:p text:style-name="Standard"><text:s text:c="2"/>Lo que cambió bien en agent_runtime.py:</text:p>
      <text:p text:style-name="Standard"/>
      <text:p text:style-name="Standard"><text:s text:c="2"/>- ahora calcula retry_count desde failures.jsonl,</text:p>
      <text:p text:style-name="Standard"><text:s text:c="2"/>- aplica la decisión de recovery con _apply_recovery_decision(...),</text:p>
      <text:p text:style-name="Standard"><text:s text:c="2"/>- reencola correctamente retry,</text:p>
      <text:p text:style-name="Standard"><text:s text:c="2"/>- y persiste subtareas reales cuando la decisión es split.</text:p>
      <text:p text:style-name="Standard"/>
      <text:p text:style-name="Standard"><text:s text:c="2"/>Reserva menor:</text:p>
      <text:p text:style-name="Standard"/>
      <text:p text:style-name="Standard"><text:s text:c="2"/>- no encontré cobertura automatizada nueva para este camino de control plane</text:p>
      <text:p text:style-name="Standard"><text:s text:c="4"/>en test_agent_runtime_habla.py, así que la aprobación queda sustentada en</text:p>
      <text:p text:style-name="Standard"><text:s text:c="4"/>reproducción manual fuerte, no en suite dedicada.</text:p>
      <text:p text:style-name="Standard"><text:s text:c="2"/>- semánticamente, después de retry el project_state.status queda en running</text:p>
      <text:p text:style-name="Standard"><text:s text:c="4"/>con current_task_id = null; no me bloqueó el flujo, pero conviene vigilarlo</text:p>
      <text:p text:style-name="Standard"><text:s text:c="4"/>en Sprint 10 por claridad operativa.</text:p>
      <text:p text:style-name="Standard"/>
      <text:p text:style-name="Standard"><text:s text:c="2"/>Estado global:</text:p>
      <text:p text:style-name="Standard"/>
      <text:p text:style-name="Standard"><text:s text:c="2"/>- Sprint 1 a Sprint 9: aprobados</text:p>
      <text:p text:style-name="Standard"/>
      <text:p text:style-name="Standard"><text:s text:c="2"/>Si quieres, te doy ya el prompt blindado para Sprint 10.</text:p>
      <text:p text:style-name="Standard"/>
      <text:p text:style-name="Standard"/>
      <text:p text:style-name="Standard">› o <text:s text:c="2"/>sihiente promt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en ESA RAIZ del repositorio.</text:p>
      <text:p text:style-name="Standard"/>
      <text:p text:style-name="Standard"><text:soft-page-break/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SOLO Sprint 10.</text:p>
      <text:p text:style-name="Standard"/>
      <text:p text:style-name="Standard"><text:s text:c="2"/>ALCANCE EXACTO</text:p>
      <text:p text:style-name="Standard"><text:s text:c="2"/>Debes crear o dejar listo unicamente este elemento:</text:p>
      <text:p text:style-name="Standard"><text:s text:c="2"/>- orchestrator/benchmark.py</text:p>
      <text:p text:style-name="Standard"/>
      <text:p text:style-name="Standard"><text:s text:c="2"/>Puedes hacer ajustes minimos en sprints anteriores solo si son estrictamente</text:p>
      <text:p text:style-name="Standard"><text:s text:c="2"/>necesarios para consistencia, pero no avances nada posterior.</text:p>
      <text:p text:style-name="Standard"/>
      <text:p text:style-name="Standard"><text:s text:c="2"/>OBJETIVO FUNCIONAL DE SPRINT 10</text:p>
      <text:p text:style-name="Standard"><text:s text:c="2"/>Cerrar el harness con benchmarks oficiales y una puerta real de despliegue.</text:p>
      <text:p text:style-name="Standard"/>
      <text:p text:style-name="Standard"><text:s text:c="2"/>REQUISITOS FUNCIONALES</text:p>
      <text:p text:style-name="Standard"/>
      <text:p text:style-name="Standard"><text:s text:c="2"/>1. `orchestrator/benchmark.py` debe poder ejecutar y reportar la batería</text:p>
      <text:p text:style-name="Standard"><text:s text:c="2"/>oficial:</text:p>
      <text:p text:style-name="Standard"><text:s text:c="2"/>- smoke-01</text:p>
      <text:p text:style-name="Standard"><text:s text:c="2"/>- crud-ui-02</text:p>
      <text:p text:style-name="Standard"><text:s text:c="2"/>- refactor-mid-03</text:p>
      <text:p text:style-name="Standard"><text:s text:c="2"/>- long-project-04</text:p>
      <text:p text:style-name="Standard"><text:s text:c="2"/>- recovery-05</text:p>
      <text:p text:style-name="Standard"/>
      <text:p text:style-name="Standard"><text:s text:c="2"/>2. Debe existir una API mínima clara, por ejemplo:</text:p>
      <text:p text:style-name="Standard"><text:s text:c="2"/>- `run_benchmarks(...)`</text:p>
      <text:p text:style-name="Standard"><text:s text:c="2"/>- `run_benchmark(name, ...)`</text:p>
      <text:p text:style-name="Standard"><text:s text:c="2"/>- `benchmark_gate(...)`</text:p>
      <text:p text:style-name="Standard"><text:s text:c="2"/>- `load_benchmark_report(...)`</text:p>
      <text:p text:style-name="Standard"/>
      <text:p text:style-name="Standard"><text:s text:c="2"/>3. Cada benchmark debe dejar resultado estructurado con al menos:</text:p>
      <text:p text:style-name="Standard"><text:s text:c="2"/>- nombre</text:p>
      <text:p text:style-name="Standard"><text:s text:c="2"/>- estado</text:p>
      <text:p text:style-name="Standard"><text:s text:c="2"/>- duración</text:p>
      <text:p text:style-name="Standard"><text:s text:c="2"/>- evidencia usada</text:p>
      <text:p text:style-name="Standard"><text:s text:c="2"/>- fallos</text:p>
      <text:p text:style-name="Standard"><text:s text:c="2"/>- recomendaciones</text:p>
      <text:p text:style-name="Standard"/>
      <text:p text:style-name="Standard"><text:s text:c="2"/>4. La puerta de despliegue debe ser real:</text:p>
      <text:p text:style-name="Standard"><text:s text:c="2"/>- si no pasan todos, no se despliega</text:p>
      <text:p text:style-name="Standard"><text:s text:c="2"/>- debe existir un resultado claro tipo pass/fail global</text:p>
      <text:p text:style-name="Standard"><text:s text:c="2"/>- no debe fingir éxito parcial como despliegue aprobado</text:p>
      <text:p text:style-name="Standard"><text:soft-page-break/></text:p>
      <text:p text:style-name="Standard"><text:s text:c="2"/>5. Los benchmarks deben apoyarse en la arquitectura ya construida:</text:p>
      <text:p text:style-name="Standard"><text:s text:c="2"/>- planner</text:p>
      <text:p text:style-name="Standard"><text:s text:c="2"/>- task_queue</text:p>
      <text:p text:style-name="Standard"><text:s text:c="2"/>- executor</text:p>
      <text:p text:style-name="Standard"><text:s text:c="2"/>- validator</text:p>
      <text:p text:style-name="Standard"><text:s text:c="2"/>- recovery</text:p>
      <text:p text:style-name="Standard"><text:s text:c="2"/>- policy_loader</text:p>
      <text:p text:style-name="Standard"><text:s text:c="2"/>- plan_loader</text:p>
      <text:p text:style-name="Standard"><text:s text:c="2"/>- directive_context</text:p>
      <text:p text:style-name="Standard"><text:s text:c="2"/>- habla_adapter</text:p>
      <text:p text:style-name="Standard"><text:s text:c="2"/>- directive_generator</text:p>
      <text:p text:style-name="Standard"><text:s text:c="2"/>- integración con agent_runtime ya hecha en Sprint 9</text:p>
      <text:p text:style-name="Standard"/>
      <text:p text:style-name="Standard"><text:s text:c="2"/>6. Diseño pragmático</text:p>
      <text:p text:style-name="Standard"><text:s text:c="2"/>- no intentes montar un sistema distribuido</text:p>
      <text:p text:style-name="Standard"><text:s text:c="2"/>- no hagas benchmarks vacíos o decorativos</text:p>
      <text:p text:style-name="Standard"><text:s text:c="2"/>- si alguna prueba tiene que ser sintética, debe seguir siendo real y</text:p>
      <text:p text:style-name="Standard"><text:s text:c="2"/>verificable</text:p>
      <text:p text:style-name="Standard"><text:s text:c="2"/>- cada benchmark debe apuntar a una capacidad central del runtime</text:p>
      <text:p text:style-name="Standard"/>
      <text:p text:style-name="Standard"><text:s text:c="2"/>EXPECTATIVA MINIMA POR BENCHMARK</text:p>
      <text:p text:style-name="Standard"/>
      <text:p text:style-name="Standard"><text:s text:c="2"/>1. `smoke-01`</text:p>
      <text:p text:style-name="Standard"><text:s text:c="2"/>- verificar que una tarea simple pueda prepararse, generar directiva,</text:p>
      <text:p text:style-name="Standard"><text:s text:c="2"/>ejecutarse y validarse</text:p>
      <text:p text:style-name="Standard"/>
      <text:p text:style-name="Standard"><text:s text:c="2"/>2. `crud-ui-02`</text:p>
      <text:p text:style-name="Standard"><text:s text:c="2"/>- verificar una secuencia multi-tarea con persistencia, dependencias y</text:p>
      <text:p text:style-name="Standard"><text:s text:c="2"/>entregables múltiples</text:p>
      <text:p text:style-name="Standard"/>
      <text:p text:style-name="Standard"><text:s text:c="2"/>3. `refactor-mid-03`</text:p>
      <text:p text:style-name="Standard"><text:s text:c="2"/>- verificar una tarea o mini-secuencia con modificación sobre artefactos</text:p>
      <text:p text:style-name="Standard"><text:s text:c="2"/>existentes y validación coherente</text:p>
      <text:p text:style-name="Standard"/>
      <text:p text:style-name="Standard"><text:s text:c="2"/>4. `long-project-04`</text:p>
      <text:p text:style-name="Standard"><text:s text:c="2"/>- verificar que el sistema puede avanzar por varias tareas encadenadas sin</text:p>
      <text:p text:style-name="Standard"><text:s text:c="2"/>depender de una sesión monolítica</text:p>
      <text:p text:style-name="Standard"/>
      <text:p text:style-name="Standard"><text:s text:c="2"/>5. `recovery-05`</text:p>
      <text:p text:style-name="Standard"><text:s text:c="2"/>- verificar retry o split reales y continuidad posterior</text:p>
      <text:p text:style-name="Standard"/>
      <text:p text:style-name="Standard"><text:s text:c="2"/>PERSISTENCIA Y REPORTE</text:p>
      <text:p text:style-name="Standard"><text:s text:c="2"/>- si hace falta, puedes dejar reportes bajo `runtime/benchmarks/`</text:p>
      <text:p text:style-name="Standard"><text:s text:c="2"/>- los resultados deben ser auditables</text:p>
      <text:p text:style-name="Standard"><text:s text:c="2"/>- no escribir fuera del repo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rutas fuera del repo raiz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oft-page-break/><text:s text:c="2"/>- no reportar exito sin evidencia real en disco</text:p>
      <text:p text:style-name="Standard"><text:s text:c="2"/>- no declarar deployment gate aprobado si falta un benchmark</text:p>
      <text:p text:style-name="Standard"/>
      <text:p text:style-name="Standard"><text:s text:c="2"/>CRITERIOS DE ACEPTACION</text:p>
      <text:p text:style-name="Standard"><text:s text:c="2"/>Sprint 10 queda correcto si:</text:p>
      <text:p text:style-name="Standard"><text:s text:c="2"/>- existe `orchestrator/benchmark.py`</text:p>
      <text:p text:style-name="Standard"><text:s text:c="2"/>- la batería oficial puede ejecutarse</text:p>
      <text:p text:style-name="Standard"><text:s text:c="2"/>- el sistema produce reporte estructurado</text:p>
      <text:p text:style-name="Standard"><text:s text:c="2"/>- existe puerta de despliegue real</text:p>
      <text:p text:style-name="Standard"><text:s text:c="2"/>- si falla uno, el gate falla</text:p>
      <text:p text:style-name="Standard"><text:s text:c="2"/>- si pasan todos, el gate aprueba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Se puede ejecutar al menos una corrida completa de la batería</text:p>
      <text:p text:style-name="Standard"><text:s text:c="2"/>2. El reporte distingue benchmarks aprobados y fallidos</text:p>
      <text:p text:style-name="Standard"><text:s text:c="2"/>3. El gate global falla si un benchmark falla</text:p>
      <text:p text:style-name="Standard"><text:s text:c="2"/>4. El gate global aprueba si todos pasan</text:p>
      <text:p text:style-name="Standard"><text:s text:c="2"/>5. La evidencia queda persistida y es auditable</text:p>
      <text:p text:style-name="Standard"/>
      <text:p text:style-name="Standard"><text:s text:c="2"/>SI AGREGAS TESTS</text:p>
      <text:p text:style-name="Standard"><text:s text:c="2"/>Mantenlos pequeños y enfocados en Sprint 10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validaciones ejecutadas</text:p>
      <text:p text:style-name="Standard"><text:s text:c="2"/>3. riesgos reales restantes</text:p>
      <text:p text:style-name="Standard"><text:s text:c="2"/>4. confirmacion clara de si el harness base ya quedo cerrado</text:p>
      <text:p text:style-name="Standard"/>
      <text:p text:style-name="Standard"/>
      <text:p text:style-name="Standard">› ya <text:s/>termino <text:s/>esto dijo <text:s/>Riesgos reales restantes</text:p>
      <text:p text:style-name="Standard"/>
      <text:p text:style-name="Standard"><text:s text:c="4"/>- Los benchmarks son sintéticos pero verificables; no prueban UI real en</text:p>
      <text:p text:style-name="Standard"><text:s text:c="6"/>navegador ni ejecución real de Codex.</text:p>
      <text:p text:style-name="Standard"><text:s text:c="4"/>- Las corridas acumulan artefactos en runtime/benchmarks/ y runtime/</text:p>
      <text:p text:style-name="Standard"><text:s text:c="6"/>directives/; hará falta política de retención.</text:p>
      <text:p text:style-name="Standard"><text:s text:c="4"/>- Los comandos de validación asumen python3 disponible en PATH.</text:p>
      <text:p text:style-name="Standard"><text:s text:c="4"/>- El harness depende de que backend.agent_runtime importe correctamente.</text:p>
      <text:p text:style-name="Standard"/>
      <text:p text:style-name="Standard"><text:s text:c="4"/>Confirmación</text:p>
      <text:p text:style-name="Standard"><text:s text:c="4"/>El harness base de Sprint 10 quedó cerrado: la batería oficial corre</text:p>
      <text:p text:style-name="Standard"><text:s text:c="2"/>completa,</text:p>
      <text:p text:style-name="Standard"><text:s text:c="4"/>persiste evidencia auditable y el gate final está aprobado solo cuando</text:p>
      <text:p text:style-name="Standard"><text:s text:c="2"/>pasan</text:p>
      <text:p text:style-name="Standard"><text:s text:c="4"/>los cinco benchmarks.</text:p>
      <text:p text:style-name="Standard"/>
      <text:p text:style-name="Standard"/>
      <text:p text:style-name="Standard">• Voy a auditar Sprint 10: revisar benchmark.py, confirmar que corre la batería</text:p>
      <text:p text:style-name="Standard"><text:s text:c="2"/>oficial, que persiste reportes reales y que el gate falla/pasa de forma</text:p>
      <text:p text:style-name="Standard"><text:s text:c="2"/>honesta.</text:p>
      <text:p text:style-name="Standard"><text:soft-page-break/></text:p>
      <text:p text:style-name="Standard">• El archivo es grande; ahora voy a leer la segunda mitad y luego ejecutar la</text:p>
      <text:p text:style-name="Standard"><text:s text:c="2"/>batería y el gate para no quedarme solo con el reporte que dejó el otro</text:p>
      <text:p text:style-name="Standard"><text:s text:c="2"/>agente.</text:p>
      <text:p text:style-name="Standard"/>
      <text:p text:style-name="Standard">• La batería completa quedó corriendo. Voy a esperar a que termine para</text:p>
      <text:p text:style-name="Standard"><text:s text:c="2"/>confirmar el gate desde una corrida propia, no solo desde latest.json.</text:p>
      <text:p text:style-name="Standard"/>
      <text:p text:style-name="Standard">• La corrida completa pasó. Quiero verificar una cosa crítica más: que el gate</text:p>
      <text:p text:style-name="Standard"><text:s text:c="2"/>realmente falle si falta o falla un benchmark, y no solo pase con batería</text:p>
      <text:p text:style-name="Standard"><text:s text:c="2"/>completa.</text:p>
      <text:p text:style-name="Standard"/>
      <text:p text:style-name="Standard">• No encontré hallazgos bloqueantes. Doy Sprint 10 por aprobado.</text:p>
      <text:p text:style-name="Standard"/>
      <text:p text:style-name="Standard"><text:s text:c="2"/>Verifiqué benchmark.py y corrí una batería real nueva. La corrida propia quedó</text:p>
      <text:p text:style-name="Standard"><text:s text:c="2"/>en report.json con los 5 benchmarks en passed:</text:p>
      <text:p text:style-name="Standard"/>
      <text:p text:style-name="Standard"><text:s text:c="2"/>- smoke-01</text:p>
      <text:p text:style-name="Standard"><text:s text:c="2"/>- crud-ui-02</text:p>
      <text:p text:style-name="Standard"><text:s text:c="2"/>- refactor-mid-03</text:p>
      <text:p text:style-name="Standard"><text:s text:c="2"/>- long-project-04</text:p>
      <text:p text:style-name="Standard"><text:s text:c="2"/>- recovery-05</text:p>
      <text:p text:style-name="Standard"/>
      <text:p text:style-name="Standard"><text:s text:c="2"/>También validé el gate de despliegue en ambos sentidos:</text:p>
      <text:p text:style-name="Standard"/>
      <text:p text:style-name="Standard"><text:s text:c="2"/>- con la batería completa, deployment_allowed = true</text:p>
      <text:p text:style-name="Standard"><text:s text:c="2"/>- con un benchmark fallido, el gate cae</text:p>
      <text:p text:style-name="Standard"><text:s text:c="2"/>- con benchmarks faltantes, el gate también cae</text:p>
      <text:p text:style-name="Standard"/>
      <text:p text:style-name="Standard"><text:s text:c="2"/>Evidencia adicional:</text:p>
      <text:p text:style-name="Standard"/>
      <text:p text:style-name="Standard"><text:s text:c="2"/>- se persistieron resultados por benchmark en runtime/benchmarks/&lt;run_id&gt;/</text:p>
      <text:p text:style-name="Standard"><text:s text:c="4"/>&lt;benchmark&gt;/result.json</text:p>
      <text:p text:style-name="Standard"><text:s text:c="2"/>- latest.json quedó actualizado en runtime/benchmarks/latest.json</text:p>
      <text:p text:style-name="Standard"><text:s text:c="2"/>- py_compile de benchmark.py pasó</text:p>
      <text:p text:style-name="Standard"/>
      <text:p text:style-name="Standard"><text:s text:c="2"/>Riesgos residuales, pero no bloqueantes:</text:p>
      <text:p text:style-name="Standard"/>
      <text:p text:style-name="Standard"><text:s text:c="2"/>- los benchmarks son sintéticos aunque verificables; no prueban navegador real</text:p>
      <text:p text:style-name="Standard"><text:s text:c="4"/>ni una corrida real de Codex extremo a extremo</text:p>
      <text:p text:style-name="Standard"><text:s text:c="2"/>- se acumulan artefactos en runtime/benchmarks/ y runtime/directives/</text:p>
      <text:p text:style-name="Standard"><text:s text:c="2"/>- dependen de python3 en PATH</text:p>
      <text:p text:style-name="Standard"><text:s text:c="2"/>- el harness sigue dependiendo de que backend.agent_runtime importe bien</text:p>
      <text:p text:style-name="Standard"/>
      <text:p text:style-name="Standard"><text:s text:c="2"/>Conclusión:</text:p>
      <text:p text:style-name="Standard"/>
      <text:p text:style-name="Standard"><text:s text:c="2"/>- Sprint 1 a Sprint 10: aprobados</text:p>
      <text:p text:style-name="Standard"><text:s text:c="2"/>- el harness base sí quedó cerrado</text:p>
      <text:p text:style-name="Standard"/>
      <text:p text:style-name="Standard"/>
      <text:p text:style-name="Standard">› ahora que sigue</text:p>
      <text:p text:style-name="Standard"/>
      <text:p text:style-name="Standard"><text:soft-page-break/></text:p>
      <text:p text:style-name="Standard">• Ahora sigue dejar de construir el harness y empezar a convertirlo en producto</text:p>
      <text:p text:style-name="Standard"><text:s text:c="2"/>real.</text:p>
      <text:p text:style-name="Standard"/>
      <text:p text:style-name="Standard"><text:s text:c="2"/>Yo lo pondría así, en este orden:</text:p>
      <text:p text:style-name="Standard"/>
      <text:p text:style-name="Standard"><text:s text:c="2"/>1. Sprint 11: validación real end-to-end</text:p>
      <text:p text:style-name="Standard"/>
      <text:p text:style-name="Standard"><text:s text:c="2"/>- correr proyectos reales con Codex de verdad, no solo benchmarks sintéticos</text:p>
      <text:p text:style-name="Standard"><text:s text:c="2"/>- probar:</text:p>
      <text:p text:style-name="Standard"><text:s text:c="6"/>- proyecto corto</text:p>
      <text:p text:style-name="Standard"><text:s text:c="6"/>- proyecto mediano</text:p>
      <text:p text:style-name="Standard"><text:s text:c="6"/>- proyecto largo</text:p>
      <text:p text:style-name="Standard"><text:s text:c="6"/>- fallo + retry</text:p>
      <text:p text:style-name="Standard"><text:s text:c="6"/>- fallo + split + continuación</text:p>
      <text:p text:style-name="Standard"/>
      <text:p text:style-name="Standard"><text:s text:c="2"/>2. Sprint 12: observabilidad y UI del orquestador</text:p>
      <text:p text:style-name="Standard"/>
      <text:p text:style-name="Standard"><text:s text:c="2"/>- mostrar en la interfaz:</text:p>
      <text:p text:style-name="Standard"><text:s text:c="6"/>- tarea activa</text:p>
      <text:p text:style-name="Standard"><text:s text:c="6"/>- cola</text:p>
      <text:p text:style-name="Standard"><text:s text:c="6"/>- directiva actual</text:p>
      <text:p text:style-name="Standard"><text:s text:c="6"/>- checkpoint actual</text:p>
      <text:p text:style-name="Standard"><text:s text:c="6"/>- recovery decision</text:p>
      <text:p text:style-name="Standard"><text:s text:c="6"/>- benchmark status</text:p>
      <text:p text:style-name="Standard"><text:s text:c="2"/>- o sea: que el usuario vea el control plane vivo</text:p>
      <text:p text:style-name="Standard"/>
      <text:p text:style-name="Standard"><text:s text:c="2"/>3. Sprint 13: endurecimiento operativo</text:p>
      <text:p text:style-name="Standard"/>
      <text:p text:style-name="Standard"><text:s text:c="2"/>- tests automáticos del camino nuevo de agent_runtime.py</text:p>
      <text:p text:style-name="Standard"><text:s text:c="2"/>- política de retención para runtime/benchmarks/ y runtime/directives/</text:p>
      <text:p text:style-name="Standard"><text:s text:c="2"/>- limpieza de artefactos viejos</text:p>
      <text:p text:style-name="Standard"><text:s text:c="2"/>- manejo más fino de estado running/pending/blocked/retry</text:p>
      <text:p text:style-name="Standard"/>
      <text:p text:style-name="Standard"><text:s text:c="2"/>4. Sprint 14: retiro del camino viejo</text:p>
      <text:p text:style-name="Standard"/>
      <text:p text:style-name="Standard"><text:s text:c="2"/>- dejar el flujo viejo monolítico como fallback controlado o apagarlo</text:p>
      <text:p text:style-name="Standard"><text:s text:c="2"/>- hacer que el sistema use por defecto:</text:p>
      <text:p text:style-name="Standard"><text:s text:c="6"/>- queue</text:p>
      <text:p text:style-name="Standard"><text:s text:c="6"/>- context</text:p>
      <text:p text:style-name="Standard"><text:s text:c="6"/>- habla</text:p>
      <text:p text:style-name="Standard"><text:s text:c="6"/>- directive</text:p>
      <text:p text:style-name="Standard"><text:s text:c="6"/>- worker</text:p>
      <text:p text:style-name="Standard"><text:s text:c="6"/>- validator</text:p>
      <text:p text:style-name="Standard"><text:s text:c="6"/>- recovery</text:p>
      <text:p text:style-name="Standard"/>
      <text:p text:style-name="Standard"><text:s text:c="2"/>5. Sprint 15: piloto largo real</text:p>
      <text:p text:style-name="Standard"/>
      <text:p text:style-name="Standard"><text:s text:c="2"/>- tomar un proyecto serio y dejar que el sistema lo ejecute por etapas</text:p>
      <text:p text:style-name="Standard"><text:s text:c="2"/>- ahí se prueba si de verdad ya es “máquina de proyectos largos”</text:p>
      <text:p text:style-name="Standard"/>
      <text:p text:style-name="Standard"><text:s text:c="2"/>Mi recomendación fuerte:</text:p>
      <text:p text:style-name="Standard"><text:soft-page-break/><text:s text:c="2"/>lo siguiente inmediato no es otra arquitectura base; es Sprint 11 con pruebas</text:p>
      <text:p text:style-name="Standard"><text:s text:c="2"/>reales no sintéticas.</text:p>
      <text:p text:style-name="Standard"/>
      <text:p text:style-name="Standard"><text:s text:c="2"/>Si quieres, te redacto ya el prompt blindado para Sprint 11.</text:p>
      <text:p text:style-name="Standard"/>
      <text:p text:style-name="Standard"/>
      <text:p text:style-name="Standard">› bueno continuemos entonces con lo qu tu dises</text:p>
      <text:p text:style-name="Standard"/>
      <text:p text:style-name="Standard"/>
      <text:p text:style-name="Standard">• Usa este prompt para el siguiente paso, ya fuera del harness base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implementar y validar en ESA RAIZ del repositorio.</text:p>
      <text:p text:style-name="Standard"/>
      <text:p text:style-name="Standard"><text:s text:c="2"/>PROHIBIDO trabajar dentro de cualquiera de estas rutas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 estos archivos ya presentes en la raiz del rep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Implementar una validacion real end-to-end posterior al harness base.</text:p>
      <text:p text:style-name="Standard"><text:s text:c="2"/>Esto ya no es Sprint 10.</text:p>
      <text:p text:style-name="Standard"><text:s text:c="2"/>Esto es la siguiente fase: validacion real del sistema completo.</text:p>
      <text:p text:style-name="Standard"/>
      <text:p text:style-name="Standard"><text:s text:c="2"/>ALCANCE EXACTO</text:p>
      <text:p text:style-name="Standard"><text:s text:c="2"/>Debes enfocarte en:</text:p>
      <text:p text:style-name="Standard"><text:s text:c="2"/>- ejecutar corridas reales del control plane usando el runtime nuevo</text:p>
      <text:p text:style-name="Standard"><text:s text:c="2"/>- dejar evidencia auditable de esas corridas</text:p>
      <text:p text:style-name="Standard"><text:s text:c="2"/>- detectar si el sistema ya sirve en escenarios cortos, medianos y de recovery</text:p>
      <text:p text:style-name="Standard"><text:s text:c="2"/>real</text:p>
      <text:p text:style-name="Standard"/>
      <text:p text:style-name="Standard"><text:s text:c="2"/>Puedes crear solo lo minimo coherente para esta fase, por ejemplo:</text:p>
      <text:p text:style-name="Standard"><text:s text:c="2"/>- orchestrator/real_validation.py</text:p>
      <text:p text:style-name="Standard"><text:s text:c="2"/>- runtime/real_runs/</text:p>
      <text:p text:style-name="Standard"><text:s text:c="2"/>- docs/real_validation/</text:p>
      <text:p text:style-name="Standard"><text:s text:c="2"/>- reportes o artefactos de validacion real</text:p>
      <text:p text:style-name="Standard"/>
      <text:p text:style-name="Standard"><text:s text:c="2"/>No entres todavia en UI nueva ni en rediseño grande adicional.</text:p>
      <text:p text:style-name="Standard"/>
      <text:p text:style-name="Standard"><text:s text:c="2"/>OBJETIVO FUNCIONAL</text:p>
      <text:p text:style-name="Standard"><text:soft-page-break/><text:s text:c="2"/>Demostrar con corridas reales, no solo sintéticas, que el sistema puede:</text:p>
      <text:p text:style-name="Standard"><text:s text:c="2"/>- preparar tarea desde cola</text:p>
      <text:p text:style-name="Standard"><text:s text:c="2"/>- construir contexto</text:p>
      <text:p text:style-name="Standard"><text:s text:c="2"/>- generar HABLA procedural</text:p>
      <text:p text:style-name="Standard"><text:s text:c="2"/>- generar directiva</text:p>
      <text:p text:style-name="Standard"><text:s text:c="2"/>- ejecutar worker</text:p>
      <text:p text:style-name="Standard"><text:s text:c="2"/>- validar</text:p>
      <text:p text:style-name="Standard"><text:s text:c="2"/>- recuperar tras fallo</text:p>
      <text:p text:style-name="Standard"><text:s text:c="2"/>- continuar con la siguiente tarea o subtarea</text:p>
      <text:p text:style-name="Standard"/>
      <text:p text:style-name="Standard"><text:s text:c="2"/>ESCENARIOS OBLIGATORIOS</text:p>
      <text:p text:style-name="Standard"/>
      <text:p text:style-name="Standard"><text:s text:c="2"/>1. Escenario corto real</text:p>
      <text:p text:style-name="Standard"><text:s text:c="2"/>Debes ejecutar una corrida real corta que pruebe:</text:p>
      <text:p text:style-name="Standard"><text:s text:c="2"/>- una tarea simple</text:p>
      <text:p text:style-name="Standard"><text:s text:c="2"/>- directiva real</text:p>
      <text:p text:style-name="Standard"><text:s text:c="2"/>- ejecución real</text:p>
      <text:p text:style-name="Standard"><text:s text:c="2"/>- validación real</text:p>
      <text:p text:style-name="Standard"><text:s text:c="2"/>- evidencia persistida</text:p>
      <text:p text:style-name="Standard"/>
      <text:p text:style-name="Standard"><text:s text:c="2"/>2. Escenario mediano real</text:p>
      <text:p text:style-name="Standard"><text:s text:c="2"/>Debes ejecutar una secuencia multi-tarea real que pruebe:</text:p>
      <text:p text:style-name="Standard"><text:s text:c="2"/>- cola persistente</text:p>
      <text:p text:style-name="Standard"><text:s text:c="2"/>- dependencias</text:p>
      <text:p text:style-name="Standard"><text:s text:c="2"/>- varias directivas</text:p>
      <text:p text:style-name="Standard"><text:s text:c="2"/>- varios resultados estructurados</text:p>
      <text:p text:style-name="Standard"><text:s text:c="2"/>- progreso por tareas, no por sesión monolítica</text:p>
      <text:p text:style-name="Standard"/>
      <text:p text:style-name="Standard"><text:s text:c="2"/>3. Escenario recovery real</text:p>
      <text:p text:style-name="Standard"><text:s text:c="2"/>Debes ejecutar una corrida que produzca fallo real y luego:</text:p>
      <text:p text:style-name="Standard"><text:s text:c="2"/>- retry real</text:p>
      <text:p text:style-name="Standard"><text:s text:c="2"/>o</text:p>
      <text:p text:style-name="Standard"><text:s text:c="2"/>- split real</text:p>
      <text:p text:style-name="Standard"><text:s text:c="2"/>y después continuidad real</text:p>
      <text:p text:style-name="Standard"/>
      <text:p text:style-name="Standard"><text:s text:c="2"/>4. Diagnóstico final</text:p>
      <text:p text:style-name="Standard"><text:s text:c="2"/>Debes dejar una conclusión honesta:</text:p>
      <text:p text:style-name="Standard"><text:s text:c="2"/>- qué ya funciona en producción controlada</text:p>
      <text:p text:style-name="Standard"><text:s text:c="2"/>- qué todavía falla</text:p>
      <text:p text:style-name="Standard"><text:s text:c="2"/>- qué falta para confiar en proyectos largos reales</text:p>
      <text:p text:style-name="Standard"/>
      <text:p text:style-name="Standard"><text:s text:c="2"/>REQUISITOS FUNCIONALES</text:p>
      <text:p text:style-name="Standard"/>
      <text:p text:style-name="Standard"><text:s text:c="2"/>1. Si creas `orchestrator/real_validation.py`, debe poder:</text:p>
      <text:p text:style-name="Standard"><text:s text:c="2"/>- preparar entornos de prueba reales</text:p>
      <text:p text:style-name="Standard"><text:s text:c="2"/>- disparar corridas del runtime nuevo</text:p>
      <text:p text:style-name="Standard"><text:s text:c="2"/>- recolectar evidencia</text:p>
      <text:p text:style-name="Standard"><text:s text:c="2"/>- guardar resultados estructurados</text:p>
      <text:p text:style-name="Standard"><text:s text:c="2"/>- producir un reporte final claro</text:p>
      <text:p text:style-name="Standard"/>
      <text:p text:style-name="Standard"><text:s text:c="2"/>2. La evidencia real debe incluir como mínimo:</text:p>
      <text:p text:style-name="Standard"><text:s text:c="2"/>- task_queue.json</text:p>
      <text:p text:style-name="Standard"><text:soft-page-break/><text:s text:c="2"/>- project_state.json</text:p>
      <text:p text:style-name="Standard"><text:s text:c="2"/>- task_history.jsonl</text:p>
      <text:p text:style-name="Standard"><text:s text:c="2"/>- failures.jsonl cuando aplique</text:p>
      <text:p text:style-name="Standard"><text:s text:c="2"/>- checkpoints cuando apliquen</text:p>
      <text:p text:style-name="Standard"><text:s text:c="2"/>- directivas generadas</text:p>
      <text:p text:style-name="Standard"><text:s text:c="2"/>- resultado final por escenario</text:p>
      <text:p text:style-name="Standard"/>
      <text:p text:style-name="Standard"><text:s text:c="2"/>3. El reporte final debe dejar claro:</text:p>
      <text:p text:style-name="Standard"><text:s text:c="2"/>- escenario</text:p>
      <text:p text:style-name="Standard"><text:s text:c="2"/>- estado final</text:p>
      <text:p text:style-name="Standard"><text:s text:c="2"/>- tareas ejecutadas</text:p>
      <text:p text:style-name="Standard"><text:s text:c="2"/>- decisiones de recovery</text:p>
      <text:p text:style-name="Standard"><text:s text:c="2"/>- artefactos generados</text:p>
      <text:p text:style-name="Standard"><text:s text:c="2"/>- limitaciones observadas</text:p>
      <text:p text:style-name="Standard"><text:s text:c="2"/>- si el sistema ya pasó o no una validación real mínima</text:p>
      <text:p text:style-name="Standard"/>
      <text:p text:style-name="Standard"><text:s text:c="2"/>4. Si el entorno impide una corrida ideal:</text:p>
      <text:p text:style-name="Standard"><text:s text:c="2"/>- no inventes éxito</text:p>
      <text:p text:style-name="Standard"><text:s text:c="2"/>- degrada de forma clara</text:p>
      <text:p text:style-name="Standard"><text:s text:c="2"/>- deja evidencia exacta del bloqueo</text:p>
      <text:p text:style-name="Standard"><text:s text:c="2"/>- separa “harness pasa” de “corrida real pasa”</text:p>
      <text:p text:style-name="Standard"/>
      <text:p text:style-name="Standard"><text:s text:c="2"/>RESTRICCIONES DURAS</text:p>
      <text:p text:style-name="Standard"><text:s text:c="2"/>- no rehacer la arquitectura</text:p>
      <text:p text:style-name="Standard"><text:s text:c="2"/>- no crear UI nueva en esta corrida</text:p>
      <text:p text:style-name="Standard"><text:s text:c="2"/>- no entrar en benchmarks nuevos fuera de los oficiales ya cerrados</text:p>
      <text:p text:style-name="Standard"><text:s text:c="2"/>- no tocar agent_runtime.py salvo ajuste mínimo inevitable y bien justificado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éxito sin evidencia real en disco</text:p>
      <text:p text:style-name="Standard"><text:s text:c="2"/>- no confundir validación sintética con validación real</text:p>
      <text:p text:style-name="Standard"/>
      <text:p text:style-name="Standard"><text:s text:c="2"/>CRITERIOS DE ACEPTACION</text:p>
      <text:p text:style-name="Standard"><text:s text:c="2"/>Esta fase queda correcta si:</text:p>
      <text:p text:style-name="Standard"><text:s text:c="2"/>- existen corridas reales ejecutadas y auditables</text:p>
      <text:p text:style-name="Standard"><text:s text:c="2"/>- existe evidencia persistida por escenario</text:p>
      <text:p text:style-name="Standard"><text:s text:c="2"/>- existe reporte final honesto</text:p>
      <text:p text:style-name="Standard"><text:s text:c="2"/>- queda claro qué tan cerca está el sistema de proyectos largos reales</text:p>
      <text:p text:style-name="Standard"><text:s text:c="2"/>- no se maquilla un fallo como si fuera éxito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Escenario corto</text:p>
      <text:p text:style-name="Standard"><text:s text:c="2"/>- se ejecutó y dejó artefactos reales</text:p>
      <text:p text:style-name="Standard"/>
      <text:p text:style-name="Standard"><text:s text:c="2"/>2. Escenario mediano</text:p>
      <text:p text:style-name="Standard"><text:s text:c="2"/>- se ejecutó por varias tareas reales</text:p>
      <text:p text:style-name="Standard"><text:s text:c="2"/>- la cola avanzó por dependencias</text:p>
      <text:p text:style-name="Standard"/>
      <text:p text:style-name="Standard"><text:s text:c="2"/>3. Escenario recovery</text:p>
      <text:p text:style-name="Standard"><text:s text:c="2"/>- hubo fallo real</text:p>
      <text:p text:style-name="Standard"><text:soft-page-break/><text:s text:c="2"/>- hubo retry o split real</text:p>
      <text:p text:style-name="Standard"><text:s text:c="2"/>- hubo continuación real posterior</text:p>
      <text:p text:style-name="Standard"/>
      <text:p text:style-name="Standard"><text:s text:c="2"/>4. Reporte final</text:p>
      <text:p text:style-name="Standard"><text:s text:c="2"/>- distingue claramente:</text:p>
      <text:p text:style-name="Standard"><text:s text:c="4"/>- pasó real</text:p>
      <text:p text:style-name="Standard"><text:s text:c="4"/>- falló real</text:p>
      <text:p text:style-name="Standard"><text:s text:c="4"/>- bloqueo de entorno</text:p>
      <text:p text:style-name="Standard"><text:s text:c="2"/>- no mezcla eso con humo</text:p>
      <text:p text:style-name="Standard"/>
      <text:p text:style-name="Standard"><text:s text:c="2"/>SI AGREGAS TESTS</text:p>
      <text:p text:style-name="Standard"><text:s text:c="2"/>Mantenlos pequeños y enfocados en esta fase de validación real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corridas reales ejecutadas</text:p>
      <text:p text:style-name="Standard"><text:s text:c="2"/>3. evidencia persistida</text:p>
      <text:p text:style-name="Standard"><text:s text:c="2"/>4. limitaciones reales encontradas</text:p>
      <text:p text:style-name="Standard"><text:s text:c="2"/>5. veredicto honesto sobre si el sistema ya está listo para proyectos reales</text:p>
      <text:p text:style-name="Standard"><text:s text:c="2"/>cortos, medianos y largos</text:p>
      <text:p text:style-name="Standard"/>
      <text:p text:style-name="Standard"><text:s text:c="2"/>Cuando termine, yo te lo audito igual que los sprints anteriores.</text:p>
      <text:p text:style-name="Standard"/>
      <text:p text:style-name="Standard"/>
      <text:p text:style-name="Standard">› ya termino <text:s/>revisa</text:p>
      <text:p text:style-name="Standard"/>
      <text:p text:style-name="Standard"/>
      <text:p text:style-name="Standard">• Voy a auditar esta fase de validación real: revisar qué artefactos dejó, qué</text:p>
      <text:p text:style-name="Standard"><text:s text:c="2"/>corridas ejecutó de verdad y si el veredicto final está respaldado por</text:p>
      <text:p text:style-name="Standard"><text:s text:c="2"/>evidencia persistida.</text:p>
      <text:p text:style-name="Standard"/>
      <text:p text:style-name="Standard">• Ya aparecieron el módulo y los reportes. Ahora voy a leer real_validation.py y</text:p>
      <text:p text:style-name="Standard"><text:s text:c="2"/>el último reporte para comprobar si la “validación real” es realmente distinta</text:p>
      <text:p text:style-name="Standard"><text:s text:c="2"/>del harness sintético o si sigue siendo la misma clase de simulación con otro</text:p>
      <text:p text:style-name="Standard"><text:s text:c="2"/>nombre.</text:p>
      <text:p text:style-name="Standard"/>
      <text:p text:style-name="Standard">• Encontré un detalle delicado en el último reporte: las directivas del</text:p>
      <text:p text:style-name="Standard"><text:s text:c="2"/>escenario “real” salen degradadas y mirando el repo raíz en vez del workspace</text:p>
      <text:p text:style-name="Standard"><text:s text:c="2"/>del escenario. Voy a confirmar si eso se repite y si el veredicto final está</text:p>
      <text:p text:style-name="Standard"><text:s text:c="2"/>ignorando ese fallo de alineación.</text:p>
      <text:p text:style-name="Standard"/>
      <text:p text:style-name="Standard">• Ya confirmé el problema principal: las corridas “reales” pasan aunque la</text:p>
      <text:p text:style-name="Standard"><text:s text:c="2"/>directiva salga degradada y con evidencia pre-ejecución apuntando al repo</text:p>
      <text:p text:style-name="Standard"><text:s text:c="2"/>raíz, no al workspace del escenario. Voy a sacar líneas exactas para dejar la</text:p>
      <text:p text:style-name="Standard"><text:s text:c="2"/>revisión cerrada con referencias concretas.</text:p>
      <text:p text:style-name="Standard"/>
      <text:p text:style-name="Standard">• Ya tengo la causa del desalineamiento: real_validation.py intenta aislar el</text:p>
      <text:p text:style-name="Standard"><text:s text:c="2"/>workspace, pero AgentRuntime sigue fijando self.repo_root al repo real. Voy a</text:p>
      <text:p text:style-name="Standard"><text:s text:c="2"/>mirar las funciones de diagnóstico final y limitaciones, porque ahí puede</text:p>
      <text:p text:style-name="Standard"><text:s text:c="2"/>estar el problema de clasificación del resultado como “passed_real”.</text:p>
      <text:p text:style-name="Standard"/>
      <text:p text:style-name="Standard"><text:soft-page-break/>• Encontré 2 hallazgos.</text:p>
      <text:p text:style-name="Standard"/>
      <text:p text:style-name="Standard"><text:s text:c="2"/>- Alta: la fase marca escenarios como passed_real aunque la directiva salga</text:p>
      <text:p text:style-name="Standard"><text:s text:c="4"/>degradada y mirando la raíz equivocada. En real_validation.py:256,</text:p>
      <text:p text:style-name="Standard"><text:s text:c="4"/>real_validation.py:351 y real_validation.py:438 los checks solo exigen</text:p>
      <text:p text:style-name="Standard"><text:s text:c="4"/>completado/validación/artefactos, pero nunca exigen que la directiva se haya</text:p>
      <text:p text:style-name="Standard"><text:s text:c="4"/>generado con context_degraded = false ni que la evidencia previa apunte al</text:p>
      <text:p text:style-name="Standard"><text:s text:c="4"/>workspace real del escenario. La causa está en real_validation.py:489, que</text:p>
      <text:p text:style-name="Standard"><text:s text:c="4"/>crea AgentRuntime(app_root=root, ...), mientras agent_runtime.py:1467 fija</text:p>
      <text:p text:style-name="Standard"><text:s text:c="4"/>self.repo_root = REPO_ROOT. Lo reproduje al rerun de run_real_validations():</text:p>
      <text:p text:style-name="Standard"><text:s text:c="4"/>el reporte volvió a salir aprobado, pero el artefacto persistido sigue</text:p>
      <text:p text:style-name="Standard"><text:s text:c="4"/>admitiendo la limitación “Directive pre-execution evidence is still based on</text:p>
      <text:p text:style-name="Standard"><text:s text:c="4"/>repository-root inspection while task validation uses the isolated scenario</text:p>
      <text:p text:style-name="Standard"><text:s text:c="4"/>workspace” en latest.json y latest.md. Eso significa que la fase no valida</text:p>
      <text:p text:style-name="Standard"><text:s text:c="4"/>limpio el encadenamiento context -&gt; directive -&gt; workspace; valida más bien</text:p>
      <text:p text:style-name="Standard"><text:s text:c="4"/>executor/validator sobre un workspace aislado mientras la directiva sigue</text:p>
      <text:p text:style-name="Standard"><text:s text:c="4"/>inspeccionando otra raíz.</text:p>
      <text:p text:style-name="Standard"><text:s text:c="2"/>- Media: las corridas “reales” siguen gobernadas por el alcance de Sprint 10,</text:p>
      <text:p text:style-name="Standard"><text:s text:c="4"/>no por la fase nueva de validación real. En real_validation.py:241,</text:p>
      <text:p text:style-name="Standard"><text:s text:c="4"/>real_validation.py:341 y real_validation.py:412 siempre se pasa</text:p>
      <text:p text:style-name="Standard"><text:s text:c="4"/>sprint_number=10, y además real_validation.py:503 fija</text:p>
      <text:p text:style-name="Standard"><text:s text:c="4"/>runtime.control_plane_sprint_number = 10. Por eso las directivas generadas</text:p>
      <text:p text:style-name="Standard"><text:s text:c="4"/>para REAL-SHORT-001, REAL-MED-* y REAL-RECOVERY-* siguen diciendo “Sprint:</text:p>
      <text:p text:style-name="Standard"><text:s text:c="4"/>10 - Benchmarks y puerta de despliegue” y “Exact deliverables: orchestrator/</text:p>
      <text:p text:style-name="Standard"><text:s text:c="4"/>benchmark.py”, aunque las tareas reales del escenario sean notes/</text:p>
      <text:p text:style-name="Standard"><text:s text:c="4"/>short_real.md, app/domain.py, recovery/recovered.txt, etc. La validación sí</text:p>
      <text:p text:style-name="Standard"><text:s text:c="4"/>prueba ejecución, pero no está probando generación de directivas bajo el</text:p>
      <text:p text:style-name="Standard"><text:s text:c="4"/>scope correcto de esta fase.</text:p>
      <text:p text:style-name="Standard"/>
      <text:p text:style-name="Standard"><text:s text:c="2"/>Validación que sí pasó:</text:p>
      <text:p text:style-name="Standard"/>
      <text:p text:style-name="Standard"><text:s text:c="2"/>- real_validation.py compila.</text:p>
      <text:p text:style-name="Standard"><text:s text:c="2"/>- Reejecuté run_real_validations() y produjo una corrida nueva con los 3</text:p>
      <text:p text:style-name="Standard"><text:s text:c="4"/>escenarios en passed_real.</text:p>
      <text:p text:style-name="Standard"><text:s text:c="2"/>- Los artefactos se persisten bien en runtime/real_runs/ y docs/</text:p>
      <text:p text:style-name="Standard"><text:s text:c="4"/>real_validation/.</text:p>
      <text:p text:style-name="Standard"/>
      <text:p text:style-name="Standard"><text:s text:c="2"/>No la aprobaría todavía como “validación real cerrada”. La ejecución mecánica</text:p>
      <text:p text:style-name="Standard"><text:s text:c="2"/>funciona, pero el contexto/directiva siguen desalineados con el workspace real</text:p>
      <text:p text:style-name="Standard"><text:s text:c="2"/>del escenario, y el scope del sprint que gobierna la directiva también es</text:p>
      <text:p text:style-name="Standard"><text:s text:c="2"/>incorrecto.</text:p>
      <text:p text:style-name="Standard"/>
      <text:p text:style-name="Standard"/>
      <text:p text:style-name="Standard">› entonces</text:p>
      <text:p text:style-name="Standard"/>
      <text:p text:style-name="Standard"/>
      <text:p text:style-name="Standard">• Entonces no la damos por aprobada todavía.</text:p>
      <text:p text:style-name="Standard"/>
      <text:p text:style-name="Standard"><text:s text:c="2"/>La lectura correcta es:</text:p>
      <text:p text:style-name="Standard"/>
      <text:p text:style-name="Standard"><text:s text:c="2"/>- sí ejecuta tareas reales,</text:p>
      <text:p text:style-name="Standard"><text:s text:c="2"/>- sí deja evidencia,</text:p>
      <text:p text:style-name="Standard"><text:soft-page-break/><text:s text:c="2"/>- sí prueba retry y continuidad,</text:p>
      <text:p text:style-name="Standard"><text:s text:c="2"/>- pero no valida limpio el sistema completo, porque la directiva todavía nace</text:p>
      <text:p text:style-name="Standard"><text:s text:c="4"/>con una raíz/contexto mal alineados y además usa Sprint 10 como scope aunque</text:p>
      <text:p text:style-name="Standard"><text:s text:c="4"/>ya estamos en otra fase.</text:p>
      <text:p text:style-name="Standard"/>
      <text:p text:style-name="Standard"><text:s text:c="2"/>O sea:</text:p>
      <text:p text:style-name="Standard"/>
      <text:p text:style-name="Standard"><text:s text:c="2"/>- el motor está funcionando,</text:p>
      <text:p text:style-name="Standard"><text:s text:c="2"/>- la validación está bien encaminada,</text:p>
      <text:p text:style-name="Standard"><text:s text:c="2"/>- pero el diagnóstico final todavía está sobrevendido.</text:p>
      <text:p text:style-name="Standard"/>
      <text:p text:style-name="Standard"><text:s text:c="2"/>Lo correcto ahora es hacer un prompt correctivo corto para que el otro agente</text:p>
      <text:p text:style-name="Standard"><text:s text:c="2"/>arregle solo estos 2 puntos:</text:p>
      <text:p text:style-name="Standard"/>
      <text:p text:style-name="Standard"><text:s text:c="2"/>1. alinear repo_root/contexto/directiva con el workspace real del escenario,</text:p>
      <text:p text:style-name="Standard"><text:s text:c="2"/>2. dejar de forzar sprint_number = 10 en esta fase de validación real.</text:p>
      <text:p text:style-name="Standard"/>
      <text:p text:style-name="Standard"><text:s text:c="2"/>Si quieres, te lo redacto ya.</text:p>
      <text:p text:style-name="Standard"/>
      <text:p text:style-name="Standard"/>
      <text:p text:style-name="Standard">› ok hagamolo</text:p>
      <text:p text:style-name="Standard"/>
      <text:p text:style-name="Standard"/>
      <text:p text:style-name="Standard">• 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><text:s text:c="2"/>Corregir unicamente los bugs de la fase de validacion real.</text:p>
      <text:p text:style-name="Standard"><text:s text:c="2"/>No rehagas la arquitectura y no avances otra fase.</text:p>
      <text:p text:style-name="Standard"/>
      <text:p text:style-name="Standard"><text:s text:c="2"/>BUGS A CORREGIR</text:p>
      <text:p text:style-name="Standard"/>
      <text:p text:style-name="Standard"><text:s text:c="2"/>1. BUG DE ALINEACION ENTRE DIRECTIVA Y WORKSPACE REAL</text:p>
      <text:p text:style-name="Standard"><text:s text:c="2"/>Problema real:</text:p>
      <text:p text:style-name="Standard"><text:s text:c="2"/>Las corridas de `orchestrator/real_validation.py` ejecutan el worker sobre un</text:p>
      <text:p text:style-name="Standard"><text:soft-page-break/><text:s text:c="2"/>workspace aislado del escenario, pero la directiva y la inspeccion pre-</text:p>
      <text:p text:style-name="Standard"><text:s text:c="2"/>ejecucion siguen naciendo contra la raiz real del repo principal.</text:p>
      <text:p text:style-name="Standard"><text:s text:c="2"/>Eso hace que:</text:p>
      <text:p text:style-name="Standard"><text:s text:c="2"/>- `context_degraded = true`</text:p>
      <text:p text:style-name="Standard"><text:s text:c="2"/>- la directiva reporte evidencia faltante antes de ejecutar</text:p>
      <text:p text:style-name="Standard"><text:s text:c="2"/>- `mandatory_repo_root` no coincida con el workspace real del escenario</text:p>
      <text:p text:style-name="Standard"><text:s text:c="2"/>- la fase marque `passed_real` aunque el encadenamiento contexto -&gt; directiva</text:p>
      <text:p text:style-name="Standard"><text:s text:c="2"/>-&gt; workspace siga desalineado</text:p>
      <text:p text:style-name="Standard"/>
      <text:p text:style-name="Standard"><text:s text:c="2"/>Correccion esperada:</text:p>
      <text:p text:style-name="Standard"><text:s text:c="2"/>- las corridas de validacion real deben generar contexto y directiva alineados</text:p>
      <text:p text:style-name="Standard"><text:s text:c="2"/>con el workspace real del escenario o con una representacion coherente y</text:p>
      <text:p text:style-name="Standard"><text:s text:c="2"/>explicitamente correcta de ese escenario</text:p>
      <text:p text:style-name="Standard"><text:s text:c="2"/>- no debe quedar `passed_real` si la directiva nace degradada por mirar la</text:p>
      <text:p text:style-name="Standard"><text:s text:c="2"/>raiz equivocada</text:p>
      <text:p text:style-name="Standard"><text:s text:c="2"/>- la fase debe comprobar de forma real que la directiva y la ejecucion apuntan</text:p>
      <text:p text:style-name="Standard"><text:s text:c="2"/>al mismo entorno de trabajo</text:p>
      <text:p text:style-name="Standard"/>
      <text:p text:style-name="Standard"><text:s text:c="2"/>2. BUG DE SCOPE FORZADO A SPRINT 10</text:p>
      <text:p text:style-name="Standard"><text:s text:c="2"/>Problema real:</text:p>
      <text:p text:style-name="Standard"><text:s text:c="2"/>La validacion real sigue forzando `sprint_number = 10` y</text:p>
      <text:p text:style-name="Standard"><text:s text:c="2"/>`control_plane_sprint_number = 10`.</text:p>
      <text:p text:style-name="Standard"><text:s text:c="2"/>Entonces las directivas de esta fase siguen diciendo:</text:p>
      <text:p text:style-name="Standard"><text:s text:c="2"/>- Sprint 10</text:p>
      <text:p text:style-name="Standard"><text:s text:c="2"/>- deliverable `orchestrator/benchmark.py`</text:p>
      <text:p text:style-name="Standard"><text:s text:c="2"/>aunque la tarea real del escenario sea otra</text:p>
      <text:p text:style-name="Standard"/>
      <text:p text:style-name="Standard"><text:s text:c="2"/>Eso vuelve incorrecto el scope operativo de la directiva.</text:p>
      <text:p text:style-name="Standard"/>
      <text:p text:style-name="Standard"><text:s text:c="2"/>Correccion esperada:</text:p>
      <text:p text:style-name="Standard"><text:s text:c="2"/>- la fase de validacion real no debe forzar scope incorrecto</text:p>
      <text:p text:style-name="Standard"><text:s text:c="2"/>- si necesita un scope especial, debe ser coherente con esta fase real</text:p>
      <text:p text:style-name="Standard"><text:s text:c="2"/>- la directiva no debe declarar deliverables de Sprint 10 cuando la tarea real</text:p>
      <text:p text:style-name="Standard"><text:s text:c="2"/>es otra</text:p>
      <text:p text:style-name="Standard"><text:s text:c="2"/>- si no hay sprint formal aplicable, degradar claramente o usar un contexto</text:p>
      <text:p text:style-name="Standard"><text:s text:c="2"/>explícito y honesto, no uno falso</text:p>
      <text:p text:style-name="Standard"/>
      <text:p text:style-name="Standard"><text:s text:c="2"/>ALCANCE EXACTO</text:p>
      <text:p text:style-name="Standard"><text:s text:c="2"/>Puedes modificar solo si hace falta:</text:p>
      <text:p text:style-name="Standard"><text:s text:c="2"/>- orchestrator/real_validation.py</text:p>
      <text:p text:style-name="Standard"><text:s text:c="2"/>- ajustes minimos estrictamente necesarios en backend/agent_runtime.py o</text:p>
      <text:p text:style-name="Standard"><text:s text:c="2"/>loaders/contexto si son inevitables para alinear esta fase</text:p>
      <text:p text:style-name="Standard"><text:s text:c="2"/>- tests o validaciones pequenas y enfocadas en estos dos bugs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UI</text:p>
      <text:p text:style-name="Standard"><text:s text:c="2"/>- no inventar una fase falsa</text:p>
      <text:p text:style-name="Standard"><text:s text:c="2"/>- no trabajar dentro de runtime_orquestador_codex_pack/</text:p>
      <text:p text:style-name="Standard"><text:s text:c="2"/>- no trabajar dentro de workspace/projects/</text:p>
      <text:p text:style-name="Standard"><text:s text:c="2"/>- no reportar exito sin evidencia real en disco</text:p>
      <text:p text:style-name="Standard"><text:s text:c="2"/>- no volver a marcar `passed_real` si la directiva sigue degradada por mirar</text:p>
      <text:p text:style-name="Standard"><text:soft-page-break/><text:s text:c="2"/>la raiz incorrecta</text:p>
      <text:p text:style-name="Standard"/>
      <text:p text:style-name="Standard"><text:s text:c="2"/>VALIDACION MINIMA OBLIGATORIA</text:p>
      <text:p text:style-name="Standard"><text:s text:c="2"/>Debes dejar evidencia real de que:</text:p>
      <text:p text:style-name="Standard"/>
      <text:p text:style-name="Standard"><text:s text:c="2"/>1. Alineacion real</text:p>
      <text:p text:style-name="Standard"><text:s text:c="2"/>- en una corrida real, la directiva ya no nace degradada por mirar la raiz</text:p>
      <text:p text:style-name="Standard"><text:s text:c="2"/>equivocada</text:p>
      <text:p text:style-name="Standard"><text:s text:c="2"/>o</text:p>
      <text:p text:style-name="Standard"><text:s text:c="2"/>- si por diseño debe degradar, entonces el escenario no puede marcarse</text:p>
      <text:p text:style-name="Standard"><text:s text:c="2"/>`passed_real`</text:p>
      <text:p text:style-name="Standard"/>
      <text:p text:style-name="Standard"><text:s text:c="2"/>2. Scope correcto</text:p>
      <text:p text:style-name="Standard"><text:s text:c="2"/>- la directiva ya no reporta Sprint 10 y `orchestrator/benchmark.py` como</text:p>
      <text:p text:style-name="Standard"><text:s text:c="2"/>deliverable falso para esta fase</text:p>
      <text:p text:style-name="Standard"><text:s text:c="2"/>- el scope mostrado por la directiva coincide con la tarea o con el contexto</text:p>
      <text:p text:style-name="Standard"><text:s text:c="2"/>real de validacion</text:p>
      <text:p text:style-name="Standard"/>
      <text:p text:style-name="Standard"><text:s text:c="2"/>3. Honestidad del resultado</text:p>
      <text:p text:style-name="Standard"><text:s text:c="2"/>- si el escenario queda totalmente alineado, puede pasar</text:p>
      <text:p text:style-name="Standard"><text:s text:c="2"/>- si sigue habiendo desalineacion real, debe fallar o quedar marcado como</text:p>
      <text:p text:style-name="Standard"><text:s text:c="2"/>bloqueo claro</text:p>
      <text:p text:style-name="Standard"><text:s text:c="2"/>- no maquilles esta condicion como limitacion menor si afecta la integridad de</text:p>
      <text:p text:style-name="Standard"><text:s text:c="2"/>la directiva</text:p>
      <text:p text:style-name="Standard"/>
      <text:p text:style-name="Standard"><text:s text:c="2"/>4. Reporte final</text:p>
      <text:p text:style-name="Standard"><text:s text:c="2"/>- el nuevo reporte debe reflejar correctamente:</text:p>
      <text:p text:style-name="Standard"><text:s text:c="4"/>- si la validacion real ya quedo limpia</text:p>
      <text:p text:style-name="Standard"><text:s text:c="4"/>- o si sigue habiendo una deuda estructural</text:p>
      <text:p text:style-name="Standard"/>
      <text:p text:style-name="Standard"><text:s text:c="2"/>SI AGREGAS TESTS</text:p>
      <text:p text:style-name="Standard"><text:s text:c="2"/>Mantenlos pequenos y enfocados solo en estos bugs de la fase real.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><text:s text:c="2"/>5. confirmacion explicita de si la fase de validacion real ya quedo</text:p>
      <text:p text:style-name="Standard"><text:s text:c="2"/>honestamente aprobada o no</text:p>
      <text:p text:style-name="Standard"/>
      <text:p text:style-name="Standard"/>
      <text:p text:style-name="Standard">› y termino</text:p>
      <text:p text:style-name="Standard"/>
      <text:p text:style-name="Standard"/>
      <text:p text:style-name="Standard">• Voy a reauditar la fase de validación real enfocándome en los dos bugs</text:p>
      <text:p text:style-name="Standard"><text:s text:c="2"/>corregidos: alineación entre directiva y workspace, y el scope falso de Sprint</text:p>
      <text:p text:style-name="Standard"><text:s text:c="2"/>10. Luego reproduzco una corrida nueva para confirmar si ya quedó honestamente</text:p>
      <text:p text:style-name="Standard"><text:s text:c="2"/>aprobada o no.</text:p>
      <text:p text:style-name="Standard"/>
      <text:p text:style-name="Standard">• Ya veo cambios concretos: ahora siembran AGENTS.md/PLANS.md en el workspace d</text:p>
      <text:p text:style-name="Standard"><text:soft-page-break/><text:s text:c="2"/>el escenario y pasan directive_repo_root=env["workspace"]. Voy a leer las com</text:p>
      <text:p text:style-name="Standard"><text:s text:c="2"/>probaciones nuevas de alineación y correr otra validación completa para confi</text:p>
      <text:p text:style-name="Standard"><text:s text:c="2"/>rmar si de verdad eliminó el context_degraded y el scope falso.</text:p>
      <text:p text:style-name="Standard"/>
      <text:p text:style-name="Standard">• La corrida nueva quedó generando directivas dentro del workspace/runtime/</text:p>
      <text:p text:style-name="Standard"><text:s text:c="2"/>directives de cada escenario, que es justo lo que faltaba. Solo me falta</text:p>
      <text:p text:style-name="Standard"><text:s text:c="2"/>recoger el resumen final de esa ejecución para cerrar si ya pasó limpio o si</text:p>
      <text:p text:style-name="Standard"><text:s text:c="2"/>quedó algún residuo raro.</text:p>
      <text:p text:style-name="Standard"/>
      <text:p text:style-name="Standard">• La corrida nueva ya pasó con context_degraded = false y sin scope de Sprint</text:p>
      <text:p text:style-name="Standard"><text:s text:c="2"/>10. Estoy verificando una última cosa menor: el nombre del check de alineación</text:p>
      <text:p text:style-name="Standard"><text:s text:c="2"/>en el resumen, porque el script de impresión no coincidió con la etiqueta</text:p>
      <text:p text:style-name="Standard"><text:s text:c="2"/>exacta del check.</text:p>
      <text:p text:style-name="Standard"/>
      <text:p text:style-name="Standard">• Context compacted</text:p>
      <text:p text:style-name="Standard"/>
      <text:p text:style-name="Standard">• No encontré hallazgos bloqueantes. La fase de validación real ya quedó</text:p>
      <text:p text:style-name="Standard"><text:s text:c="2"/>honestamente aprobada.</text:p>
      <text:p text:style-name="Standard"/>
      <text:p text:style-name="Standard"><text:s text:c="2"/>Verifiqué real_validation.py, recompilé el archivo y relancé una corrida</text:p>
      <text:p text:style-name="Standard"><text:s text:c="2"/>nueva: 20260513T025421Z-669f07c0. El resultado quedó en runtime/real_runs/</text:p>
      <text:p text:style-name="Standard"><text:s text:c="2"/>latest.json y docs/real_validation/latest.md. Los 3 escenarios quedaron en</text:p>
      <text:p text:style-name="Standard"><text:s text:c="2"/>passed_real: short-real, medium-real y recovery-real.</text:p>
      <text:p text:style-name="Standard"/>
      <text:p text:style-name="Standard"><text:s text:c="2"/>Lo importante es que ahora sí quedó limpio lo que antes estaba mal:</text:p>
      <text:p text:style-name="Standard"/>
      <text:p text:style-name="Standard"><text:s text:c="2"/>- la directiva ya nace contra el workspace real del escenario, no contra la</text:p>
      <text:p text:style-name="Standard"><text:s text:c="4"/>raíz equivocada</text:p>
      <text:p text:style-name="Standard"><text:s text:c="2"/>- context_degraded quedó en false</text:p>
      <text:p text:style-name="Standard"><text:s text:c="2"/>- el root obligatorio coincide con el workspace de ejecución</text:p>
      <text:p text:style-name="Standard"><text:s text:c="2"/>- ya no se fuerza Sprint 10</text:p>
      <text:p text:style-name="Standard"><text:s text:c="2"/>- el scope y los deliverables de la directiva sí corresponden al escenario</text:p>
      <text:p text:style-name="Standard"><text:s text:c="4"/>real</text:p>
      <text:p text:style-name="Standard"/>
      <text:p text:style-name="Standard"><text:s text:c="2"/>Riesgos residuales, pero no bloqueantes:</text:p>
      <text:p text:style-name="Standard"/>
      <text:p text:style-name="Standard"><text:s text:c="2"/>- esto valida la mecánica real del runtime con workers deterministas locales,</text:p>
      <text:p text:style-name="Standard"><text:s text:c="4"/>no todavía una corrida larga abierta con Codex autónomo</text:p>
      <text:p text:style-name="Standard"><text:s text:c="2"/>- sigue pendiente una política de retención para runtime/real_runs/, runtime/</text:p>
      <text:p text:style-name="Standard"><text:s text:c="4"/>directives/ y artefactos similares</text:p>
      <text:p text:style-name="Standard"/>
      <text:p text:style-name="Standard"><text:s text:c="2"/>Conclusión: el harness base más la validación real mínima ya quedaron</text:p>
      <text:p text:style-name="Standard"><text:s text:c="2"/>cerrados. El siguiente paso sano es probar un proyecto largo real por muchas</text:p>
      <text:p text:style-name="Standard"><text:s text:c="2"/>tareas y reinicios, no otra capa teórica.</text:p>
      <text:p text:style-name="Standard"/>
      <text:p text:style-name="Standard"/>
      <text:p text:style-name="Standard">› ok hagamolo inicia el servidor <text:s text:c="2"/>y hacemos <text:s text:c="2"/>tareas costicas mas <text:s/>grandes <text:s/>y</text:p>
      <text:p text:style-name="Standard"><text:s text:c="2"/>super largas</text:p>
      <text:p text:style-name="Standard"/>
      <text:p text:style-name="Standard"/>
      <text:p text:style-name="Standard">• Voy a revisar el estado del runtime y levantar una instancia limpia del</text:p>
      <text:p text:style-name="Standard"><text:s text:c="2"/>servidor desde el repo correcto antes de pasar a pruebas largas.</text:p>
      <text:p text:style-name="Standard"><text:soft-page-break/></text:p>
      <text:p text:style-name="Standard">• Encontré un backend vivo heredado. Voy a confirmar puertos y usar el launcher</text:p>
      <text:p text:style-name="Standard"><text:s text:c="2"/>del repo para dejarlo en un estado limpio antes de probar las tareas largas.</text:p>
      <text:p text:style-name="Standard"/>
      <text:p text:style-name="Standard">• El launcher usa PID files; voy a mirar su estado y reiniciar con ese mismo</text:p>
      <text:p text:style-name="Standard"><text:s text:c="2"/>mecanismo para evitar otro backend “huérfano”.</text:p>
      <text:p text:style-name="Standard"/>
      <text:p text:style-name="Standard">• El servidor ya figura activo en 5000, pero lo voy a reiniciar sin abrir</text:p>
      <text:p text:style-name="Standard"><text:s text:c="2"/>navegador para asegurar que tome el estado limpio antes de las pruebas largas.</text:p>
      <text:p text:style-name="Standard"/>
      <text:p text:style-name="Standard">• El reinicio limpió el proceso viejo, pero el backend no volvió a levantar. Voy</text:p>
      <text:p text:style-name="Standard"><text:s text:c="2"/>a revisar el log y corregir el arranque antes de seguir.</text:p>
      <text:p text:style-name="Standard"/>
      <text:p text:style-name="Standard">• El backend viejo quedó fuera del control del sandbox y el nuevo arranque falló</text:p>
      <text:p text:style-name="Standard"><text:s text:c="2"/>por permisos de socket. Voy a reiniciarlo fuera del sandbox para dejar 5000</text:p>
      <text:p text:style-name="Standard"><text:s text:c="2"/>limpio y utilizable.</text:p>
      <text:p text:style-name="Standard"/>
      <text:p text:style-name="Standard">• El proceso viejo sigue vivo; voy a comprobar si realmente está escuchando en</text:p>
      <text:p text:style-name="Standard"><text:s text:c="2"/>5000 para no frenarnos por un reinicio que aquí no puedo terminar de forzar.</text:p>
      <text:p text:style-name="Standard"/>
      <text:p text:style-name="Standard">• Voy a intentar el arranque directo con el binario aprobado del backend. Si</text:p>
      <text:p text:style-name="Standard"><text:s text:c="2"/>este camino entra fuera del sandbox, nos deja el servidor arriba sin pelear</text:p>
      <text:p text:style-name="Standard"><text:s text:c="2"/>con start.sh.</text:p>
      <text:p text:style-name="Standard"/>
      <text:p text:style-name="Standard">• El backend viejo sí está ocupando 5000. Voy a levantar una segunda instancia</text:p>
      <text:p text:style-name="Standard"><text:s text:c="2"/>limpia en 5001 para que podamos seguir sin depender de ese proceso heredado.</text:p>
      <text:p text:style-name="Standard"/>
      <text:p text:style-name="Standard">• El estado práctico es este: hay un backend heredado ocupando</text:p>
      <text:p text:style-name="Standard"><text:s text:c="2"/>http://127.0.0.1:5000/. Intenté reiniciarlo limpio desde aquí, pero el sandbox</text:p>
      <text:p text:style-name="Standard"><text:s text:c="2"/>no puede matar ese PID viejo ni abrir otro socket para reemplazarlo. Si tu pe</text:p>
      <text:p text:style-name="Standard"><text:s text:c="2"/>staña abre en 5000, úsala y seguimos sobre esa instancia.</text:p>
      <text:p text:style-name="Standard"/>
      <text:p text:style-name="Standard"><text:s text:c="2"/>Si quieres dejarlo limpio de verdad en tu terminal, corre esto en la raíz del</text:p>
      <text:p text:style-name="Standard"><text:s text:c="2"/>repo:</text:p>
      <text:p text:style-name="Standard"/>
      <text:p text:style-name="Standard"><text:s text:c="2"/>pkill -f 'architecture-react-three-flask-socketio/backend/app.py'</text:p>
      <text:p text:style-name="Standard"><text:s text:c="2"/>cd "/home/neurodriver/BASE _METACOGNICION_COLOMBIA/vista_IA/architecture-</text:p>
      <text:p text:style-name="Standard"><text:s text:c="2"/>react-three-flask-socketio"</text:p>
      <text:p text:style-name="Standard"><text:s text:c="2"/>OPEN_BROWSER=0 bash start.sh start</text:p>
      <text:p text:style-name="Standard"/>
      <text:p text:style-name="Standard"><text:s text:c="2"/>Para la primera prueba larga de verdad, usa modo: long-run y lanza esto:</text:p>
      <text:p text:style-name="Standard"/>
      <text:p text:style-name="Standard"><text:s text:c="2"/>Proyecto: longrun-crm-01</text:p>
      <text:p text:style-name="Standard"><text:s text:c="2"/>Modo: long-run</text:p>
      <text:p text:style-name="Standard"/>
      <text:p text:style-name="Standard"><text:s text:c="2"/>Construye una aplicacion web completa de gestion de clientes y oportunidades</text:p>
      <text:p text:style-name="Standard"><text:s text:c="2"/>con HTML, CSS y JavaScript, usando archivos reales en disco y trabajando por</text:p>
      <text:p text:style-name="Standard"><text:s text:c="2"/>tareas pequenas del control plane, no como una sesion monolitica.</text:p>
      <text:p text:style-name="Standard"/>
      <text:p text:style-name="Standard"><text:s text:c="2"/>Objetivo:</text:p>
      <text:p text:style-name="Standard"><text:s text:c="2"/>Crear un mini CRM funcional y bien organizado que permita gestionar contactos,</text:p>
      <text:p text:style-name="Standard"><text:s text:c="2"/>oportunidades y seguimiento comercial.</text:p>
      <text:p text:style-name="Standard"><text:soft-page-break/></text:p>
      <text:p text:style-name="Standard"><text:s text:c="2"/>Requisitos obligatorios:</text:p>
      <text:p text:style-name="Standard"><text:s text:c="2"/>- trabajar desde el estado real actual</text:p>
      <text:p text:style-name="Standard"><text:s text:c="2"/>- usar el repo y workspace reales</text:p>
      <text:p text:style-name="Standard"><text:s text:c="2"/>- ejecutar por tareas y checkpoints</text:p>
      <text:p text:style-name="Standard"><text:s text:c="2"/>- dejar evidencia real en disco</text:p>
      <text:p text:style-name="Standard"><text:s text:c="2"/>- no fingir progreso</text:p>
      <text:p text:style-name="Standard"><text:s text:c="2"/>- si hay fallo, usar retry o split y continuar</text:p>
      <text:p text:style-name="Standard"/>
      <text:p text:style-name="Standard"><text:s text:c="2"/>Funcionalidad minima:</text:p>
      <text:p text:style-name="Standard"><text:s text:c="2"/>- CRUD de clientes</text:p>
      <text:p text:style-name="Standard"><text:s text:c="2"/>- CRUD de oportunidades</text:p>
      <text:p text:style-name="Standard"><text:s text:c="2"/>- estados de oportunidad: nuevo, contacto, propuesta, ganado, perdido</text:p>
      <text:p text:style-name="Standard"><text:s text:c="2"/>- filtros por estado, responsable y texto</text:p>
      <text:p text:style-name="Standard"><text:s text:c="2"/>- busqueda en vivo</text:p>
      <text:p text:style-name="Standard"><text:s text:c="2"/>- resumen visible con metricas</text:p>
      <text:p text:style-name="Standard"><text:s text:c="2"/>- historial basico de actividad por cliente</text:p>
      <text:p text:style-name="Standard"><text:s text:c="2"/>- persistencia local</text:p>
      <text:p text:style-name="Standard"><text:s text:c="2"/>- importacion y exportacion JSON</text:p>
      <text:p text:style-name="Standard"><text:s text:c="2"/>- validaciones claras</text:p>
      <text:p text:style-name="Standard"><text:s text:c="2"/>- estado vacio bien resuelto</text:p>
      <text:p text:style-name="Standard"/>
      <text:p text:style-name="Standard"><text:s text:c="2"/>Arquitectura:</text:p>
      <text:p text:style-name="Standard"><text:s text:c="2"/>- separar UI, dominio, persistencia y utilidades</text:p>
      <text:p text:style-name="Standard"><text:s text:c="2"/>- crear modulos reutilizables</text:p>
      <text:p text:style-name="Standard"><text:s text:c="2"/>- incluir pruebas reales</text:p>
      <text:p text:style-name="Standard"><text:s text:c="2"/>- incluir documentacion de arquitectura y ejecucion</text:p>
      <text:p text:style-name="Standard"><text:s text:c="2"/>- incluir validacion manual de flujos principales</text:p>
      <text:p text:style-name="Standard"/>
      <text:p text:style-name="Standard"><text:s text:c="2"/>Criterio de exito:</text:p>
      <text:p text:style-name="Standard"><text:s text:c="2"/>- debe avanzar por multiples tareas reales</text:p>
      <text:p text:style-name="Standard"><text:s text:c="2"/>- debe generar directivas y checkpoints</text:p>
      <text:p text:style-name="Standard"><text:s text:c="2"/>- debe crear archivos reales de producto</text:p>
      <text:p text:style-name="Standard"><text:s text:c="2"/>- debe soportar una corrida larga sin depender de una sola sesion enorme</text:p>
      <text:p text:style-name="Standard"/>
      <text:p text:style-name="Standard"><text:s text:c="2"/>Cuando lo lances, yo lo monitoreo y te digo si el control plane aguanta una</text:p>
      <text:p text:style-name="Standard"><text:s text:c="2"/>corrida larga real o si aparece otra deuda estructural.</text:p>
      <text:p text:style-name="Standard"/>
      <text:p text:style-name="Standard"/>
      <text:p text:style-name="Standard">› ya lo envie</text:p>
      <text:p text:style-name="Standard"/>
      <text:p text:style-name="Standard"/>
      <text:p text:style-name="Standard">• Voy a revisar en vivo qué sesión abrió, si ya creó proyecto real y si el</text:p>
      <text:p text:style-name="Standard"><text:s text:c="2"/>control plane empezó a producir tareas, directivas y archivos en disco.</text:p>
      <text:p text:style-name="Standard"/>
      <text:p text:style-name="Standard">• Ya abrió la sesión longrun-crm-01. Ahora voy a medir si de verdad pasó de</text:p>
      <text:p text:style-name="Standard"><text:s text:c="2"/>arranque a ejecución: archivos reales, directivas nuevas y progreso dentro del</text:p>
      <text:p text:style-name="Standard"><text:s text:c="2"/>proyecto.</text:p>
      <text:p text:style-name="Standard"/>
      <text:p text:style-name="Standard">• Por ahora no salió de bootstrap: solo existe la carpeta del proyecto y .agent-</text:p>
      <text:p text:style-name="Standard"><text:s text:c="2"/>project.json. Voy a mirar el estado interno del runtime nuevo para ver si ya</text:p>
      <text:p text:style-name="Standard"><text:s text:c="2"/>encoló tareas o si quedó trabado antes de generar directivas.</text:p>
      <text:p text:style-name="Standard"><text:soft-page-break/></text:p>
      <text:p text:style-name="Standard">• Ya se movió: apareció el checkpoint propio de la tarea actual. Voy a revisar</text:p>
      <text:p text:style-name="Standard"><text:s text:c="2"/>si produjo el artefacto esperado o si sigue pegado en la primera tarea del</text:p>
      <text:p text:style-name="Standard"><text:s text:c="2"/>control plane.</text:p>
      <text:p text:style-name="Standard"/>
      <text:p text:style-name="Standard">• La primera tarea sí cerró bien: creó su artefacto y su checkpoint. El punto</text:p>
      <text:p text:style-name="Standard"><text:s text:c="2"/>crítico ahora es si el runtime continúa solo con la segunda tarea o si se</text:p>
      <text:p text:style-name="Standard"><text:s text:c="2"/>quedó detenido después del primer paso.</text:p>
      <text:p text:style-name="Standard"/>
      <text:p text:style-name="Standard">• Quedó detenido tras la primera tarea. Voy a revisar si el runtime dejó un</text:p>
      <text:p text:style-name="Standard"><text:s text:c="2"/>error claro en logs o si simplemente no está encadenando la siguiente tarea</text:p>
      <text:p text:style-name="Standard"><text:s text:c="2"/>automáticamente.</text:p>
      <text:p text:style-name="Standard"/>
      <text:p text:style-name="Standard">• La corrida larga no está construyendo el CRM todavía. Voy a confirmar si el</text:p>
      <text:p text:style-name="Standard"><text:s text:c="2"/>proyecto quedó solo como contenedor vacío o si hay alguna sesión paralela</text:p>
      <text:p text:style-name="Standard"><text:s text:c="2"/>escribiendo dentro de esa carpeta.</text:p>
      <text:p text:style-name="Standard"/>
      <text:p text:style-name="Standard">• Estado en vivo:</text:p>
      <text:p text:style-name="Standard"/>
      <text:p text:style-name="Standard"><text:s text:c="2"/>- Sí abrió la sesión sesion-20260513030126-longrun-crm-01.</text:p>
      <text:p text:style-name="Standard"><text:s text:c="2"/>- Pero no está construyendo el CRM todavía.</text:p>
      <text:p text:style-name="Standard"/>
      <text:p text:style-name="Standard"><text:s text:c="2"/>Lo que sí pasó:</text:p>
      <text:p text:style-name="Standard"/>
      <text:p text:style-name="Standard"><text:s text:c="2"/>- el control plane creó 2 tareas internas en runtime/task_queue.json</text:p>
      <text:p text:style-name="Standard"><text:s text:c="2"/>- la primera RUNTIME-20260513030244-001 ya terminó bien</text:p>
      <text:p text:style-name="Standard"><text:s text:c="2"/>- dejó:</text:p>
      <text:p text:style-name="Standard"><text:s text:c="6"/>- runtime/artifacts/runtime-20260513030244-001.json</text:p>
      <text:p text:style-name="Standard"><text:s text:c="6"/>- runtime/checkpoints/runtime-20260513030244-001-checkpoint.json</text:p>
      <text:p text:style-name="Standard"><text:s text:c="6"/>- directiva RUNTIME-20260513030244-001-20260513T030244Z-f0a170c5d2fe.md</text:p>
      <text:p text:style-name="Standard"/>
      <text:p text:style-name="Standard"><text:s text:c="2"/>Lo crítico:</text:p>
      <text:p text:style-name="Standard"/>
      <text:p text:style-name="Standard"><text:s text:c="2"/>- la segunda tarea RUNTIME-20260513030244-002 sigue en pending</text:p>
      <text:p text:style-name="Standard"><text:s text:c="2"/>- project_state.json quedó con current_task_id = null</text:p>
      <text:p text:style-name="Standard"><text:s text:c="2"/>- el proyecto sesion-20260513030126-longrun-crm-01 sigue con 1 solo</text:p>
      <text:p text:style-name="Standard"><text:s text:c="4"/>archivo: .agent-project.json</text:p>
      <text:p text:style-name="Standard"><text:s text:c="2"/>- no existen frontend/, src/, tests/, docs/habla-session.md, .vista, ni</text:p>
      <text:p text:style-name="Standard"><text:s text:c="4"/>archivos reales del CRM dentro de esa sesión</text:p>
      <text:p text:style-name="Standard"/>
      <text:p text:style-name="Standard"><text:s text:c="2"/>Diagnóstico:</text:p>
      <text:p text:style-name="Standard"/>
      <text:p text:style-name="Standard"><text:s text:c="2"/>- no se bloqueó por auth ni por servidor</text:p>
      <text:p text:style-name="Standard"><text:s text:c="2"/>- se frenó por una deuda del runtime:</text:p>
      <text:p text:style-name="Standard"><text:s text:c="6"/>- ejecutó solo la primera tarea del control plane</text:p>
      <text:p text:style-name="Standard"><text:s text:c="6"/>- no encadenó automáticamente la siguiente</text:p>
      <text:p text:style-name="Standard"><text:s text:c="6"/>- y además la directiva está trabajando contra la raíz del repo principal,</text:p>
      <text:p text:style-name="Standard"><text:s text:c="8"/>no contra el proyecto longrun-crm-01</text:p>
      <text:p text:style-name="Standard"/>
      <text:p text:style-name="Standard"><text:s text:c="2"/>Conclusión honesta:</text:p>
      <text:p text:style-name="Standard"/>
      <text:p text:style-name="Standard"><text:s text:c="2"/>- esta corrida larga no arrancó de verdad como proyecto largo</text:p>
      <text:p text:style-name="Standard"><text:soft-page-break/><text:s text:c="2"/>- por ahora solo validó el primer paso de orquestación interna</text:p>
      <text:p text:style-name="Standard"><text:s text:c="2"/>- no vale la pena esperar más esta sesión porque no hay señales de que vaya a</text:p>
      <text:p text:style-name="Standard"><text:s text:c="4"/>empezar sola</text:p>
      <text:p text:style-name="Standard"/>
      <text:p text:style-name="Standard"><text:s text:c="2"/>Siguiente paso correcto:</text:p>
      <text:p text:style-name="Standard"/>
      <text:p text:style-name="Standard"><text:s text:c="2"/>1. parar esta corrida</text:p>
      <text:p text:style-name="Standard"><text:s text:c="2"/>2. corregir el runtime para:</text:p>
      <text:p text:style-name="Standard"/>
      <text:p text:style-name="Standard"><text:s text:c="2"/>- continuar automáticamente con la siguiente tarea lista</text:p>
      <text:p text:style-name="Standard"><text:s text:c="2"/>- trabajar contra el projectDir real de la sesión</text:p>
      <text:p text:style-name="Standard"><text:s text:c="2"/>- generar tareas del CRM de verdad, no solo tareas genéricas del runtime</text:p>
      <text:p text:style-name="Standard"/>
      <text:p text:style-name="Standard"><text:s text:c="2"/>Si quieres, te redacto ya el prompt exacto para que el otro agente corrija</text:p>
      <text:p text:style-name="Standard"><text:s text:c="2"/>esos dos bloqueos estructurales.</text:p>
      <text:p text:style-name="Standard"/>
      <text:p text:style-name="Standard"/>
      <text:p text:style-name="Standard">› si ok haslo</text:p>
      <text:p text:style-name="Standard"/>
      <text:p text:style-name="Standard"/>
      <text:p text:style-name="Standard">• Usa este prompt:</text:p>
      <text:p text:style-name="Standard"/>
      <text:p text:style-name="Standard"><text:s text:c="2"/>INSTRUCCION CRITICA DE RUTA</text:p>
      <text:p text:style-name="Standard"/>
      <text:p text:style-name="Standard"><text:s text:c="2"/>Tu directorio de trabajo real y unico es:</text:p>
      <text:p text:style-name="Standard"/>
      <text:p text:style-name="Standard"><text:s text:c="2"/>/home/neurodriver/BASE _METACOGNICION_COLOMBIA/vista_IA/architecture-react-</text:p>
      <text:p text:style-name="Standard"><text:s text:c="2"/>three-flask-socketio</text:p>
      <text:p text:style-name="Standard"/>
      <text:p text:style-name="Standard"><text:s text:c="2"/>Debes corregir en ESA RAIZ del repositorio.</text:p>
      <text:p text:style-name="Standard"/>
      <text:p text:style-name="Standard"><text:s text:c="2"/>PROHIBIDO trabajar dentro de:</text:p>
      <text:p text:style-name="Standard"><text:s text:c="2"/>- /home/neurodriver/BASE _METACOGNICION_COLOMBIA/vista_IA/architecture-react-</text:p>
      <text:p text:style-name="Standard"><text:s text:c="2"/>three-flask-socketio/runtime_orquestador_codex_pack</text:p>
      <text:p text:style-name="Standard"><text:s text:c="2"/>- /home/neurodriver/BASE _METACOGNICION_COLOMBIA/vista_IA/architecture-react-</text:p>
      <text:p text:style-name="Standard"><text:s text:c="2"/>three-flask-socketio/workspace/projects excepto como target real de las</text:p>
      <text:p text:style-name="Standard"><text:s text:c="2"/>sesiones</text:p>
      <text:p text:style-name="Standard"><text:s text:c="2"/>- no escribir implementacion dentro de proyectos viejos salvo la sesion activa</text:p>
      <text:p text:style-name="Standard"><text:s text:c="2"/>usada para validacion</text:p>
      <text:p text:style-name="Standard"/>
      <text:p text:style-name="Standard"><text:s text:c="2"/>Lee y obedece primero:</text:p>
      <text:p text:style-name="Standard"><text:s text:c="2"/>- AGENTS.md</text:p>
      <text:p text:style-name="Standard"><text:s text:c="2"/>- PLANS.md</text:p>
      <text:p text:style-name="Standard"><text:s text:c="2"/>- Fase 3 - Capa de Directivas y HABLA.md</text:p>
      <text:p text:style-name="Standard"/>
      <text:p text:style-name="Standard"><text:s text:c="2"/>OBJETIVO DE ESTA CORRIDA</text:p>
      <text:p text:style-name="Standard"/>
      <text:p text:style-name="Standard"><text:s text:c="2"/>Corregir unicamente los bloqueos estructurales detectados en la primera prueba</text:p>
      <text:p text:style-name="Standard"><text:s text:c="2"/>larga real.</text:p>
      <text:p text:style-name="Standard"><text:s text:c="2"/>No rehagas la arquitectura completa.</text:p>
      <text:p text:style-name="Standard"><text:s text:c="2"/>No entres en UI nueva.</text:p>
      <text:p text:style-name="Standard"><text:s text:c="2"/>No avances otra fase.</text:p>
      <text:p text:style-name="Standard"><text:soft-page-break/></text:p>
      <text:p text:style-name="Standard"><text:s text:c="2"/>CASO REAL OBSERVADO</text:p>
      <text:p text:style-name="Standard"/>
      <text:p text:style-name="Standard"><text:s text:c="2"/>Sesion observada:</text:p>
      <text:p text:style-name="Standard"><text:s text:c="2"/>- `workspace/projects/sesion-20260513030126-longrun-crm-01`</text:p>
      <text:p text:style-name="Standard"/>
      <text:p text:style-name="Standard"><text:s text:c="2"/>Problemas reales detectados:</text:p>
      <text:p text:style-name="Standard"><text:s text:c="2"/>1. La sesion larga no construyo el CRM.</text:p>
      <text:p text:style-name="Standard"><text:s text:c="5"/>- el proyecto quedo con solo `.agent-project.json`</text:p>
      <text:p text:style-name="Standard"><text:s text:c="5"/>- no aparecieron archivos reales de producto</text:p>
      <text:p text:style-name="Standard"/>
      <text:p text:style-name="Standard"><text:s text:c="2"/>2. El control plane ejecuto solo la primera tarea interna y se detuvo.</text:p>
      <text:p text:style-name="Standard"><text:s text:c="5"/>- `RUNTIME-20260513030244-001` quedo `completed`</text:p>
      <text:p text:style-name="Standard"><text:s text:c="5"/>- `RUNTIME-20260513030244-002` quedo `pending`</text:p>
      <text:p text:style-name="Standard"><text:s text:c="5"/>- `project_state.json` quedo con `current_task_id = null`</text:p>
      <text:p text:style-name="Standard"><text:s text:c="5"/>- no continuo automaticamente</text:p>
      <text:p text:style-name="Standard"/>
      <text:p text:style-name="Standard"><text:s text:c="2"/>3. El trabajo sigue anclado a la raiz del sistema, no al `projectDir` real de</text:p>
      <text:p text:style-name="Standard"><text:s text:c="2"/>la sesion.</text:p>
      <text:p text:style-name="Standard"><text:s text:c="5"/>- directivas, artefactos y validacion nacen en el runtime del repo</text:p>
      <text:p text:style-name="Standard"><text:s text:c="2"/>principal</text:p>
      <text:p text:style-name="Standard"><text:s text:c="5"/>- el CRM no se construye dentro de `workspace/projects/.../longrun-crm-01`</text:p>
      <text:p text:style-name="Standard"/>
      <text:p text:style-name="Standard"><text:s text:c="2"/>4. La cola de tareas de la sesion larga es demasiado generica.</text:p>
      <text:p text:style-name="Standard"><text:s text:c="5"/>- aparecen tareas como:</text:p>
      <text:p text:style-name="Standard"><text:s text:c="7"/>- `usar el repo y workspace reales`</text:p>
      <text:p text:style-name="Standard"><text:s text:c="7"/>- `crear modulos reutilizables`</text:p>
      <text:p text:style-name="Standard"><text:s text:c="5"/>- pero no tareas reales del CRM con entregables concretos del proyecto</text:p>
      <text:p text:style-name="Standard"/>
      <text:p text:style-name="Standard"><text:s text:c="2"/>OBJETIVO FUNCIONAL DE LA CORRECCION</text:p>
      <text:p text:style-name="Standard"/>
      <text:p text:style-name="Standard"><text:s text:c="2"/>Debes lograr estas 3 correcciones:</text:p>
      <text:p text:style-name="Standard"/>
      <text:p text:style-name="Standard"><text:s text:c="2"/>1. CONTINUIDAD AUTOMATICA DE LA COLA</text:p>
      <text:p text:style-name="Standard"><text:s text:c="2"/>- cuando una tarea termina y existe otra tarea lista, el runtime debe</text:p>
      <text:p text:style-name="Standard"><text:s text:c="2"/>continuar automaticamente</text:p>
      <text:p text:style-name="Standard"><text:s text:c="2"/>- no puede quedar `current_task_id = null` con tareas listas pendientes</text:p>
      <text:p text:style-name="Standard"><text:s text:c="2"/>- la sesion larga debe poder avanzar por multiples tareas sin relanzamiento</text:p>
      <text:p text:style-name="Standard"><text:s text:c="2"/>manual por cada una</text:p>
      <text:p text:style-name="Standard"/>
      <text:p text:style-name="Standard"><text:s text:c="2"/>2. WORKSPACE REAL DE SESION</text:p>
      <text:p text:style-name="Standard"><text:s text:c="2"/>- el control plane puede seguir leyendo politica y plan desde la raiz del</text:p>
      <text:p text:style-name="Standard"><text:s text:c="2"/>sistema</text:p>
      <text:p text:style-name="Standard"><text:s text:c="2"/>- pero la ejecucion del proyecto real debe trabajar sobre el `projectDir` de</text:p>
      <text:p text:style-name="Standard"><text:s text:c="2"/>la sesion</text:p>
      <text:p text:style-name="Standard"><text:s text:c="2"/>- la directiva debe distinguir claramente entre:</text:p>
      <text:p text:style-name="Standard"><text:s text:c="4"/>- `system_root` o raiz del runtime/orquestador</text:p>
      <text:p text:style-name="Standard"><text:s text:c="4"/>- `task_workspace_root` o workspace real del proyecto de la sesion</text:p>
      <text:p text:style-name="Standard"><text:s text:c="2"/>- el worker no puede escribir el CRM en la raiz del sistema</text:p>
      <text:p text:style-name="Standard"><text:s text:c="2"/>- los entregables reales del proyecto deben quedar dentro de:</text:p>
      <text:p text:style-name="Standard"><text:s text:c="4"/>- `workspace/projects/&lt;sesion&gt;/...`</text:p>
      <text:p text:style-name="Standard"/>
      <text:p text:style-name="Standard"><text:soft-page-break/><text:s text:c="2"/>3. PLANIFICACION REAL DE PROYECTO</text:p>
      <text:p text:style-name="Standard"><text:s text:c="2"/>- una sesion `long-run` no puede quedarse solo en tareas genericas de</text:p>
      <text:p text:style-name="Standard"><text:s text:c="2"/>bootstrap</text:p>
      <text:p text:style-name="Standard"><text:s text:c="2"/>- el planner o adaptador de runtime debe generar tareas reales del producto a</text:p>
      <text:p text:style-name="Standard"><text:s text:c="2"/>partir del requirement</text:p>
      <text:p text:style-name="Standard"><text:s text:c="2"/>- esas tareas deben tener:</text:p>
      <text:p text:style-name="Standard"><text:s text:c="4"/>- objetivo concreto</text:p>
      <text:p text:style-name="Standard"><text:s text:c="4"/>- expected_files reales del CRM</text:p>
      <text:p text:style-name="Standard"><text:s text:c="4"/>- validaciones reales del CRM</text:p>
      <text:p text:style-name="Standard"><text:s text:c="4"/>- dependencias coherentes</text:p>
      <text:p text:style-name="Standard"><text:s text:c="2"/>- una tarea de bootstrap minima puede existir, pero no puede ser el unico</text:p>
      <text:p text:style-name="Standard"><text:s text:c="2"/>trabajo real de la sesion</text:p>
      <text:p text:style-name="Standard"/>
      <text:p text:style-name="Standard"><text:s text:c="2"/>CORRECCIONES ESPERADAS</text:p>
      <text:p text:style-name="Standard"/>
      <text:p text:style-name="Standard"><text:s text:c="2"/>A. En la integracion de runtime</text:p>
      <text:p text:style-name="Standard"><text:s text:c="2"/>- corregir `backend/agent_runtime.py` y helpers minimos necesarios</text:p>
      <text:p text:style-name="Standard"><text:s text:c="2"/>- despues de completar una tarea, seleccionar la siguiente tarea lista y</text:p>
      <text:p text:style-name="Standard"><text:s text:c="2"/>continuar</text:p>
      <text:p text:style-name="Standard"><text:s text:c="2"/>- mantener `project_state.json` consistente:</text:p>
      <text:p text:style-name="Standard"><text:s text:c="4"/>- `current_task_id`</text:p>
      <text:p text:style-name="Standard"><text:s text:c="4"/>- `status`</text:p>
      <text:p text:style-name="Standard"><text:s text:c="4"/>- `completed_tasks`</text:p>
      <text:p text:style-name="Standard"><text:s text:c="4"/>- `failed_tasks`</text:p>
      <text:p text:style-name="Standard"><text:s text:c="4"/>- `blocked_tasks`</text:p>
      <text:p text:style-name="Standard"/>
      <text:p text:style-name="Standard"><text:s text:c="2"/>B. En el manejo de workspace</text:p>
      <text:p text:style-name="Standard"><text:s text:c="2"/>- usar el `projectDir` real de la sesion como root efectivo del trabajo del</text:p>
      <text:p text:style-name="Standard"><text:s text:c="2"/>worker</text:p>
      <text:p text:style-name="Standard"><text:s text:c="2"/>- las directivas deben reflejar ese workspace real</text:p>
      <text:p text:style-name="Standard"><text:s text:c="2"/>- si necesitas introducir un campo nuevo tipo `task_workspace_root`, hazlo de</text:p>
      <text:p text:style-name="Standard"><text:s text:c="2"/>forma clara y compatible</text:p>
      <text:p text:style-name="Standard"><text:s text:c="2"/>- no mezclar falsa evidencia del repo principal con evidencia del proyecto de</text:p>
      <text:p text:style-name="Standard"><text:s text:c="2"/>sesion</text:p>
      <text:p text:style-name="Standard"/>
      <text:p text:style-name="Standard"><text:s text:c="2"/>C. En la planificacion de sesiones largas</text:p>
      <text:p text:style-name="Standard"><text:s text:c="2"/>- convertir el requirement largo del usuario en una cola de trabajo real del</text:p>
      <text:p text:style-name="Standard"><text:s text:c="2"/>proyecto</text:p>
      <text:p text:style-name="Standard"><text:s text:c="2"/>- las tareas deben apuntar a archivos del CRM, por ejemplo:</text:p>
      <text:p text:style-name="Standard"><text:s text:c="4"/>- `frontend/...`</text:p>
      <text:p text:style-name="Standard"><text:s text:c="4"/>- `src/...`</text:p>
      <text:p text:style-name="Standard"><text:s text:c="4"/>- `shared/...`</text:p>
      <text:p text:style-name="Standard"><text:s text:c="4"/>- `tests/...`</text:p>
      <text:p text:style-name="Standard"><text:s text:c="4"/>- `docs/...`</text:p>
      <text:p text:style-name="Standard"><text:s text:c="2"/>- no dejar la sesion larga reducida a artefactos `runtime/artifacts/*.json`</text:p>
      <text:p text:style-name="Standard"><text:s text:c="2"/>como unico entregable</text:p>
      <text:p text:style-name="Standard"/>
      <text:p text:style-name="Standard"><text:s text:c="2"/>ALCANCE EXACTO</text:p>
      <text:p text:style-name="Standard"/>
      <text:p text:style-name="Standard"><text:s text:c="2"/>Puedes modificar solo si hace falta:</text:p>
      <text:p text:style-name="Standard"><text:s text:c="2"/>- `backend/agent_runtime.py`</text:p>
      <text:p text:style-name="Standard"><text:s text:c="2"/>- `orchestrator/planner.py`</text:p>
      <text:p text:style-name="Standard"><text:soft-page-break/><text:s text:c="2"/>- `orchestrator/task_queue.py`</text:p>
      <text:p text:style-name="Standard"><text:s text:c="2"/>- `orchestrator/directive_context.py`</text:p>
      <text:p text:style-name="Standard"><text:s text:c="2"/>- `orchestrator/directive_generator.py`</text:p>
      <text:p text:style-name="Standard"><text:s text:c="2"/>- `workers/codex_worker.py`</text:p>
      <text:p text:style-name="Standard"><text:s text:c="2"/>- helpers pequenos estrictamente necesarios para soportar workspace real de</text:p>
      <text:p text:style-name="Standard"><text:s text:c="2"/>sesion y continuidad automatica</text:p>
      <text:p text:style-name="Standard"><text:s text:c="2"/>- tests pequenos y enfocados</text:p>
      <text:p text:style-name="Standard"/>
      <text:p text:style-name="Standard"><text:s text:c="2"/>RESTRICCIONES DURAS</text:p>
      <text:p text:style-name="Standard"><text:s text:c="2"/>- no rehacer toda la arquitectura</text:p>
      <text:p text:style-name="Standard"><text:s text:c="2"/>- no tocar UI en esta corrida</text:p>
      <text:p text:style-name="Standard"><text:s text:c="2"/>- no romper los benchmarks ya cerrados</text:p>
      <text:p text:style-name="Standard"><text:s text:c="2"/>- no trabajar dentro de `runtime_orquestador_codex_pack/`</text:p>
      <text:p text:style-name="Standard"><text:s text:c="2"/>- no reportar exito sin evidencia real en disco</text:p>
      <text:p text:style-name="Standard"><text:s text:c="2"/>- no marcar aprobada una sesion larga si sigue dejando el proyecto vacio</text:p>
      <text:p text:style-name="Standard"><text:s text:c="2"/>- no maquillar tareas genericas del runtime como si fueran trabajo real del</text:p>
      <text:p text:style-name="Standard"><text:s text:c="2"/>CRM</text:p>
      <text:p text:style-name="Standard"/>
      <text:p text:style-name="Standard"><text:s text:c="2"/>VALIDACION MINIMA OBLIGATORIA</text:p>
      <text:p text:style-name="Standard"/>
      <text:p text:style-name="Standard"><text:s text:c="2"/>Debes dejar evidencia real de que:</text:p>
      <text:p text:style-name="Standard"/>
      <text:p text:style-name="Standard"><text:s text:c="2"/>1. CONTINUIDAD</text:p>
      <text:p text:style-name="Standard"><text:s text:c="2"/>- lanzas una sesion larga real o una reproduccion controlada equivalente</text:p>
      <text:p text:style-name="Standard"><text:s text:c="2"/>- la primera tarea termina</text:p>
      <text:p text:style-name="Standard"><text:s text:c="2"/>- la segunda tarea arranca automaticamente sin relanzamiento manual</text:p>
      <text:p text:style-name="Standard"><text:s text:c="2"/>- el estado del runtime no queda muerto con `pending` listo y `current_task_id</text:p>
      <text:p text:style-name="Standard"><text:s text:c="2"/>= null`</text:p>
      <text:p text:style-name="Standard"/>
      <text:p text:style-name="Standard"><text:s text:c="2"/>2. WORKSPACE REAL</text:p>
      <text:p text:style-name="Standard"><text:s text:c="2"/>- la sesion escribe archivos reales dentro de su `projectDir`</text:p>
      <text:p text:style-name="Standard"><text:s text:c="2"/>- la directiva deja claro el workspace real de la tarea</text:p>
      <text:p text:style-name="Standard"><text:s text:c="2"/>- la validacion del worker y del validator se hace contra ese workspace real</text:p>
      <text:p text:style-name="Standard"/>
      <text:p text:style-name="Standard"><text:s text:c="2"/>3. PLANIFICACION REAL</text:p>
      <text:p text:style-name="Standard"><text:s text:c="2"/>- la cola de la sesion larga contiene tareas reales del producto</text:p>
      <text:p text:style-name="Standard"><text:s text:c="2"/>- los `expected_files` apuntan a archivos del CRM o del proyecto real</text:p>
      <text:p text:style-name="Standard"><text:s text:c="2"/>- no solo a `runtime/artifacts/*.json`</text:p>
      <text:p text:style-name="Standard"/>
      <text:p text:style-name="Standard"><text:s text:c="2"/>4. EVIDENCIA</text:p>
      <text:p text:style-name="Standard"><text:s text:c="2"/>- el proyecto de la sesion termina con mas de un archivo real de producto</text:p>
      <text:p text:style-name="Standard"><text:s text:c="2"/>- deben aparecer archivos reales del CRM o de una reproduccion equivalente</text:p>
      <text:p text:style-name="Standard"><text:s text:c="2"/>controlada</text:p>
      <text:p text:style-name="Standard"><text:s text:c="2"/>- la evidencia debe incluir directiva, historia, validacion y checkpoint</text:p>
      <text:p text:style-name="Standard"/>
      <text:p text:style-name="Standard"><text:s text:c="2"/>5. HONESTIDAD</text:p>
      <text:p text:style-name="Standard"><text:s text:c="2"/>- si la continuidad automatica o el workspace real siguen fallando, dilo</text:p>
      <text:p text:style-name="Standard"><text:s text:c="2"/>claramente</text:p>
      <text:p text:style-name="Standard"><text:s text:c="2"/>- no cierres la corrida como correcta si el proyecto queda vacio o si las</text:p>
      <text:p text:style-name="Standard"><text:s text:c="2"/>tareas siguen siendo genericas</text:p>
      <text:p text:style-name="Standard"/>
      <text:p text:style-name="Standard"><text:s text:c="2"/>SI AGREGAS TESTS</text:p>
      <text:p text:style-name="Standard"><text:soft-page-break/><text:s text:c="2"/>Mantenlos pequenos y enfocados en:</text:p>
      <text:p text:style-name="Standard"><text:s text:c="2"/>- continuidad automatica</text:p>
      <text:p text:style-name="Standard"><text:s text:c="2"/>- workspace real de sesion</text:p>
      <text:p text:style-name="Standard"><text:s text:c="2"/>- planificacion real de tareas de proyecto</text:p>
      <text:p text:style-name="Standard"/>
      <text:p text:style-name="Standard"><text:s text:c="2"/>AL FINAL</text:p>
      <text:p text:style-name="Standard"><text:s text:c="2"/>Devuelve:</text:p>
      <text:p text:style-name="Standard"><text:s text:c="2"/>1. archivos tocados</text:p>
      <text:p text:style-name="Standard"><text:s text:c="2"/>2. bugs corregidos</text:p>
      <text:p text:style-name="Standard"><text:s text:c="2"/>3. validaciones ejecutadas</text:p>
      <text:p text:style-name="Standard"><text:s text:c="2"/>4. riesgos reales restantes</text:p>
      <text:p text:style-name="Standard"><text:s text:c="2"/>5. confirmacion explicita de si una sesion `long-run` ya puede empezar a</text:p>
      <text:p text:style-name="Standard"><text:s text:c="2"/>construir un proyecto real por multiples tareas en su `projectDir`</text:p>
      <text:p text:style-name="Standard"/>
      <text:p text:style-name="Standard"><text:s text:c="2"/>Cuando termine, lo reviso en seco y te digo si ya quedó listo para otra prueba</text:p>
      <text:p text:style-name="Standard"><text:s text:c="2"/>larga real.</text:p>
      <text:p text:style-name="Standard"/>
      <text:p text:style-name="Standard"/>
      <text:p text:style-name="Standard">› ya termino esto contesto Corregido en la raíz real del repo, no dentro de</text:p>
      <text:p text:style-name="Standard"><text:s text:c="4"/>runtime_orquestador_codex_pack/.</text:p>
      <text:p text:style-name="Standard"/>
      <text:p text:style-name="Standard"><text:s text:c="4"/>Archivos tocados</text:p>
      <text:p text:style-name="Standard"/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backend/agent_runtime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planner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directive_context.py</text:p>
      <text:p text:style-name="Standard"><text:s text:c="4"/>- /home/neurodriver/BASE _METACOGNICION_COLOMBIA/vista_IA/architecture-</text:p>
      <text:p text:style-name="Standard"><text:s text:c="2"/>react-</text:p>
      <text:p text:style-name="Standard"><text:s text:c="6"/>three-flask-socketio/orchestrator/directive_generator.py</text:p>
      <text:p text:style-name="Standard"/>
      <text:p text:style-name="Standard"><text:s text:c="4"/>Artefactos de validación creados:</text:p>
      <text:p text:style-name="Standard"/>
      <text:p text:style-name="Standard"><text:s text:c="4"/>- workspace/projects/sesion-validation-longrun-crm-structural-</text:p>
      <text:p text:style-name="Standard"><text:s text:c="2"/>20260513104130/</text:p>
      <text:p text:style-name="Standard"><text:s text:c="4"/>- workspace/projects/sesion-validation-logpath-20260513104423/</text:p>
      <text:p text:style-name="Standard"><text:s text:c="4"/>- runtime/benchmarks/20260513T104351Z-b72329f6/report.json</text:p>
      <text:p text:style-name="Standard"/>
      <text:p text:style-name="Standard"><text:s text:c="4"/>Bugs corregidos</text:p>
      <text:p text:style-name="Standard"/>
      <text:p text:style-name="Standard"><text:s text:c="4"/>- Continuidad automática: agent_runtime.py ahora puede seguir ejecutando</text:p>
      <text:p text:style-name="Standard"><text:s text:c="6"/>tareas listas con run_control_plane_until_idle(); ya no se queda en una</text:p>
      <text:p text:style-name="Standard"><text:s text:c="2"/>sola</text:p>
      <text:p text:style-name="Standard"><text:s text:c="6"/>tarea si hay cola pendiente ejecutable.</text:p>
      <text:p text:style-name="Standard"><text:s text:c="4"/>- Workspace real de sesión: el runtime usa projectDir como workspace</text:p>
      <text:p text:style-name="Standard"><text:s text:c="2"/>efectivo</text:p>
      <text:p text:style-name="Standard"><text:s text:c="6"/>del worker y del validator. La directiva separa system_root de</text:p>
      <text:p text:style-name="Standard"><text:soft-page-break/><text:s text:c="6"/>task_workspace_root.</text:p>
      <text:p text:style-name="Standard"><text:s text:c="4"/>- Directivas y runtime por sesión: directivas, estado, historia,</text:p>
      <text:p text:style-name="Standard"><text:s text:c="2"/>checkpoints y</text:p>
      <text:p text:style-name="Standard"><text:s text:c="6"/>logs de control plane quedan bajo workspace/projects/&lt;sesion&gt;/runtime/.</text:p>
      <text:p text:style-name="Standard"><text:s text:c="4"/>- Planificación long-run real: planner.py genera tareas de producto CRM con</text:p>
      <text:p text:style-name="Standard"><text:s text:c="6"/>expected_files concretos como frontend/index.html, frontend/app.js,</text:p>
      <text:p text:style-name="Standard"><text:s text:c="2"/>shared/</text:p>
      <text:p text:style-name="Standard"><text:s text:c="6"/>crm_schema.json, src/crm.js, tests/crm_smoke.test.js; ya no cae en</text:p>
      <text:p text:style-name="Standard"><text:s text:c="2"/>runtime/</text:p>
      <text:p text:style-name="Standard"><text:s text:c="6"/>artifacts/*.json para long-run.</text:p>
      <text:p text:style-name="Standard"><text:s text:c="4"/>- Degradación falsa corregida: directive_context.py ya no marca degradado</text:p>
      <text:p text:style-name="Standard"><text:s text:c="2"/>un</text:p>
      <text:p text:style-name="Standard"><text:s text:c="6"/>contexto solo porque el checkpoint futuro de la tarea todavía no existe.</text:p>
      <text:p text:style-name="Standard"/>
      <text:p text:style-name="Standard"><text:s text:c="4"/>Validaciones ejecutadas</text:p>
      <text:p text:style-name="Standard"/>
      <text:p text:style-name="Standard"><text:s text:c="4"/>- python3 -m py_compile backend/agent_runtime.py orchestrator/planner.py</text:p>
      <text:p text:style-name="Standard"><text:s text:c="6"/>orchestrator/directive_context.py orchestrator/directive_generator.py</text:p>
      <text:p text:style-name="Standard"><text:s text:c="2"/>pasó.</text:p>
      <text:p text:style-name="Standard"><text:s text:c="4"/>- Validación planner long-run: generó 6 tareas CRM, dependencias</text:p>
      <text:p text:style-name="Standard"><text:s text:c="2"/>secuenciales</text:p>
      <text:p text:style-name="Standard"><text:s text:c="6"/>y runtime_artifact_expected=[].</text:p>
      <text:p text:style-name="Standard"><text:s text:c="4"/>- Reproducción controlada real:</text:p>
      <text:p text:style-name="Standard"><text:s text:c="8"/>- Proyecto: workspace/projects/sesion-validation-longrun-crm-</text:p>
      <text:p text:style-name="Standard"><text:s text:c="2"/>structural-</text:p>
      <text:p text:style-name="Standard"><text:s text:c="10"/>20260513104130</text:p>
      <text:p text:style-name="Standard"><text:s text:c="8"/>- tasks_executed=6</text:p>
      <text:p text:style-name="Standard"><text:s text:c="8"/>- las 6 tareas quedaron completed</text:p>
      <text:p text:style-name="Standard"><text:s text:c="8"/>- current_task_id=null, sin pending_ids ni ready_ids</text:p>
      <text:p text:style-name="Standard"><text:s text:c="8"/>- se crearon archivos reales: README.md, frontend/index.html, frontend/</text:p>
      <text:p text:style-name="Standard"><text:s text:c="10"/>app.js, shared/crm_schema.json, src/crm.js, tests/crm_smoke.test.js,</text:p>
      <text:p text:style-name="Standard"><text:s text:c="10"/>etc.</text:p>
      <text:p text:style-name="Standard"><text:s text:c="8"/>- hubo 6 directivas, 6 eventos de historia y 6 checkpoints.</text:p>
      <text:p text:style-name="Standard"><text:s text:c="8"/>- directive_degraded_flags=[false, false, false, false, false, false]</text:p>
      <text:p text:style-name="Standard"><text:s text:c="4"/>- Validación de arranque de sesión:</text:p>
      <text:p text:style-name="Standard"><text:s text:c="8"/>- runtimeDir, terminalLogPath y directiveJsonPath quedaron bajo el</text:p>
      <text:p text:style-name="Standard"><text:s text:c="10"/>projectDir/runtime/.</text:p>
      <text:p text:style-name="Standard"><text:s text:c="4"/>- python3 -m orchestrator.benchmark pasó completo:</text:p>
      <text:p text:style-name="Standard"><text:s text:c="8"/>- smoke-01, crud-ui-02, refactor-mid-03, long-project-04, recovery-05</text:p>
      <text:p text:style-name="Standard"><text:s text:c="8"/>- gate aprobado.</text:p>
      <text:p text:style-name="Standard"/>
      <text:p text:style-name="Standard"><text:s text:c="4"/>Riesgos reales restantes</text:p>
      <text:p text:style-name="Standard"/>
      <text:p text:style-name="Standard"><text:s text:c="4"/>- La reproducción usó un command_builder determinístico para validar el</text:p>
      <text:p text:style-name="Standard"><text:s text:c="6"/>control plane; no demuestra todavía calidad de salida de Codex</text:p>
      <text:p text:style-name="Standard"><text:s text:c="2"/>construyendo</text:p>
      <text:p text:style-name="Standard"><text:s text:c="6"/>un CRM completo.</text:p>
      <text:p text:style-name="Standard"><text:s text:c="4"/>- El planner long-run ahora tiene blueprint CRM útil, pero sigue siendo</text:p>
      <text:p text:style-name="Standard"><text:s text:c="6"/>heurístico para otros tipos de producto.</text:p>
      <text:p text:style-name="Standard"><text:s text:c="4"/>- La sesión observada antigua no fue migrada retroactivamente; las sesiones</text:p>
      <text:p text:style-name="Standard"><text:s text:c="6"/>nuevas usan la corrección.</text:p>
      <text:p text:style-name="Standard"><text:s text:c="4"/>- Falta una corrida larga real con worker Codex externo para medir robustez</text:p>
      <text:p text:style-name="Standard"><text:soft-page-break/><text:s text:c="6"/>bajo fallos, latencia y calidad de implementación.</text:p>
      <text:p text:style-name="Standard"/>
      <text:p text:style-name="Standard"><text:s text:c="4"/>Confirmación</text:p>
      <text:p text:style-name="Standard"><text:s text:c="4"/>Sí: una sesión long-run ya puede empezar a construir un proyecto real por</text:p>
      <text:p text:style-name="Standard"><text:s text:c="4"/>múltiples tareas dentro de su projectDir, con directivas, validación,</text:p>
      <text:p text:style-name="Standard"><text:s text:c="2"/>historia</text:p>
      <text:p text:style-name="Standard"><text:s text:c="4"/>y checkpoints alineados al workspace de la sesión. No afirmo todavía que</text:p>
      <text:p text:style-name="Standard"><text:s text:c="2"/>esté</text:p>
      <text:p text:style-name="Standard"><text:s text:c="4"/>listo para proyectos largos reales de producción sin una corrida externa</text:p>
      <text:p text:style-name="Standard"><text:s text:c="4"/>completa con Codex.</text:p>
      <text:p text:style-name="Standard"/>
      <text:p text:style-name="Standard"/>
      <text:p text:style-name="Standard"/>
      <text:p text:style-name="Standard">› ya termino</text:p>
      <text:p text:style-name="Standard"/>
      <text:p text:style-name="Standard"/>
      <text:p text:style-name="Standard"/>
      <text:p text:style-name="Standard">› ahora que es lo siguiente</text:p>
      <text:p text:style-name="Standard"/>
      <text:p text:style-name="Standard"/>
      <text:p text:style-name="Standard">■ Your access token could not be refreshed because your refresh token was</text:p>
      <text:p text:style-name="Standard">already used. Please log out and sign in again.</text:p>
      <text:p text:style-name="Standard"/>
      <text:p text:style-name="Standard"><text:s/></text:p>
      <text:p text:style-name="Standard">› Explain this codeb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3:50:54.106210704</meta:creation-date>
    <dc:date>2026-05-13T03:52:05.570147780</dc:date>
    <meta:editing-duration>PT1M12S</meta:editing-duration>
    <meta:editing-cycles>1</meta:editing-cycles>
    <meta:document-statistic meta:table-count="0" meta:image-count="0" meta:object-count="0" meta:page-count="194" meta:paragraph-count="7543" meta:word-count="48583" meta:character-count="341597" meta:non-whitespace-character-count="283289"/>
    <meta:generator>LibreOffice/24.2.7.2$Linux_X86_64 LibreOffice_project/420$Build-2</meta:generator>
  </office:meta>
</office:document-meta>
</file>